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25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1.455cm"/>
    </style:style>
    <style:style style:name="co13" style:family="table-column">
      <style:table-column-properties fo:break-before="auto" style:column-width="3.122cm"/>
    </style:style>
    <style:style style:name="co26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4.551cm"/>
    </style:style>
    <style:style style:name="co11" style:family="table-column">
      <style:table-column-properties fo:break-before="auto" style:column-width="2.487cm"/>
    </style:style>
    <style:style style:name="co12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3.067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5.741cm"/>
    </style:style>
    <style:style style:name="co17" style:family="table-column">
      <style:table-column-properties fo:break-before="auto" style:column-width="7.011cm"/>
    </style:style>
    <style:style style:name="co18" style:family="table-column">
      <style:table-column-properties fo:break-before="auto" style:column-width="2.593cm"/>
    </style:style>
    <style:style style:name="co19" style:family="table-column">
      <style:table-column-properties fo:break-before="auto" style:column-width="3.545cm"/>
    </style:style>
    <style:style style:name="co20" style:family="table-column">
      <style:table-column-properties fo:break-before="auto" style:column-width="3.519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3.307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149cm"/>
    </style:style>
    <style:style style:name="co27" style:family="table-column">
      <style:table-column-properties fo:break-before="auto" style:column-width="3.228cm"/>
    </style:style>
    <style:style style:name="co28" style:family="table-column">
      <style:table-column-properties fo:break-before="auto" style:column-width="4.445cm"/>
    </style:style>
    <style:style style:name="co29" style:family="table-column">
      <style:table-column-properties fo:break-before="auto" style:column-width="4.419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085cm"/>
    </style:style>
    <style:style style:name="co32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1.827cm"/>
    </style:style>
    <style:style style:name="co34" style:family="table-column">
      <style:table-column-properties fo:break-before="auto" style:column-width="1.004cm"/>
    </style:style>
    <style:style style:name="co35" style:family="table-column">
      <style:table-column-properties fo:break-before="auto" style:column-width="1.64cm"/>
    </style:style>
    <style:style style:name="co36" style:family="table-column">
      <style:table-column-properties fo:break-before="auto" style:column-width="1.667cm"/>
    </style:style>
    <style:style style:name="co37" style:family="table-column">
      <style:table-column-properties fo:break-before="auto" style:column-width="3.625cm"/>
    </style:style>
    <style:style style:name="co38" style:family="table-column">
      <style:table-column-properties fo:break-before="auto" style:column-width="4.91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182cm" fo:break-before="auto" style:use-optimal-row-height="false"/>
    </style:style>
    <style:style style:name="ro6" style:family="table-row">
      <style:table-row-properties style:row-height="1.129cm" fo:break-before="auto" style:use-optimal-row-height="false"/>
    </style:style>
    <style:style style:name="ro7" style:family="table-row">
      <style:table-row-properties style:row-height="1.226cm" fo:break-before="auto" style:use-optimal-row-height="false"/>
    </style:style>
    <style:style style:name="ro8" style:family="table-row">
      <style:table-row-properties style:row-height="0.988cm" fo:break-before="auto" style:use-optimal-row-height="false"/>
    </style:style>
    <style:style style:name="ro9" style:family="table-row">
      <style:table-row-properties style:row-height="1.261cm" fo:break-before="auto" style:use-optimal-row-height="false"/>
    </style:style>
    <style:style style:name="ro10" style:family="table-row">
      <style:table-row-properties style:row-height="1.147cm" fo:break-before="auto" style:use-optimal-row-height="false"/>
    </style:style>
    <style:style style:name="ro11" style:family="table-row">
      <style:table-row-properties style:row-height="1.305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2.152cm" fo:break-before="auto" style:use-optimal-row-height="false"/>
    </style:style>
    <style:style style:name="ro15" style:family="table-row">
      <style:table-row-properties style:row-height="0.45cm" fo:break-before="auto" style:use-optimal-row-height="true"/>
    </style:style>
    <style:style style:name="ta7" style:family="table" style:master-page-name="PageStyle_5f_cat_5f_other">
      <style:table-properties table:display="true" style:writing-mode="lr-tb"/>
    </style:style>
    <style:style style:name="ta8" style:family="table" style:master-page-name="PageStyle_5f_Cat_5f_Validation">
      <style:table-properties table:display="true" style:writing-mode="lr-tb"/>
    </style:style>
    <style:style style:name="ta3" style:family="table" style:master-page-name="PageStyle_5f_cat_5f_lang">
      <style:table-properties table:display="true" style:writing-mode="lr-tb"/>
    </style:style>
    <style:style style:name="ta4" style:family="table" style:master-page-name="PageStyle_5f_cat_5f_context_5f_class">
      <style:table-properties table:display="true" style:writing-mode="lr-tb"/>
    </style:style>
    <style:style style:name="ta5" style:family="table" style:master-page-name="PageStyle_5f_cat_5f_context">
      <style:table-properties table:display="true" style:writing-mode="lr-tb"/>
    </style:style>
    <style:style style:name="ta6" style:family="table" style:master-page-name="PageStyle_5f_cat_5f_object">
      <style:table-properties table:display="true" style:writing-mode="lr-tb"/>
    </style:style>
    <style:style style:name="ta9" style:family="table" style:master-page-name="PageStyle_5f_cat_5f_attr_5f_class">
      <style:table-properties table:display="true" style:writing-mode="lr-tb"/>
    </style:style>
    <style:style style:name="ta10" style:family="table" style:master-page-name="PageStyle_5f_cat_5f_attribute">
      <style:table-properties table:display="true" style:writing-mode="lr-tb"/>
    </style:style>
    <style:style style:name="ta11" style:family="table" style:master-page-name="PageStyle_5f_Context_5f_SolarSystem">
      <style:table-properties table:display="true" style:writing-mode="lr-tb"/>
    </style:style>
    <style:style style:name="ta12" style:family="table" style:master-page-name="PageStyle_5f_Context_5f_SS_5f_IAU">
      <style:table-properties table:display="true" style:writing-mode="lr-tb"/>
    </style:style>
    <style:style style:name="ce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VLOOKUP([.A1];[$cat_other.$A$2:.$C$9];3;0)&lt;&gt;VLOOKUP([.A1];[$cat_other.$A$2:.$C$9];2;0))" style:apply-style-name="ConditionalStyle_5f_1" style:base-cell-address="cat_lang.A1"/>
    </style:style>
    <style:style style:name="ce21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VLOOKUP([.A1];[$cat_other.$A$2:.$C$9];3;0)&lt;&gt;VLOOKUP([.A1];[$cat_other.$A$2:.$C$9];2;0))" style:apply-style-name="ConditionalStyle_5f_1" style:base-cell-address="cat_context_class.A1"/>
    </style:style>
    <style:style style:name="ce32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VLOOKUP([.A1];[$Cat_Validation.$A$2:.$C$9];3;0)&lt;&gt;VLOOKUP([.A1];[$Cat_Validation.$A$2:.$C$9];2;0))" style:apply-style-name="ConditionalStyle_5f_1" style:base-cell-address="cat_context.A1"/>
    </style:style>
    <style:style style:name="ce33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Button" style:data-style-name="N0">
      <style:table-cell-properties fo:border-bottom="0.06pt solid #808080" fo:background-color="#b2b2b2" style:cell-protect="none" style:print-content="true" style:diagonal-bl-tr="none" style:diagonal-tl-br="none" style:text-align-source="fix" style:repeat-content="false" fo:wrap-option="no-wrap" fo:border-left="0.06pt solid #cccccc" style:direction="ltr" fo:border-right="0.06pt solid #808080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VLOOKUP([.A1];[$Cat_Validation.$A$2:.$C$9];3;0)&lt;&gt;VLOOKUP([.A1];[$Cat_Validation.$A$2:.$C$9];2;0))" style:apply-style-name="ConditionalStyle_5f_1" style:base-cell-address="cat_object.A1"/>
    </style:style>
    <style:style style:name="ce11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Accent_20_2_20_1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VLOOKUP([.A1];[$Cat_Validation.$A$2:.$C$9];3;0)&lt;&gt;VLOOKUP([.A1];[$Cat_Validation.$A$2:.$C$9];2;0))" style:apply-style-name="ConditionalStyle_5f_1" style:base-cell-address="cat_attr_class.A1"/>
    </style:style>
    <style:style style:name="ce45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VLOOKUP([.A1];[$Cat_Validation.$A$2:.$C$9];3;0)&lt;&gt;VLOOKUP([.A1];[$Cat_Validation.$A$2:.$C$9];2;0))" style:apply-style-name="ConditionalStyle_5f_1" style:base-cell-address="cat_attr_class.A1"/>
    </style:style>
    <style:style style:name="ce46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VLOOKUP([.A1];[$Cat_Validation.$A$2:.$C$9];3;0)&lt;&gt;VLOOKUP([.A1];[$Cat_Validation.$A$2:.$C$9];2;0))" style:apply-style-name="ConditionalStyle_5f_1" style:base-cell-address="cat_attribute.A1"/>
    </style:style>
    <style:style style:name="ce18" style:family="table-cell" style:parent-style-name="Default" style:data-style-name="N0">
      <style:table-cell-properties fo:border-bottom="0.06pt solid #000000" fo:background-color="#9999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Button" style:data-style-name="N0">
      <style:table-cell-properties fo:border-bottom="0.06pt solid #808080" fo:background-color="#b2b2b2" style:cell-protect="protected" style:print-content="true" style:diagonal-bl-tr="none" style:diagonal-tl-br="none" style:text-align-source="fix" style:repeat-content="false" fo:wrap-option="no-wrap" fo:border-left="0.06pt solid #cccccc" style:direction="ltr" fo:border-right="0.06pt solid #808080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Button" style:data-style-name="N0">
      <style:table-cell-properties fo:border-bottom="0.06pt solid #808080" fo:background-color="#b2b2b2" style:cell-protect="protected" style:print-content="true" style:diagonal-bl-tr="none" style:diagonal-tl-br="none" style:text-align-source="fix" style:repeat-content="false" fo:wrap-option="no-wrap" fo:border-left="0.06pt solid #cccccc" style:direction="ltr" fo:border-right="0.06pt solid #808080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06pt solid #000000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b2b2b2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fo:border-bottom="0.06pt solid #000000" fo:background-color="#dddddd" style:cell-protect="protected" style:print-content="true" style:diagonal-bl-tr="none" style:diagonal-tl-br="none" style:text-align-source="fix" style:repeat-content="false" fo:wrap-option="no-wrap" fo:border-left="0.06pt solid #b2b2b2" style:direction="ltr" fo:border-right="0.06pt solid #b2b2b2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06pt solid #b2b2b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06pt solid #b2b2b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b2b2b2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06pt solid #000000" fo:background-color="#dddddd" style:cell-protect="protected" style:print-content="true" style:diagonal-bl-tr="none" style:diagonal-tl-br="0.06pt solid #000000" style:text-align-source="fix" style:repeat-content="false" fo:wrap-option="wrap" fo:border-left="0.06pt solid #b2b2b2" style:direction="ltr" fo:border-right="0.06pt solid #000000" style:rotation-angle="0" style:rotation-align="none" style:shrink-to-fit="false" fo:border-top="0.06pt solid #b2b2b2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0">
      <style:table-cell-properties fo:border-bottom="0.06pt solid #808080" fo:background-color="#b2b2b2" style:cell-protect="protected" style:print-content="true" style:diagonal-bl-tr="none" style:diagonal-tl-br="none" style:text-align-source="fix" style:repeat-content="false" fo:wrap-option="no-wrap" fo:border-left="0.06pt solid #cccccc" style:direction="ltr" fo:border-right="0.06pt solid #808080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65536)" table:allow-empty-cell="true" table:base-cell-address="Context_SS_IAU.B2">
          <table:error-message table:message-type="stop" table:display="true"/>
        </table:content-validation>
        <table:content-validation table:name="val2" table:base-cell-address="Context_SS_IAU.C2">
          <table:error-message table:message-type="stop" table:display="true"/>
        </table:content-validation>
        <table:content-validation table:name="val3" table:condition="of:cell-content-is-in-list([$cat_context_class.$A$2:.$A$1001])" table:allow-empty-cell="true" table:display-list="unsorted" table:base-cell-address="Context_SS_IAU.D2">
          <table:error-message table:message-type="stop" table:display="true"/>
        </table:content-validation>
        <table:content-validation table:name="val4" table:condition="of:cell-content-is-in-list([$cat_attr_class.$A$2:.$A$7])" table:allow-empty-cell="true" table:display-list="unsorted" table:base-cell-address="Context_SS_IAU.G2">
          <table:error-message table:message-type="stop" table:display="true"/>
        </table:content-validation>
        <table:content-validation table:name="val5" table:condition="of:cell-content-is-in-list([$cat_context.$A$2:.$A$1000])" table:allow-empty-cell="true" table:display-list="unsorted" table:base-cell-address="Context_SS_IAU.C1">
          <table:error-message table:message-type="stop" table:display="true"/>
        </table:content-validation>
        <table:content-validation table:name="val6" table:condition="of:cell-content-is-in-list([$cat_object.$A$2:.$A$14])" table:allow-empty-cell="true" table:display-list="unsorted" table:base-cell-address="Context_SS_IAU.K12">
          <table:error-message table:message-type="stop" table:display="true"/>
        </table:content-validation>
        <table:content-validation table:name="val7" table:condition="of:cell-content-is-in-list([$cat_attribute.$A$2:.$A$12])" table:allow-empty-cell="true" table:display-list="unsorted" table:base-cell-address="Context_SS_IAU.L11">
          <table:error-message table:message-type="stop" table:display="true"/>
        </table:content-validation>
        <table:content-validation table:name="val8" table:condition="of:cell-content-is-in-list([$cat_other.$A$2:.$A$4])" table:allow-empty-cell="true" table:display-list="unsorted" table:base-cell-address="Context_SS_IAU.L12">
          <table:error-message table:message-type="stop" table:display="true"/>
        </table:content-validation>
      </table:content-validations>
      <table:table table:name="cat_lang" table:style-name="ta3">
        <office:forms form:automatic-focus="false" form:apply-design-mode="false"/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3" table:number-columns-repeated="16381" table:default-cell-style-name="ce22"/>
        <table:table-row table:style-name="ro1">
          <table:table-cell table:style-name="ce1" office:value-type="string" calcext:value-type="string">
            <text:p>lang_code</text:p>
          </table:table-cell>
          <table:table-cell table:style-name="ce1" office:value-type="string" calcext:value-type="string">
            <text:p>lang_id</text:p>
          </table:table-cell>
          <table:table-cell table:style-name="ce1" office:value-type="string" calcext:value-type="string">
            <text:p>lang_label</text:p>
          </table:table-cell>
          <table:table-cell table:number-columns-repeated="16381"/>
        </table:table-row>
        <table:table-row table:style-name="ro1">
          <table:table-cell table:style-name="ce21" office:value-type="string" calcext:value-type="string">
            <text:p>en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English</text:p>
          </table:table-cell>
          <table:table-cell table:number-columns-repeated="16381"/>
        </table:table-row>
        <table:table-row table:style-name="ro1">
          <table:table-cell table:style-name="ce21" office:value-type="string" calcext:value-type="string">
            <text:p>es</text:p>
          </table:table-cell>
          <table:table-cell table:style-name="ce4" table:content-validation-name="val1" table:formula="of:=[.B2]+1" office:value-type="float" office:value="2" calcext:value-type="float">
            <text:p>2</text:p>
          </table:table-cell>
          <table:table-cell table:style-name="ce21" office:value-type="string" calcext:value-type="string">
            <text:p>Español</text:p>
          </table:table-cell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]+1" office:value-type="float" office:value="3" calcext:value-type="float">
            <text:p>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]+1" office:value-type="float" office:value="4" calcext:value-type="float">
            <text:p>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]+1" office:value-type="float" office:value="5" calcext:value-type="float">
            <text:p>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]+1" office:value-type="float" office:value="6" calcext:value-type="float">
            <text:p>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]+1" office:value-type="float" office:value="7" calcext:value-type="float">
            <text:p>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]+1" office:value-type="float" office:value="8" calcext:value-type="float">
            <text:p>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]+1" office:value-type="float" office:value="9" calcext:value-type="float">
            <text:p>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]+1" office:value-type="float" office:value="10" calcext:value-type="float">
            <text:p>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]+1" office:value-type="float" office:value="11" calcext:value-type="float">
            <text:p>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]+1" office:value-type="float" office:value="12" calcext:value-type="float">
            <text:p>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]+1" office:value-type="float" office:value="13" calcext:value-type="float">
            <text:p>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]+1" office:value-type="float" office:value="14" calcext:value-type="float">
            <text:p>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]+1" office:value-type="float" office:value="15" calcext:value-type="float">
            <text:p>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]+1" office:value-type="float" office:value="16" calcext:value-type="float">
            <text:p>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]+1" office:value-type="float" office:value="17" calcext:value-type="float">
            <text:p>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]+1" office:value-type="float" office:value="18" calcext:value-type="float">
            <text:p>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]+1" office:value-type="float" office:value="19" calcext:value-type="float">
            <text:p>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]+1" office:value-type="float" office:value="20" calcext:value-type="float">
            <text:p>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]+1" office:value-type="float" office:value="21" calcext:value-type="float">
            <text:p>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]+1" office:value-type="float" office:value="22" calcext:value-type="float">
            <text:p>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]+1" office:value-type="float" office:value="23" calcext:value-type="float">
            <text:p>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]+1" office:value-type="float" office:value="24" calcext:value-type="float">
            <text:p>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]+1" office:value-type="float" office:value="25" calcext:value-type="float">
            <text:p>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]+1" office:value-type="float" office:value="26" calcext:value-type="float">
            <text:p>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]+1" office:value-type="float" office:value="27" calcext:value-type="float">
            <text:p>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]+1" office:value-type="float" office:value="28" calcext:value-type="float">
            <text:p>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]+1" office:value-type="float" office:value="29" calcext:value-type="float">
            <text:p>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]+1" office:value-type="float" office:value="30" calcext:value-type="float">
            <text:p>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]+1" office:value-type="float" office:value="31" calcext:value-type="float">
            <text:p>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]+1" office:value-type="float" office:value="32" calcext:value-type="float">
            <text:p>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]+1" office:value-type="float" office:value="33" calcext:value-type="float">
            <text:p>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]+1" office:value-type="float" office:value="34" calcext:value-type="float">
            <text:p>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]+1" office:value-type="float" office:value="35" calcext:value-type="float">
            <text:p>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]+1" office:value-type="float" office:value="36" calcext:value-type="float">
            <text:p>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]+1" office:value-type="float" office:value="37" calcext:value-type="float">
            <text:p>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]+1" office:value-type="float" office:value="38" calcext:value-type="float">
            <text:p>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]+1" office:value-type="float" office:value="39" calcext:value-type="float">
            <text:p>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]+1" office:value-type="float" office:value="40" calcext:value-type="float">
            <text:p>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]+1" office:value-type="float" office:value="41" calcext:value-type="float">
            <text:p>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]+1" office:value-type="float" office:value="42" calcext:value-type="float">
            <text:p>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]+1" office:value-type="float" office:value="43" calcext:value-type="float">
            <text:p>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]+1" office:value-type="float" office:value="44" calcext:value-type="float">
            <text:p>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]+1" office:value-type="float" office:value="45" calcext:value-type="float">
            <text:p>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]+1" office:value-type="float" office:value="46" calcext:value-type="float">
            <text:p>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]+1" office:value-type="float" office:value="47" calcext:value-type="float">
            <text:p>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]+1" office:value-type="float" office:value="48" calcext:value-type="float">
            <text:p>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]+1" office:value-type="float" office:value="49" calcext:value-type="float">
            <text:p>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]+1" office:value-type="float" office:value="50" calcext:value-type="float">
            <text:p>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]+1" office:value-type="float" office:value="51" calcext:value-type="float">
            <text:p>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]+1" office:value-type="float" office:value="52" calcext:value-type="float">
            <text:p>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]+1" office:value-type="float" office:value="53" calcext:value-type="float">
            <text:p>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]+1" office:value-type="float" office:value="54" calcext:value-type="float">
            <text:p>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]+1" office:value-type="float" office:value="55" calcext:value-type="float">
            <text:p>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]+1" office:value-type="float" office:value="56" calcext:value-type="float">
            <text:p>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]+1" office:value-type="float" office:value="57" calcext:value-type="float">
            <text:p>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]+1" office:value-type="float" office:value="58" calcext:value-type="float">
            <text:p>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]+1" office:value-type="float" office:value="59" calcext:value-type="float">
            <text:p>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]+1" office:value-type="float" office:value="60" calcext:value-type="float">
            <text:p>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]+1" office:value-type="float" office:value="61" calcext:value-type="float">
            <text:p>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]+1" office:value-type="float" office:value="62" calcext:value-type="float">
            <text:p>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]+1" office:value-type="float" office:value="63" calcext:value-type="float">
            <text:p>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]+1" office:value-type="float" office:value="64" calcext:value-type="float">
            <text:p>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]+1" office:value-type="float" office:value="65" calcext:value-type="float">
            <text:p>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]+1" office:value-type="float" office:value="66" calcext:value-type="float">
            <text:p>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]+1" office:value-type="float" office:value="67" calcext:value-type="float">
            <text:p>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]+1" office:value-type="float" office:value="68" calcext:value-type="float">
            <text:p>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]+1" office:value-type="float" office:value="69" calcext:value-type="float">
            <text:p>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]+1" office:value-type="float" office:value="70" calcext:value-type="float">
            <text:p>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]+1" office:value-type="float" office:value="71" calcext:value-type="float">
            <text:p>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]+1" office:value-type="float" office:value="72" calcext:value-type="float">
            <text:p>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]+1" office:value-type="float" office:value="73" calcext:value-type="float">
            <text:p>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]+1" office:value-type="float" office:value="74" calcext:value-type="float">
            <text:p>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]+1" office:value-type="float" office:value="75" calcext:value-type="float">
            <text:p>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]+1" office:value-type="float" office:value="76" calcext:value-type="float">
            <text:p>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]+1" office:value-type="float" office:value="77" calcext:value-type="float">
            <text:p>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]+1" office:value-type="float" office:value="78" calcext:value-type="float">
            <text:p>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]+1" office:value-type="float" office:value="79" calcext:value-type="float">
            <text:p>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]+1" office:value-type="float" office:value="80" calcext:value-type="float">
            <text:p>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]+1" office:value-type="float" office:value="81" calcext:value-type="float">
            <text:p>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]+1" office:value-type="float" office:value="82" calcext:value-type="float">
            <text:p>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]+1" office:value-type="float" office:value="83" calcext:value-type="float">
            <text:p>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]+1" office:value-type="float" office:value="84" calcext:value-type="float">
            <text:p>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]+1" office:value-type="float" office:value="85" calcext:value-type="float">
            <text:p>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]+1" office:value-type="float" office:value="86" calcext:value-type="float">
            <text:p>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]+1" office:value-type="float" office:value="87" calcext:value-type="float">
            <text:p>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]+1" office:value-type="float" office:value="88" calcext:value-type="float">
            <text:p>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]+1" office:value-type="float" office:value="89" calcext:value-type="float">
            <text:p>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]+1" office:value-type="float" office:value="90" calcext:value-type="float">
            <text:p>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]+1" office:value-type="float" office:value="91" calcext:value-type="float">
            <text:p>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]+1" office:value-type="float" office:value="92" calcext:value-type="float">
            <text:p>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]+1" office:value-type="float" office:value="93" calcext:value-type="float">
            <text:p>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]+1" office:value-type="float" office:value="94" calcext:value-type="float">
            <text:p>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]+1" office:value-type="float" office:value="95" calcext:value-type="float">
            <text:p>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]+1" office:value-type="float" office:value="96" calcext:value-type="float">
            <text:p>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]+1" office:value-type="float" office:value="97" calcext:value-type="float">
            <text:p>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]+1" office:value-type="float" office:value="98" calcext:value-type="float">
            <text:p>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]+1" office:value-type="float" office:value="99" calcext:value-type="float">
            <text:p>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0]+1" office:value-type="float" office:value="100" calcext:value-type="float">
            <text:p>1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1]+1" office:value-type="float" office:value="101" calcext:value-type="float">
            <text:p>1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2]+1" office:value-type="float" office:value="102" calcext:value-type="float">
            <text:p>1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3]+1" office:value-type="float" office:value="103" calcext:value-type="float">
            <text:p>1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4]+1" office:value-type="float" office:value="104" calcext:value-type="float">
            <text:p>1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5]+1" office:value-type="float" office:value="105" calcext:value-type="float">
            <text:p>1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6]+1" office:value-type="float" office:value="106" calcext:value-type="float">
            <text:p>1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7]+1" office:value-type="float" office:value="107" calcext:value-type="float">
            <text:p>1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8]+1" office:value-type="float" office:value="108" calcext:value-type="float">
            <text:p>1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9]+1" office:value-type="float" office:value="109" calcext:value-type="float">
            <text:p>1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0]+1" office:value-type="float" office:value="110" calcext:value-type="float">
            <text:p>1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1]+1" office:value-type="float" office:value="111" calcext:value-type="float">
            <text:p>1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2]+1" office:value-type="float" office:value="112" calcext:value-type="float">
            <text:p>1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3]+1" office:value-type="float" office:value="113" calcext:value-type="float">
            <text:p>1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4]+1" office:value-type="float" office:value="114" calcext:value-type="float">
            <text:p>1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5]+1" office:value-type="float" office:value="115" calcext:value-type="float">
            <text:p>1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6]+1" office:value-type="float" office:value="116" calcext:value-type="float">
            <text:p>1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7]+1" office:value-type="float" office:value="117" calcext:value-type="float">
            <text:p>1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8]+1" office:value-type="float" office:value="118" calcext:value-type="float">
            <text:p>1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19]+1" office:value-type="float" office:value="119" calcext:value-type="float">
            <text:p>1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0]+1" office:value-type="float" office:value="120" calcext:value-type="float">
            <text:p>1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1]+1" office:value-type="float" office:value="121" calcext:value-type="float">
            <text:p>1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2]+1" office:value-type="float" office:value="122" calcext:value-type="float">
            <text:p>1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3]+1" office:value-type="float" office:value="123" calcext:value-type="float">
            <text:p>1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4]+1" office:value-type="float" office:value="124" calcext:value-type="float">
            <text:p>1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5]+1" office:value-type="float" office:value="125" calcext:value-type="float">
            <text:p>1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6]+1" office:value-type="float" office:value="126" calcext:value-type="float">
            <text:p>1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7]+1" office:value-type="float" office:value="127" calcext:value-type="float">
            <text:p>1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8]+1" office:value-type="float" office:value="128" calcext:value-type="float">
            <text:p>1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29]+1" office:value-type="float" office:value="129" calcext:value-type="float">
            <text:p>1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0]+1" office:value-type="float" office:value="130" calcext:value-type="float">
            <text:p>1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1]+1" office:value-type="float" office:value="131" calcext:value-type="float">
            <text:p>1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2]+1" office:value-type="float" office:value="132" calcext:value-type="float">
            <text:p>1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3]+1" office:value-type="float" office:value="133" calcext:value-type="float">
            <text:p>1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4]+1" office:value-type="float" office:value="134" calcext:value-type="float">
            <text:p>1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5]+1" office:value-type="float" office:value="135" calcext:value-type="float">
            <text:p>1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6]+1" office:value-type="float" office:value="136" calcext:value-type="float">
            <text:p>1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7]+1" office:value-type="float" office:value="137" calcext:value-type="float">
            <text:p>1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8]+1" office:value-type="float" office:value="138" calcext:value-type="float">
            <text:p>1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39]+1" office:value-type="float" office:value="139" calcext:value-type="float">
            <text:p>1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0]+1" office:value-type="float" office:value="140" calcext:value-type="float">
            <text:p>1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1]+1" office:value-type="float" office:value="141" calcext:value-type="float">
            <text:p>1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2]+1" office:value-type="float" office:value="142" calcext:value-type="float">
            <text:p>1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3]+1" office:value-type="float" office:value="143" calcext:value-type="float">
            <text:p>1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4]+1" office:value-type="float" office:value="144" calcext:value-type="float">
            <text:p>1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5]+1" office:value-type="float" office:value="145" calcext:value-type="float">
            <text:p>1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6]+1" office:value-type="float" office:value="146" calcext:value-type="float">
            <text:p>1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7]+1" office:value-type="float" office:value="147" calcext:value-type="float">
            <text:p>1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8]+1" office:value-type="float" office:value="148" calcext:value-type="float">
            <text:p>1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49]+1" office:value-type="float" office:value="149" calcext:value-type="float">
            <text:p>1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0]+1" office:value-type="float" office:value="150" calcext:value-type="float">
            <text:p>1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1]+1" office:value-type="float" office:value="151" calcext:value-type="float">
            <text:p>1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2]+1" office:value-type="float" office:value="152" calcext:value-type="float">
            <text:p>1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3]+1" office:value-type="float" office:value="153" calcext:value-type="float">
            <text:p>1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4]+1" office:value-type="float" office:value="154" calcext:value-type="float">
            <text:p>1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5]+1" office:value-type="float" office:value="155" calcext:value-type="float">
            <text:p>1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6]+1" office:value-type="float" office:value="156" calcext:value-type="float">
            <text:p>1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7]+1" office:value-type="float" office:value="157" calcext:value-type="float">
            <text:p>1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8]+1" office:value-type="float" office:value="158" calcext:value-type="float">
            <text:p>1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59]+1" office:value-type="float" office:value="159" calcext:value-type="float">
            <text:p>1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0]+1" office:value-type="float" office:value="160" calcext:value-type="float">
            <text:p>1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1]+1" office:value-type="float" office:value="161" calcext:value-type="float">
            <text:p>1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2]+1" office:value-type="float" office:value="162" calcext:value-type="float">
            <text:p>1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3]+1" office:value-type="float" office:value="163" calcext:value-type="float">
            <text:p>1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4]+1" office:value-type="float" office:value="164" calcext:value-type="float">
            <text:p>1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5]+1" office:value-type="float" office:value="165" calcext:value-type="float">
            <text:p>1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6]+1" office:value-type="float" office:value="166" calcext:value-type="float">
            <text:p>1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7]+1" office:value-type="float" office:value="167" calcext:value-type="float">
            <text:p>1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8]+1" office:value-type="float" office:value="168" calcext:value-type="float">
            <text:p>1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69]+1" office:value-type="float" office:value="169" calcext:value-type="float">
            <text:p>1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0]+1" office:value-type="float" office:value="170" calcext:value-type="float">
            <text:p>1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1]+1" office:value-type="float" office:value="171" calcext:value-type="float">
            <text:p>1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2]+1" office:value-type="float" office:value="172" calcext:value-type="float">
            <text:p>1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3]+1" office:value-type="float" office:value="173" calcext:value-type="float">
            <text:p>1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4]+1" office:value-type="float" office:value="174" calcext:value-type="float">
            <text:p>1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5]+1" office:value-type="float" office:value="175" calcext:value-type="float">
            <text:p>1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6]+1" office:value-type="float" office:value="176" calcext:value-type="float">
            <text:p>1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7]+1" office:value-type="float" office:value="177" calcext:value-type="float">
            <text:p>1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8]+1" office:value-type="float" office:value="178" calcext:value-type="float">
            <text:p>1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79]+1" office:value-type="float" office:value="179" calcext:value-type="float">
            <text:p>1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0]+1" office:value-type="float" office:value="180" calcext:value-type="float">
            <text:p>1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1]+1" office:value-type="float" office:value="181" calcext:value-type="float">
            <text:p>1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2]+1" office:value-type="float" office:value="182" calcext:value-type="float">
            <text:p>1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3]+1" office:value-type="float" office:value="183" calcext:value-type="float">
            <text:p>1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4]+1" office:value-type="float" office:value="184" calcext:value-type="float">
            <text:p>1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5]+1" office:value-type="float" office:value="185" calcext:value-type="float">
            <text:p>1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6]+1" office:value-type="float" office:value="186" calcext:value-type="float">
            <text:p>1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7]+1" office:value-type="float" office:value="187" calcext:value-type="float">
            <text:p>1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8]+1" office:value-type="float" office:value="188" calcext:value-type="float">
            <text:p>1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89]+1" office:value-type="float" office:value="189" calcext:value-type="float">
            <text:p>1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0]+1" office:value-type="float" office:value="190" calcext:value-type="float">
            <text:p>1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1]+1" office:value-type="float" office:value="191" calcext:value-type="float">
            <text:p>1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2]+1" office:value-type="float" office:value="192" calcext:value-type="float">
            <text:p>1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3]+1" office:value-type="float" office:value="193" calcext:value-type="float">
            <text:p>1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4]+1" office:value-type="float" office:value="194" calcext:value-type="float">
            <text:p>1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5]+1" office:value-type="float" office:value="195" calcext:value-type="float">
            <text:p>1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6]+1" office:value-type="float" office:value="196" calcext:value-type="float">
            <text:p>1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7]+1" office:value-type="float" office:value="197" calcext:value-type="float">
            <text:p>1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8]+1" office:value-type="float" office:value="198" calcext:value-type="float">
            <text:p>1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99]+1" office:value-type="float" office:value="199" calcext:value-type="float">
            <text:p>1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0]+1" office:value-type="float" office:value="200" calcext:value-type="float">
            <text:p>2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1]+1" office:value-type="float" office:value="201" calcext:value-type="float">
            <text:p>2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2]+1" office:value-type="float" office:value="202" calcext:value-type="float">
            <text:p>2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3]+1" office:value-type="float" office:value="203" calcext:value-type="float">
            <text:p>2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4]+1" office:value-type="float" office:value="204" calcext:value-type="float">
            <text:p>2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5]+1" office:value-type="float" office:value="205" calcext:value-type="float">
            <text:p>2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6]+1" office:value-type="float" office:value="206" calcext:value-type="float">
            <text:p>2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7]+1" office:value-type="float" office:value="207" calcext:value-type="float">
            <text:p>2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8]+1" office:value-type="float" office:value="208" calcext:value-type="float">
            <text:p>2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09]+1" office:value-type="float" office:value="209" calcext:value-type="float">
            <text:p>2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0]+1" office:value-type="float" office:value="210" calcext:value-type="float">
            <text:p>2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1]+1" office:value-type="float" office:value="211" calcext:value-type="float">
            <text:p>2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2]+1" office:value-type="float" office:value="212" calcext:value-type="float">
            <text:p>2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3]+1" office:value-type="float" office:value="213" calcext:value-type="float">
            <text:p>2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4]+1" office:value-type="float" office:value="214" calcext:value-type="float">
            <text:p>2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5]+1" office:value-type="float" office:value="215" calcext:value-type="float">
            <text:p>2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6]+1" office:value-type="float" office:value="216" calcext:value-type="float">
            <text:p>2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7]+1" office:value-type="float" office:value="217" calcext:value-type="float">
            <text:p>2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8]+1" office:value-type="float" office:value="218" calcext:value-type="float">
            <text:p>2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19]+1" office:value-type="float" office:value="219" calcext:value-type="float">
            <text:p>2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0]+1" office:value-type="float" office:value="220" calcext:value-type="float">
            <text:p>2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1]+1" office:value-type="float" office:value="221" calcext:value-type="float">
            <text:p>2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2]+1" office:value-type="float" office:value="222" calcext:value-type="float">
            <text:p>2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3]+1" office:value-type="float" office:value="223" calcext:value-type="float">
            <text:p>2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4]+1" office:value-type="float" office:value="224" calcext:value-type="float">
            <text:p>2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5]+1" office:value-type="float" office:value="225" calcext:value-type="float">
            <text:p>2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6]+1" office:value-type="float" office:value="226" calcext:value-type="float">
            <text:p>2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7]+1" office:value-type="float" office:value="227" calcext:value-type="float">
            <text:p>2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8]+1" office:value-type="float" office:value="228" calcext:value-type="float">
            <text:p>2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29]+1" office:value-type="float" office:value="229" calcext:value-type="float">
            <text:p>2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0]+1" office:value-type="float" office:value="230" calcext:value-type="float">
            <text:p>2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1]+1" office:value-type="float" office:value="231" calcext:value-type="float">
            <text:p>2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2]+1" office:value-type="float" office:value="232" calcext:value-type="float">
            <text:p>2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3]+1" office:value-type="float" office:value="233" calcext:value-type="float">
            <text:p>2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4]+1" office:value-type="float" office:value="234" calcext:value-type="float">
            <text:p>2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5]+1" office:value-type="float" office:value="235" calcext:value-type="float">
            <text:p>2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6]+1" office:value-type="float" office:value="236" calcext:value-type="float">
            <text:p>2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7]+1" office:value-type="float" office:value="237" calcext:value-type="float">
            <text:p>2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8]+1" office:value-type="float" office:value="238" calcext:value-type="float">
            <text:p>2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39]+1" office:value-type="float" office:value="239" calcext:value-type="float">
            <text:p>2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0]+1" office:value-type="float" office:value="240" calcext:value-type="float">
            <text:p>2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1]+1" office:value-type="float" office:value="241" calcext:value-type="float">
            <text:p>2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2]+1" office:value-type="float" office:value="242" calcext:value-type="float">
            <text:p>2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3]+1" office:value-type="float" office:value="243" calcext:value-type="float">
            <text:p>2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4]+1" office:value-type="float" office:value="244" calcext:value-type="float">
            <text:p>2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5]+1" office:value-type="float" office:value="245" calcext:value-type="float">
            <text:p>2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6]+1" office:value-type="float" office:value="246" calcext:value-type="float">
            <text:p>2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7]+1" office:value-type="float" office:value="247" calcext:value-type="float">
            <text:p>2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8]+1" office:value-type="float" office:value="248" calcext:value-type="float">
            <text:p>2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49]+1" office:value-type="float" office:value="249" calcext:value-type="float">
            <text:p>2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0]+1" office:value-type="float" office:value="250" calcext:value-type="float">
            <text:p>2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1]+1" office:value-type="float" office:value="251" calcext:value-type="float">
            <text:p>2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2]+1" office:value-type="float" office:value="252" calcext:value-type="float">
            <text:p>2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3]+1" office:value-type="float" office:value="253" calcext:value-type="float">
            <text:p>2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4]+1" office:value-type="float" office:value="254" calcext:value-type="float">
            <text:p>2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5]+1" office:value-type="float" office:value="255" calcext:value-type="float">
            <text:p>2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6]+1" office:value-type="float" office:value="256" calcext:value-type="float">
            <text:p>2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7]+1" office:value-type="float" office:value="257" calcext:value-type="float">
            <text:p>2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8]+1" office:value-type="float" office:value="258" calcext:value-type="float">
            <text:p>2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59]+1" office:value-type="float" office:value="259" calcext:value-type="float">
            <text:p>2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0]+1" office:value-type="float" office:value="260" calcext:value-type="float">
            <text:p>2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1]+1" office:value-type="float" office:value="261" calcext:value-type="float">
            <text:p>2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2]+1" office:value-type="float" office:value="262" calcext:value-type="float">
            <text:p>2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3]+1" office:value-type="float" office:value="263" calcext:value-type="float">
            <text:p>2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4]+1" office:value-type="float" office:value="264" calcext:value-type="float">
            <text:p>2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5]+1" office:value-type="float" office:value="265" calcext:value-type="float">
            <text:p>2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6]+1" office:value-type="float" office:value="266" calcext:value-type="float">
            <text:p>2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7]+1" office:value-type="float" office:value="267" calcext:value-type="float">
            <text:p>2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8]+1" office:value-type="float" office:value="268" calcext:value-type="float">
            <text:p>2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69]+1" office:value-type="float" office:value="269" calcext:value-type="float">
            <text:p>2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0]+1" office:value-type="float" office:value="270" calcext:value-type="float">
            <text:p>2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1]+1" office:value-type="float" office:value="271" calcext:value-type="float">
            <text:p>2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2]+1" office:value-type="float" office:value="272" calcext:value-type="float">
            <text:p>2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3]+1" office:value-type="float" office:value="273" calcext:value-type="float">
            <text:p>2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4]+1" office:value-type="float" office:value="274" calcext:value-type="float">
            <text:p>2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5]+1" office:value-type="float" office:value="275" calcext:value-type="float">
            <text:p>2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6]+1" office:value-type="float" office:value="276" calcext:value-type="float">
            <text:p>2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7]+1" office:value-type="float" office:value="277" calcext:value-type="float">
            <text:p>2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8]+1" office:value-type="float" office:value="278" calcext:value-type="float">
            <text:p>2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79]+1" office:value-type="float" office:value="279" calcext:value-type="float">
            <text:p>2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0]+1" office:value-type="float" office:value="280" calcext:value-type="float">
            <text:p>2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1]+1" office:value-type="float" office:value="281" calcext:value-type="float">
            <text:p>2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2]+1" office:value-type="float" office:value="282" calcext:value-type="float">
            <text:p>2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3]+1" office:value-type="float" office:value="283" calcext:value-type="float">
            <text:p>2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4]+1" office:value-type="float" office:value="284" calcext:value-type="float">
            <text:p>2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5]+1" office:value-type="float" office:value="285" calcext:value-type="float">
            <text:p>2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6]+1" office:value-type="float" office:value="286" calcext:value-type="float">
            <text:p>2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7]+1" office:value-type="float" office:value="287" calcext:value-type="float">
            <text:p>2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8]+1" office:value-type="float" office:value="288" calcext:value-type="float">
            <text:p>2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89]+1" office:value-type="float" office:value="289" calcext:value-type="float">
            <text:p>2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0]+1" office:value-type="float" office:value="290" calcext:value-type="float">
            <text:p>2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1]+1" office:value-type="float" office:value="291" calcext:value-type="float">
            <text:p>2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2]+1" office:value-type="float" office:value="292" calcext:value-type="float">
            <text:p>2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3]+1" office:value-type="float" office:value="293" calcext:value-type="float">
            <text:p>2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4]+1" office:value-type="float" office:value="294" calcext:value-type="float">
            <text:p>2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5]+1" office:value-type="float" office:value="295" calcext:value-type="float">
            <text:p>2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6]+1" office:value-type="float" office:value="296" calcext:value-type="float">
            <text:p>2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7]+1" office:value-type="float" office:value="297" calcext:value-type="float">
            <text:p>2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8]+1" office:value-type="float" office:value="298" calcext:value-type="float">
            <text:p>2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299]+1" office:value-type="float" office:value="299" calcext:value-type="float">
            <text:p>2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0]+1" office:value-type="float" office:value="300" calcext:value-type="float">
            <text:p>3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1]+1" office:value-type="float" office:value="301" calcext:value-type="float">
            <text:p>3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2]+1" office:value-type="float" office:value="302" calcext:value-type="float">
            <text:p>3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3]+1" office:value-type="float" office:value="303" calcext:value-type="float">
            <text:p>3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4]+1" office:value-type="float" office:value="304" calcext:value-type="float">
            <text:p>3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5]+1" office:value-type="float" office:value="305" calcext:value-type="float">
            <text:p>3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6]+1" office:value-type="float" office:value="306" calcext:value-type="float">
            <text:p>3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7]+1" office:value-type="float" office:value="307" calcext:value-type="float">
            <text:p>3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8]+1" office:value-type="float" office:value="308" calcext:value-type="float">
            <text:p>3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09]+1" office:value-type="float" office:value="309" calcext:value-type="float">
            <text:p>3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0]+1" office:value-type="float" office:value="310" calcext:value-type="float">
            <text:p>3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1]+1" office:value-type="float" office:value="311" calcext:value-type="float">
            <text:p>3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2]+1" office:value-type="float" office:value="312" calcext:value-type="float">
            <text:p>3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3]+1" office:value-type="float" office:value="313" calcext:value-type="float">
            <text:p>3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4]+1" office:value-type="float" office:value="314" calcext:value-type="float">
            <text:p>3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5]+1" office:value-type="float" office:value="315" calcext:value-type="float">
            <text:p>3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6]+1" office:value-type="float" office:value="316" calcext:value-type="float">
            <text:p>3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7]+1" office:value-type="float" office:value="317" calcext:value-type="float">
            <text:p>3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8]+1" office:value-type="float" office:value="318" calcext:value-type="float">
            <text:p>3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19]+1" office:value-type="float" office:value="319" calcext:value-type="float">
            <text:p>3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0]+1" office:value-type="float" office:value="320" calcext:value-type="float">
            <text:p>3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1]+1" office:value-type="float" office:value="321" calcext:value-type="float">
            <text:p>3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2]+1" office:value-type="float" office:value="322" calcext:value-type="float">
            <text:p>3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3]+1" office:value-type="float" office:value="323" calcext:value-type="float">
            <text:p>3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4]+1" office:value-type="float" office:value="324" calcext:value-type="float">
            <text:p>3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5]+1" office:value-type="float" office:value="325" calcext:value-type="float">
            <text:p>3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6]+1" office:value-type="float" office:value="326" calcext:value-type="float">
            <text:p>3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7]+1" office:value-type="float" office:value="327" calcext:value-type="float">
            <text:p>3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8]+1" office:value-type="float" office:value="328" calcext:value-type="float">
            <text:p>3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29]+1" office:value-type="float" office:value="329" calcext:value-type="float">
            <text:p>3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0]+1" office:value-type="float" office:value="330" calcext:value-type="float">
            <text:p>3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1]+1" office:value-type="float" office:value="331" calcext:value-type="float">
            <text:p>3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2]+1" office:value-type="float" office:value="332" calcext:value-type="float">
            <text:p>3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3]+1" office:value-type="float" office:value="333" calcext:value-type="float">
            <text:p>3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4]+1" office:value-type="float" office:value="334" calcext:value-type="float">
            <text:p>3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5]+1" office:value-type="float" office:value="335" calcext:value-type="float">
            <text:p>3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6]+1" office:value-type="float" office:value="336" calcext:value-type="float">
            <text:p>3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7]+1" office:value-type="float" office:value="337" calcext:value-type="float">
            <text:p>3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8]+1" office:value-type="float" office:value="338" calcext:value-type="float">
            <text:p>3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39]+1" office:value-type="float" office:value="339" calcext:value-type="float">
            <text:p>3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0]+1" office:value-type="float" office:value="340" calcext:value-type="float">
            <text:p>3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1]+1" office:value-type="float" office:value="341" calcext:value-type="float">
            <text:p>3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2]+1" office:value-type="float" office:value="342" calcext:value-type="float">
            <text:p>3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3]+1" office:value-type="float" office:value="343" calcext:value-type="float">
            <text:p>3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4]+1" office:value-type="float" office:value="344" calcext:value-type="float">
            <text:p>3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5]+1" office:value-type="float" office:value="345" calcext:value-type="float">
            <text:p>3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6]+1" office:value-type="float" office:value="346" calcext:value-type="float">
            <text:p>3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7]+1" office:value-type="float" office:value="347" calcext:value-type="float">
            <text:p>3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8]+1" office:value-type="float" office:value="348" calcext:value-type="float">
            <text:p>3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49]+1" office:value-type="float" office:value="349" calcext:value-type="float">
            <text:p>3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0]+1" office:value-type="float" office:value="350" calcext:value-type="float">
            <text:p>3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1]+1" office:value-type="float" office:value="351" calcext:value-type="float">
            <text:p>3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2]+1" office:value-type="float" office:value="352" calcext:value-type="float">
            <text:p>3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3]+1" office:value-type="float" office:value="353" calcext:value-type="float">
            <text:p>3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4]+1" office:value-type="float" office:value="354" calcext:value-type="float">
            <text:p>3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5]+1" office:value-type="float" office:value="355" calcext:value-type="float">
            <text:p>3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6]+1" office:value-type="float" office:value="356" calcext:value-type="float">
            <text:p>3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7]+1" office:value-type="float" office:value="357" calcext:value-type="float">
            <text:p>3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8]+1" office:value-type="float" office:value="358" calcext:value-type="float">
            <text:p>3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59]+1" office:value-type="float" office:value="359" calcext:value-type="float">
            <text:p>3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0]+1" office:value-type="float" office:value="360" calcext:value-type="float">
            <text:p>3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1]+1" office:value-type="float" office:value="361" calcext:value-type="float">
            <text:p>3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2]+1" office:value-type="float" office:value="362" calcext:value-type="float">
            <text:p>3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3]+1" office:value-type="float" office:value="363" calcext:value-type="float">
            <text:p>3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4]+1" office:value-type="float" office:value="364" calcext:value-type="float">
            <text:p>3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5]+1" office:value-type="float" office:value="365" calcext:value-type="float">
            <text:p>3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6]+1" office:value-type="float" office:value="366" calcext:value-type="float">
            <text:p>3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7]+1" office:value-type="float" office:value="367" calcext:value-type="float">
            <text:p>3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8]+1" office:value-type="float" office:value="368" calcext:value-type="float">
            <text:p>3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69]+1" office:value-type="float" office:value="369" calcext:value-type="float">
            <text:p>3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0]+1" office:value-type="float" office:value="370" calcext:value-type="float">
            <text:p>3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1]+1" office:value-type="float" office:value="371" calcext:value-type="float">
            <text:p>3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2]+1" office:value-type="float" office:value="372" calcext:value-type="float">
            <text:p>3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3]+1" office:value-type="float" office:value="373" calcext:value-type="float">
            <text:p>3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4]+1" office:value-type="float" office:value="374" calcext:value-type="float">
            <text:p>3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5]+1" office:value-type="float" office:value="375" calcext:value-type="float">
            <text:p>3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6]+1" office:value-type="float" office:value="376" calcext:value-type="float">
            <text:p>3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7]+1" office:value-type="float" office:value="377" calcext:value-type="float">
            <text:p>3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8]+1" office:value-type="float" office:value="378" calcext:value-type="float">
            <text:p>3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79]+1" office:value-type="float" office:value="379" calcext:value-type="float">
            <text:p>3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0]+1" office:value-type="float" office:value="380" calcext:value-type="float">
            <text:p>3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1]+1" office:value-type="float" office:value="381" calcext:value-type="float">
            <text:p>3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2]+1" office:value-type="float" office:value="382" calcext:value-type="float">
            <text:p>3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3]+1" office:value-type="float" office:value="383" calcext:value-type="float">
            <text:p>3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4]+1" office:value-type="float" office:value="384" calcext:value-type="float">
            <text:p>3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5]+1" office:value-type="float" office:value="385" calcext:value-type="float">
            <text:p>3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6]+1" office:value-type="float" office:value="386" calcext:value-type="float">
            <text:p>3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7]+1" office:value-type="float" office:value="387" calcext:value-type="float">
            <text:p>3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8]+1" office:value-type="float" office:value="388" calcext:value-type="float">
            <text:p>3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89]+1" office:value-type="float" office:value="389" calcext:value-type="float">
            <text:p>3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0]+1" office:value-type="float" office:value="390" calcext:value-type="float">
            <text:p>3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1]+1" office:value-type="float" office:value="391" calcext:value-type="float">
            <text:p>3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2]+1" office:value-type="float" office:value="392" calcext:value-type="float">
            <text:p>3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3]+1" office:value-type="float" office:value="393" calcext:value-type="float">
            <text:p>3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4]+1" office:value-type="float" office:value="394" calcext:value-type="float">
            <text:p>3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5]+1" office:value-type="float" office:value="395" calcext:value-type="float">
            <text:p>3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6]+1" office:value-type="float" office:value="396" calcext:value-type="float">
            <text:p>3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7]+1" office:value-type="float" office:value="397" calcext:value-type="float">
            <text:p>3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8]+1" office:value-type="float" office:value="398" calcext:value-type="float">
            <text:p>3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399]+1" office:value-type="float" office:value="399" calcext:value-type="float">
            <text:p>3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0]+1" office:value-type="float" office:value="400" calcext:value-type="float">
            <text:p>4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1]+1" office:value-type="float" office:value="401" calcext:value-type="float">
            <text:p>4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2]+1" office:value-type="float" office:value="402" calcext:value-type="float">
            <text:p>4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3]+1" office:value-type="float" office:value="403" calcext:value-type="float">
            <text:p>4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4]+1" office:value-type="float" office:value="404" calcext:value-type="float">
            <text:p>4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5]+1" office:value-type="float" office:value="405" calcext:value-type="float">
            <text:p>4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6]+1" office:value-type="float" office:value="406" calcext:value-type="float">
            <text:p>4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7]+1" office:value-type="float" office:value="407" calcext:value-type="float">
            <text:p>4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8]+1" office:value-type="float" office:value="408" calcext:value-type="float">
            <text:p>4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09]+1" office:value-type="float" office:value="409" calcext:value-type="float">
            <text:p>4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0]+1" office:value-type="float" office:value="410" calcext:value-type="float">
            <text:p>4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1]+1" office:value-type="float" office:value="411" calcext:value-type="float">
            <text:p>4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2]+1" office:value-type="float" office:value="412" calcext:value-type="float">
            <text:p>4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3]+1" office:value-type="float" office:value="413" calcext:value-type="float">
            <text:p>4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4]+1" office:value-type="float" office:value="414" calcext:value-type="float">
            <text:p>4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5]+1" office:value-type="float" office:value="415" calcext:value-type="float">
            <text:p>4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6]+1" office:value-type="float" office:value="416" calcext:value-type="float">
            <text:p>4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7]+1" office:value-type="float" office:value="417" calcext:value-type="float">
            <text:p>4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8]+1" office:value-type="float" office:value="418" calcext:value-type="float">
            <text:p>4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19]+1" office:value-type="float" office:value="419" calcext:value-type="float">
            <text:p>4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0]+1" office:value-type="float" office:value="420" calcext:value-type="float">
            <text:p>4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1]+1" office:value-type="float" office:value="421" calcext:value-type="float">
            <text:p>4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2]+1" office:value-type="float" office:value="422" calcext:value-type="float">
            <text:p>4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3]+1" office:value-type="float" office:value="423" calcext:value-type="float">
            <text:p>4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4]+1" office:value-type="float" office:value="424" calcext:value-type="float">
            <text:p>4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5]+1" office:value-type="float" office:value="425" calcext:value-type="float">
            <text:p>4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6]+1" office:value-type="float" office:value="426" calcext:value-type="float">
            <text:p>4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7]+1" office:value-type="float" office:value="427" calcext:value-type="float">
            <text:p>4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8]+1" office:value-type="float" office:value="428" calcext:value-type="float">
            <text:p>4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29]+1" office:value-type="float" office:value="429" calcext:value-type="float">
            <text:p>4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0]+1" office:value-type="float" office:value="430" calcext:value-type="float">
            <text:p>4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1]+1" office:value-type="float" office:value="431" calcext:value-type="float">
            <text:p>4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2]+1" office:value-type="float" office:value="432" calcext:value-type="float">
            <text:p>4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3]+1" office:value-type="float" office:value="433" calcext:value-type="float">
            <text:p>4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4]+1" office:value-type="float" office:value="434" calcext:value-type="float">
            <text:p>4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5]+1" office:value-type="float" office:value="435" calcext:value-type="float">
            <text:p>4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6]+1" office:value-type="float" office:value="436" calcext:value-type="float">
            <text:p>4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7]+1" office:value-type="float" office:value="437" calcext:value-type="float">
            <text:p>4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8]+1" office:value-type="float" office:value="438" calcext:value-type="float">
            <text:p>4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39]+1" office:value-type="float" office:value="439" calcext:value-type="float">
            <text:p>4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0]+1" office:value-type="float" office:value="440" calcext:value-type="float">
            <text:p>4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1]+1" office:value-type="float" office:value="441" calcext:value-type="float">
            <text:p>4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2]+1" office:value-type="float" office:value="442" calcext:value-type="float">
            <text:p>4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3]+1" office:value-type="float" office:value="443" calcext:value-type="float">
            <text:p>4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4]+1" office:value-type="float" office:value="444" calcext:value-type="float">
            <text:p>4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5]+1" office:value-type="float" office:value="445" calcext:value-type="float">
            <text:p>4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6]+1" office:value-type="float" office:value="446" calcext:value-type="float">
            <text:p>4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7]+1" office:value-type="float" office:value="447" calcext:value-type="float">
            <text:p>4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8]+1" office:value-type="float" office:value="448" calcext:value-type="float">
            <text:p>4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49]+1" office:value-type="float" office:value="449" calcext:value-type="float">
            <text:p>4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0]+1" office:value-type="float" office:value="450" calcext:value-type="float">
            <text:p>4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1]+1" office:value-type="float" office:value="451" calcext:value-type="float">
            <text:p>4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2]+1" office:value-type="float" office:value="452" calcext:value-type="float">
            <text:p>4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3]+1" office:value-type="float" office:value="453" calcext:value-type="float">
            <text:p>4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4]+1" office:value-type="float" office:value="454" calcext:value-type="float">
            <text:p>4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5]+1" office:value-type="float" office:value="455" calcext:value-type="float">
            <text:p>4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6]+1" office:value-type="float" office:value="456" calcext:value-type="float">
            <text:p>4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7]+1" office:value-type="float" office:value="457" calcext:value-type="float">
            <text:p>4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8]+1" office:value-type="float" office:value="458" calcext:value-type="float">
            <text:p>4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59]+1" office:value-type="float" office:value="459" calcext:value-type="float">
            <text:p>4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0]+1" office:value-type="float" office:value="460" calcext:value-type="float">
            <text:p>4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1]+1" office:value-type="float" office:value="461" calcext:value-type="float">
            <text:p>4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2]+1" office:value-type="float" office:value="462" calcext:value-type="float">
            <text:p>4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3]+1" office:value-type="float" office:value="463" calcext:value-type="float">
            <text:p>4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4]+1" office:value-type="float" office:value="464" calcext:value-type="float">
            <text:p>4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5]+1" office:value-type="float" office:value="465" calcext:value-type="float">
            <text:p>4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6]+1" office:value-type="float" office:value="466" calcext:value-type="float">
            <text:p>4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7]+1" office:value-type="float" office:value="467" calcext:value-type="float">
            <text:p>4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8]+1" office:value-type="float" office:value="468" calcext:value-type="float">
            <text:p>4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69]+1" office:value-type="float" office:value="469" calcext:value-type="float">
            <text:p>4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0]+1" office:value-type="float" office:value="470" calcext:value-type="float">
            <text:p>4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1]+1" office:value-type="float" office:value="471" calcext:value-type="float">
            <text:p>4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2]+1" office:value-type="float" office:value="472" calcext:value-type="float">
            <text:p>4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3]+1" office:value-type="float" office:value="473" calcext:value-type="float">
            <text:p>4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4]+1" office:value-type="float" office:value="474" calcext:value-type="float">
            <text:p>4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5]+1" office:value-type="float" office:value="475" calcext:value-type="float">
            <text:p>4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6]+1" office:value-type="float" office:value="476" calcext:value-type="float">
            <text:p>4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7]+1" office:value-type="float" office:value="477" calcext:value-type="float">
            <text:p>4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8]+1" office:value-type="float" office:value="478" calcext:value-type="float">
            <text:p>4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79]+1" office:value-type="float" office:value="479" calcext:value-type="float">
            <text:p>4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0]+1" office:value-type="float" office:value="480" calcext:value-type="float">
            <text:p>4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1]+1" office:value-type="float" office:value="481" calcext:value-type="float">
            <text:p>4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2]+1" office:value-type="float" office:value="482" calcext:value-type="float">
            <text:p>4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3]+1" office:value-type="float" office:value="483" calcext:value-type="float">
            <text:p>4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4]+1" office:value-type="float" office:value="484" calcext:value-type="float">
            <text:p>4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5]+1" office:value-type="float" office:value="485" calcext:value-type="float">
            <text:p>4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6]+1" office:value-type="float" office:value="486" calcext:value-type="float">
            <text:p>4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7]+1" office:value-type="float" office:value="487" calcext:value-type="float">
            <text:p>4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8]+1" office:value-type="float" office:value="488" calcext:value-type="float">
            <text:p>4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89]+1" office:value-type="float" office:value="489" calcext:value-type="float">
            <text:p>4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0]+1" office:value-type="float" office:value="490" calcext:value-type="float">
            <text:p>4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1]+1" office:value-type="float" office:value="491" calcext:value-type="float">
            <text:p>4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2]+1" office:value-type="float" office:value="492" calcext:value-type="float">
            <text:p>4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3]+1" office:value-type="float" office:value="493" calcext:value-type="float">
            <text:p>4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4]+1" office:value-type="float" office:value="494" calcext:value-type="float">
            <text:p>4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5]+1" office:value-type="float" office:value="495" calcext:value-type="float">
            <text:p>4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6]+1" office:value-type="float" office:value="496" calcext:value-type="float">
            <text:p>4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7]+1" office:value-type="float" office:value="497" calcext:value-type="float">
            <text:p>4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8]+1" office:value-type="float" office:value="498" calcext:value-type="float">
            <text:p>4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499]+1" office:value-type="float" office:value="499" calcext:value-type="float">
            <text:p>4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0]+1" office:value-type="float" office:value="500" calcext:value-type="float">
            <text:p>5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1]+1" office:value-type="float" office:value="501" calcext:value-type="float">
            <text:p>5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2]+1" office:value-type="float" office:value="502" calcext:value-type="float">
            <text:p>5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3]+1" office:value-type="float" office:value="503" calcext:value-type="float">
            <text:p>5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4]+1" office:value-type="float" office:value="504" calcext:value-type="float">
            <text:p>5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5]+1" office:value-type="float" office:value="505" calcext:value-type="float">
            <text:p>5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6]+1" office:value-type="float" office:value="506" calcext:value-type="float">
            <text:p>5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7]+1" office:value-type="float" office:value="507" calcext:value-type="float">
            <text:p>5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8]+1" office:value-type="float" office:value="508" calcext:value-type="float">
            <text:p>5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09]+1" office:value-type="float" office:value="509" calcext:value-type="float">
            <text:p>5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0]+1" office:value-type="float" office:value="510" calcext:value-type="float">
            <text:p>5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1]+1" office:value-type="float" office:value="511" calcext:value-type="float">
            <text:p>5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2]+1" office:value-type="float" office:value="512" calcext:value-type="float">
            <text:p>5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3]+1" office:value-type="float" office:value="513" calcext:value-type="float">
            <text:p>5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4]+1" office:value-type="float" office:value="514" calcext:value-type="float">
            <text:p>5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5]+1" office:value-type="float" office:value="515" calcext:value-type="float">
            <text:p>5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6]+1" office:value-type="float" office:value="516" calcext:value-type="float">
            <text:p>5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7]+1" office:value-type="float" office:value="517" calcext:value-type="float">
            <text:p>5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8]+1" office:value-type="float" office:value="518" calcext:value-type="float">
            <text:p>5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19]+1" office:value-type="float" office:value="519" calcext:value-type="float">
            <text:p>5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0]+1" office:value-type="float" office:value="520" calcext:value-type="float">
            <text:p>5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1]+1" office:value-type="float" office:value="521" calcext:value-type="float">
            <text:p>5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2]+1" office:value-type="float" office:value="522" calcext:value-type="float">
            <text:p>5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3]+1" office:value-type="float" office:value="523" calcext:value-type="float">
            <text:p>5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4]+1" office:value-type="float" office:value="524" calcext:value-type="float">
            <text:p>5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5]+1" office:value-type="float" office:value="525" calcext:value-type="float">
            <text:p>5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6]+1" office:value-type="float" office:value="526" calcext:value-type="float">
            <text:p>5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7]+1" office:value-type="float" office:value="527" calcext:value-type="float">
            <text:p>5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8]+1" office:value-type="float" office:value="528" calcext:value-type="float">
            <text:p>5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29]+1" office:value-type="float" office:value="529" calcext:value-type="float">
            <text:p>5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0]+1" office:value-type="float" office:value="530" calcext:value-type="float">
            <text:p>5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1]+1" office:value-type="float" office:value="531" calcext:value-type="float">
            <text:p>5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2]+1" office:value-type="float" office:value="532" calcext:value-type="float">
            <text:p>5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3]+1" office:value-type="float" office:value="533" calcext:value-type="float">
            <text:p>5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4]+1" office:value-type="float" office:value="534" calcext:value-type="float">
            <text:p>5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5]+1" office:value-type="float" office:value="535" calcext:value-type="float">
            <text:p>5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6]+1" office:value-type="float" office:value="536" calcext:value-type="float">
            <text:p>5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7]+1" office:value-type="float" office:value="537" calcext:value-type="float">
            <text:p>5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8]+1" office:value-type="float" office:value="538" calcext:value-type="float">
            <text:p>5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39]+1" office:value-type="float" office:value="539" calcext:value-type="float">
            <text:p>5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0]+1" office:value-type="float" office:value="540" calcext:value-type="float">
            <text:p>5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1]+1" office:value-type="float" office:value="541" calcext:value-type="float">
            <text:p>5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2]+1" office:value-type="float" office:value="542" calcext:value-type="float">
            <text:p>5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3]+1" office:value-type="float" office:value="543" calcext:value-type="float">
            <text:p>5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4]+1" office:value-type="float" office:value="544" calcext:value-type="float">
            <text:p>5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5]+1" office:value-type="float" office:value="545" calcext:value-type="float">
            <text:p>5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6]+1" office:value-type="float" office:value="546" calcext:value-type="float">
            <text:p>5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7]+1" office:value-type="float" office:value="547" calcext:value-type="float">
            <text:p>5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8]+1" office:value-type="float" office:value="548" calcext:value-type="float">
            <text:p>5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49]+1" office:value-type="float" office:value="549" calcext:value-type="float">
            <text:p>5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0]+1" office:value-type="float" office:value="550" calcext:value-type="float">
            <text:p>5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1]+1" office:value-type="float" office:value="551" calcext:value-type="float">
            <text:p>5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2]+1" office:value-type="float" office:value="552" calcext:value-type="float">
            <text:p>5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3]+1" office:value-type="float" office:value="553" calcext:value-type="float">
            <text:p>5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4]+1" office:value-type="float" office:value="554" calcext:value-type="float">
            <text:p>5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5]+1" office:value-type="float" office:value="555" calcext:value-type="float">
            <text:p>5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6]+1" office:value-type="float" office:value="556" calcext:value-type="float">
            <text:p>5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7]+1" office:value-type="float" office:value="557" calcext:value-type="float">
            <text:p>5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8]+1" office:value-type="float" office:value="558" calcext:value-type="float">
            <text:p>5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59]+1" office:value-type="float" office:value="559" calcext:value-type="float">
            <text:p>5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0]+1" office:value-type="float" office:value="560" calcext:value-type="float">
            <text:p>5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1]+1" office:value-type="float" office:value="561" calcext:value-type="float">
            <text:p>5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2]+1" office:value-type="float" office:value="562" calcext:value-type="float">
            <text:p>5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3]+1" office:value-type="float" office:value="563" calcext:value-type="float">
            <text:p>5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4]+1" office:value-type="float" office:value="564" calcext:value-type="float">
            <text:p>5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5]+1" office:value-type="float" office:value="565" calcext:value-type="float">
            <text:p>5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6]+1" office:value-type="float" office:value="566" calcext:value-type="float">
            <text:p>5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7]+1" office:value-type="float" office:value="567" calcext:value-type="float">
            <text:p>5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8]+1" office:value-type="float" office:value="568" calcext:value-type="float">
            <text:p>5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69]+1" office:value-type="float" office:value="569" calcext:value-type="float">
            <text:p>5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0]+1" office:value-type="float" office:value="570" calcext:value-type="float">
            <text:p>5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1]+1" office:value-type="float" office:value="571" calcext:value-type="float">
            <text:p>5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2]+1" office:value-type="float" office:value="572" calcext:value-type="float">
            <text:p>5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3]+1" office:value-type="float" office:value="573" calcext:value-type="float">
            <text:p>5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4]+1" office:value-type="float" office:value="574" calcext:value-type="float">
            <text:p>5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5]+1" office:value-type="float" office:value="575" calcext:value-type="float">
            <text:p>5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6]+1" office:value-type="float" office:value="576" calcext:value-type="float">
            <text:p>5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7]+1" office:value-type="float" office:value="577" calcext:value-type="float">
            <text:p>5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8]+1" office:value-type="float" office:value="578" calcext:value-type="float">
            <text:p>5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79]+1" office:value-type="float" office:value="579" calcext:value-type="float">
            <text:p>5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0]+1" office:value-type="float" office:value="580" calcext:value-type="float">
            <text:p>5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1]+1" office:value-type="float" office:value="581" calcext:value-type="float">
            <text:p>5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2]+1" office:value-type="float" office:value="582" calcext:value-type="float">
            <text:p>5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3]+1" office:value-type="float" office:value="583" calcext:value-type="float">
            <text:p>5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4]+1" office:value-type="float" office:value="584" calcext:value-type="float">
            <text:p>5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5]+1" office:value-type="float" office:value="585" calcext:value-type="float">
            <text:p>5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6]+1" office:value-type="float" office:value="586" calcext:value-type="float">
            <text:p>5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7]+1" office:value-type="float" office:value="587" calcext:value-type="float">
            <text:p>5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8]+1" office:value-type="float" office:value="588" calcext:value-type="float">
            <text:p>5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89]+1" office:value-type="float" office:value="589" calcext:value-type="float">
            <text:p>5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0]+1" office:value-type="float" office:value="590" calcext:value-type="float">
            <text:p>5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1]+1" office:value-type="float" office:value="591" calcext:value-type="float">
            <text:p>5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2]+1" office:value-type="float" office:value="592" calcext:value-type="float">
            <text:p>5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3]+1" office:value-type="float" office:value="593" calcext:value-type="float">
            <text:p>5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4]+1" office:value-type="float" office:value="594" calcext:value-type="float">
            <text:p>5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5]+1" office:value-type="float" office:value="595" calcext:value-type="float">
            <text:p>5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6]+1" office:value-type="float" office:value="596" calcext:value-type="float">
            <text:p>5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7]+1" office:value-type="float" office:value="597" calcext:value-type="float">
            <text:p>5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8]+1" office:value-type="float" office:value="598" calcext:value-type="float">
            <text:p>5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599]+1" office:value-type="float" office:value="599" calcext:value-type="float">
            <text:p>5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0]+1" office:value-type="float" office:value="600" calcext:value-type="float">
            <text:p>6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1]+1" office:value-type="float" office:value="601" calcext:value-type="float">
            <text:p>6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2]+1" office:value-type="float" office:value="602" calcext:value-type="float">
            <text:p>6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3]+1" office:value-type="float" office:value="603" calcext:value-type="float">
            <text:p>6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4]+1" office:value-type="float" office:value="604" calcext:value-type="float">
            <text:p>6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5]+1" office:value-type="float" office:value="605" calcext:value-type="float">
            <text:p>6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6]+1" office:value-type="float" office:value="606" calcext:value-type="float">
            <text:p>6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7]+1" office:value-type="float" office:value="607" calcext:value-type="float">
            <text:p>6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8]+1" office:value-type="float" office:value="608" calcext:value-type="float">
            <text:p>6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09]+1" office:value-type="float" office:value="609" calcext:value-type="float">
            <text:p>6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0]+1" office:value-type="float" office:value="610" calcext:value-type="float">
            <text:p>6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1]+1" office:value-type="float" office:value="611" calcext:value-type="float">
            <text:p>6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2]+1" office:value-type="float" office:value="612" calcext:value-type="float">
            <text:p>6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3]+1" office:value-type="float" office:value="613" calcext:value-type="float">
            <text:p>6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4]+1" office:value-type="float" office:value="614" calcext:value-type="float">
            <text:p>6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5]+1" office:value-type="float" office:value="615" calcext:value-type="float">
            <text:p>6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6]+1" office:value-type="float" office:value="616" calcext:value-type="float">
            <text:p>6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7]+1" office:value-type="float" office:value="617" calcext:value-type="float">
            <text:p>6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8]+1" office:value-type="float" office:value="618" calcext:value-type="float">
            <text:p>6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19]+1" office:value-type="float" office:value="619" calcext:value-type="float">
            <text:p>6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0]+1" office:value-type="float" office:value="620" calcext:value-type="float">
            <text:p>6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1]+1" office:value-type="float" office:value="621" calcext:value-type="float">
            <text:p>6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2]+1" office:value-type="float" office:value="622" calcext:value-type="float">
            <text:p>6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3]+1" office:value-type="float" office:value="623" calcext:value-type="float">
            <text:p>6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4]+1" office:value-type="float" office:value="624" calcext:value-type="float">
            <text:p>6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5]+1" office:value-type="float" office:value="625" calcext:value-type="float">
            <text:p>6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6]+1" office:value-type="float" office:value="626" calcext:value-type="float">
            <text:p>6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7]+1" office:value-type="float" office:value="627" calcext:value-type="float">
            <text:p>6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8]+1" office:value-type="float" office:value="628" calcext:value-type="float">
            <text:p>6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29]+1" office:value-type="float" office:value="629" calcext:value-type="float">
            <text:p>6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0]+1" office:value-type="float" office:value="630" calcext:value-type="float">
            <text:p>6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1]+1" office:value-type="float" office:value="631" calcext:value-type="float">
            <text:p>6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2]+1" office:value-type="float" office:value="632" calcext:value-type="float">
            <text:p>6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3]+1" office:value-type="float" office:value="633" calcext:value-type="float">
            <text:p>6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4]+1" office:value-type="float" office:value="634" calcext:value-type="float">
            <text:p>6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5]+1" office:value-type="float" office:value="635" calcext:value-type="float">
            <text:p>6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6]+1" office:value-type="float" office:value="636" calcext:value-type="float">
            <text:p>6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7]+1" office:value-type="float" office:value="637" calcext:value-type="float">
            <text:p>6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8]+1" office:value-type="float" office:value="638" calcext:value-type="float">
            <text:p>6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39]+1" office:value-type="float" office:value="639" calcext:value-type="float">
            <text:p>6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0]+1" office:value-type="float" office:value="640" calcext:value-type="float">
            <text:p>6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1]+1" office:value-type="float" office:value="641" calcext:value-type="float">
            <text:p>6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2]+1" office:value-type="float" office:value="642" calcext:value-type="float">
            <text:p>6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3]+1" office:value-type="float" office:value="643" calcext:value-type="float">
            <text:p>6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4]+1" office:value-type="float" office:value="644" calcext:value-type="float">
            <text:p>6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5]+1" office:value-type="float" office:value="645" calcext:value-type="float">
            <text:p>6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6]+1" office:value-type="float" office:value="646" calcext:value-type="float">
            <text:p>6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7]+1" office:value-type="float" office:value="647" calcext:value-type="float">
            <text:p>6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8]+1" office:value-type="float" office:value="648" calcext:value-type="float">
            <text:p>6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49]+1" office:value-type="float" office:value="649" calcext:value-type="float">
            <text:p>6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0]+1" office:value-type="float" office:value="650" calcext:value-type="float">
            <text:p>6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1]+1" office:value-type="float" office:value="651" calcext:value-type="float">
            <text:p>6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2]+1" office:value-type="float" office:value="652" calcext:value-type="float">
            <text:p>6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3]+1" office:value-type="float" office:value="653" calcext:value-type="float">
            <text:p>6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4]+1" office:value-type="float" office:value="654" calcext:value-type="float">
            <text:p>6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5]+1" office:value-type="float" office:value="655" calcext:value-type="float">
            <text:p>6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6]+1" office:value-type="float" office:value="656" calcext:value-type="float">
            <text:p>6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7]+1" office:value-type="float" office:value="657" calcext:value-type="float">
            <text:p>6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8]+1" office:value-type="float" office:value="658" calcext:value-type="float">
            <text:p>6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59]+1" office:value-type="float" office:value="659" calcext:value-type="float">
            <text:p>6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0]+1" office:value-type="float" office:value="660" calcext:value-type="float">
            <text:p>6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1]+1" office:value-type="float" office:value="661" calcext:value-type="float">
            <text:p>6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2]+1" office:value-type="float" office:value="662" calcext:value-type="float">
            <text:p>6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3]+1" office:value-type="float" office:value="663" calcext:value-type="float">
            <text:p>6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4]+1" office:value-type="float" office:value="664" calcext:value-type="float">
            <text:p>6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5]+1" office:value-type="float" office:value="665" calcext:value-type="float">
            <text:p>6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6]+1" office:value-type="float" office:value="666" calcext:value-type="float">
            <text:p>6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7]+1" office:value-type="float" office:value="667" calcext:value-type="float">
            <text:p>6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8]+1" office:value-type="float" office:value="668" calcext:value-type="float">
            <text:p>6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69]+1" office:value-type="float" office:value="669" calcext:value-type="float">
            <text:p>6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0]+1" office:value-type="float" office:value="670" calcext:value-type="float">
            <text:p>6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1]+1" office:value-type="float" office:value="671" calcext:value-type="float">
            <text:p>6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2]+1" office:value-type="float" office:value="672" calcext:value-type="float">
            <text:p>6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3]+1" office:value-type="float" office:value="673" calcext:value-type="float">
            <text:p>6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4]+1" office:value-type="float" office:value="674" calcext:value-type="float">
            <text:p>6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5]+1" office:value-type="float" office:value="675" calcext:value-type="float">
            <text:p>6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6]+1" office:value-type="float" office:value="676" calcext:value-type="float">
            <text:p>6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7]+1" office:value-type="float" office:value="677" calcext:value-type="float">
            <text:p>6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8]+1" office:value-type="float" office:value="678" calcext:value-type="float">
            <text:p>6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79]+1" office:value-type="float" office:value="679" calcext:value-type="float">
            <text:p>6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0]+1" office:value-type="float" office:value="680" calcext:value-type="float">
            <text:p>6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1]+1" office:value-type="float" office:value="681" calcext:value-type="float">
            <text:p>6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2]+1" office:value-type="float" office:value="682" calcext:value-type="float">
            <text:p>6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3]+1" office:value-type="float" office:value="683" calcext:value-type="float">
            <text:p>6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4]+1" office:value-type="float" office:value="684" calcext:value-type="float">
            <text:p>6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5]+1" office:value-type="float" office:value="685" calcext:value-type="float">
            <text:p>6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6]+1" office:value-type="float" office:value="686" calcext:value-type="float">
            <text:p>6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7]+1" office:value-type="float" office:value="687" calcext:value-type="float">
            <text:p>6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8]+1" office:value-type="float" office:value="688" calcext:value-type="float">
            <text:p>6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89]+1" office:value-type="float" office:value="689" calcext:value-type="float">
            <text:p>6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0]+1" office:value-type="float" office:value="690" calcext:value-type="float">
            <text:p>6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1]+1" office:value-type="float" office:value="691" calcext:value-type="float">
            <text:p>6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2]+1" office:value-type="float" office:value="692" calcext:value-type="float">
            <text:p>6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3]+1" office:value-type="float" office:value="693" calcext:value-type="float">
            <text:p>6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4]+1" office:value-type="float" office:value="694" calcext:value-type="float">
            <text:p>6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5]+1" office:value-type="float" office:value="695" calcext:value-type="float">
            <text:p>6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6]+1" office:value-type="float" office:value="696" calcext:value-type="float">
            <text:p>6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7]+1" office:value-type="float" office:value="697" calcext:value-type="float">
            <text:p>6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8]+1" office:value-type="float" office:value="698" calcext:value-type="float">
            <text:p>6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699]+1" office:value-type="float" office:value="699" calcext:value-type="float">
            <text:p>6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0]+1" office:value-type="float" office:value="700" calcext:value-type="float">
            <text:p>7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1]+1" office:value-type="float" office:value="701" calcext:value-type="float">
            <text:p>7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2]+1" office:value-type="float" office:value="702" calcext:value-type="float">
            <text:p>7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3]+1" office:value-type="float" office:value="703" calcext:value-type="float">
            <text:p>7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4]+1" office:value-type="float" office:value="704" calcext:value-type="float">
            <text:p>7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5]+1" office:value-type="float" office:value="705" calcext:value-type="float">
            <text:p>7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6]+1" office:value-type="float" office:value="706" calcext:value-type="float">
            <text:p>7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7]+1" office:value-type="float" office:value="707" calcext:value-type="float">
            <text:p>7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8]+1" office:value-type="float" office:value="708" calcext:value-type="float">
            <text:p>7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09]+1" office:value-type="float" office:value="709" calcext:value-type="float">
            <text:p>7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0]+1" office:value-type="float" office:value="710" calcext:value-type="float">
            <text:p>7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1]+1" office:value-type="float" office:value="711" calcext:value-type="float">
            <text:p>7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2]+1" office:value-type="float" office:value="712" calcext:value-type="float">
            <text:p>7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3]+1" office:value-type="float" office:value="713" calcext:value-type="float">
            <text:p>7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4]+1" office:value-type="float" office:value="714" calcext:value-type="float">
            <text:p>7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5]+1" office:value-type="float" office:value="715" calcext:value-type="float">
            <text:p>7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6]+1" office:value-type="float" office:value="716" calcext:value-type="float">
            <text:p>7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7]+1" office:value-type="float" office:value="717" calcext:value-type="float">
            <text:p>7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8]+1" office:value-type="float" office:value="718" calcext:value-type="float">
            <text:p>7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19]+1" office:value-type="float" office:value="719" calcext:value-type="float">
            <text:p>7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0]+1" office:value-type="float" office:value="720" calcext:value-type="float">
            <text:p>7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1]+1" office:value-type="float" office:value="721" calcext:value-type="float">
            <text:p>7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2]+1" office:value-type="float" office:value="722" calcext:value-type="float">
            <text:p>7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3]+1" office:value-type="float" office:value="723" calcext:value-type="float">
            <text:p>7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4]+1" office:value-type="float" office:value="724" calcext:value-type="float">
            <text:p>7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5]+1" office:value-type="float" office:value="725" calcext:value-type="float">
            <text:p>7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6]+1" office:value-type="float" office:value="726" calcext:value-type="float">
            <text:p>7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7]+1" office:value-type="float" office:value="727" calcext:value-type="float">
            <text:p>7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8]+1" office:value-type="float" office:value="728" calcext:value-type="float">
            <text:p>7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29]+1" office:value-type="float" office:value="729" calcext:value-type="float">
            <text:p>7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0]+1" office:value-type="float" office:value="730" calcext:value-type="float">
            <text:p>7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1]+1" office:value-type="float" office:value="731" calcext:value-type="float">
            <text:p>7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2]+1" office:value-type="float" office:value="732" calcext:value-type="float">
            <text:p>7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3]+1" office:value-type="float" office:value="733" calcext:value-type="float">
            <text:p>7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4]+1" office:value-type="float" office:value="734" calcext:value-type="float">
            <text:p>7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5]+1" office:value-type="float" office:value="735" calcext:value-type="float">
            <text:p>7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6]+1" office:value-type="float" office:value="736" calcext:value-type="float">
            <text:p>7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7]+1" office:value-type="float" office:value="737" calcext:value-type="float">
            <text:p>7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8]+1" office:value-type="float" office:value="738" calcext:value-type="float">
            <text:p>7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39]+1" office:value-type="float" office:value="739" calcext:value-type="float">
            <text:p>7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0]+1" office:value-type="float" office:value="740" calcext:value-type="float">
            <text:p>7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1]+1" office:value-type="float" office:value="741" calcext:value-type="float">
            <text:p>7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2]+1" office:value-type="float" office:value="742" calcext:value-type="float">
            <text:p>7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3]+1" office:value-type="float" office:value="743" calcext:value-type="float">
            <text:p>7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4]+1" office:value-type="float" office:value="744" calcext:value-type="float">
            <text:p>7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5]+1" office:value-type="float" office:value="745" calcext:value-type="float">
            <text:p>7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6]+1" office:value-type="float" office:value="746" calcext:value-type="float">
            <text:p>7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7]+1" office:value-type="float" office:value="747" calcext:value-type="float">
            <text:p>7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8]+1" office:value-type="float" office:value="748" calcext:value-type="float">
            <text:p>7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49]+1" office:value-type="float" office:value="749" calcext:value-type="float">
            <text:p>7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0]+1" office:value-type="float" office:value="750" calcext:value-type="float">
            <text:p>7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1]+1" office:value-type="float" office:value="751" calcext:value-type="float">
            <text:p>7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2]+1" office:value-type="float" office:value="752" calcext:value-type="float">
            <text:p>7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3]+1" office:value-type="float" office:value="753" calcext:value-type="float">
            <text:p>7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4]+1" office:value-type="float" office:value="754" calcext:value-type="float">
            <text:p>7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5]+1" office:value-type="float" office:value="755" calcext:value-type="float">
            <text:p>7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6]+1" office:value-type="float" office:value="756" calcext:value-type="float">
            <text:p>7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7]+1" office:value-type="float" office:value="757" calcext:value-type="float">
            <text:p>7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8]+1" office:value-type="float" office:value="758" calcext:value-type="float">
            <text:p>7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59]+1" office:value-type="float" office:value="759" calcext:value-type="float">
            <text:p>7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0]+1" office:value-type="float" office:value="760" calcext:value-type="float">
            <text:p>7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1]+1" office:value-type="float" office:value="761" calcext:value-type="float">
            <text:p>7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2]+1" office:value-type="float" office:value="762" calcext:value-type="float">
            <text:p>7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3]+1" office:value-type="float" office:value="763" calcext:value-type="float">
            <text:p>7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4]+1" office:value-type="float" office:value="764" calcext:value-type="float">
            <text:p>7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5]+1" office:value-type="float" office:value="765" calcext:value-type="float">
            <text:p>7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6]+1" office:value-type="float" office:value="766" calcext:value-type="float">
            <text:p>7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7]+1" office:value-type="float" office:value="767" calcext:value-type="float">
            <text:p>7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8]+1" office:value-type="float" office:value="768" calcext:value-type="float">
            <text:p>7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69]+1" office:value-type="float" office:value="769" calcext:value-type="float">
            <text:p>7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0]+1" office:value-type="float" office:value="770" calcext:value-type="float">
            <text:p>7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1]+1" office:value-type="float" office:value="771" calcext:value-type="float">
            <text:p>7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2]+1" office:value-type="float" office:value="772" calcext:value-type="float">
            <text:p>7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3]+1" office:value-type="float" office:value="773" calcext:value-type="float">
            <text:p>7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4]+1" office:value-type="float" office:value="774" calcext:value-type="float">
            <text:p>7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5]+1" office:value-type="float" office:value="775" calcext:value-type="float">
            <text:p>7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6]+1" office:value-type="float" office:value="776" calcext:value-type="float">
            <text:p>7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7]+1" office:value-type="float" office:value="777" calcext:value-type="float">
            <text:p>7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8]+1" office:value-type="float" office:value="778" calcext:value-type="float">
            <text:p>7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79]+1" office:value-type="float" office:value="779" calcext:value-type="float">
            <text:p>7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0]+1" office:value-type="float" office:value="780" calcext:value-type="float">
            <text:p>7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1]+1" office:value-type="float" office:value="781" calcext:value-type="float">
            <text:p>7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2]+1" office:value-type="float" office:value="782" calcext:value-type="float">
            <text:p>7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3]+1" office:value-type="float" office:value="783" calcext:value-type="float">
            <text:p>7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4]+1" office:value-type="float" office:value="784" calcext:value-type="float">
            <text:p>7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5]+1" office:value-type="float" office:value="785" calcext:value-type="float">
            <text:p>7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6]+1" office:value-type="float" office:value="786" calcext:value-type="float">
            <text:p>7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7]+1" office:value-type="float" office:value="787" calcext:value-type="float">
            <text:p>7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8]+1" office:value-type="float" office:value="788" calcext:value-type="float">
            <text:p>7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89]+1" office:value-type="float" office:value="789" calcext:value-type="float">
            <text:p>7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0]+1" office:value-type="float" office:value="790" calcext:value-type="float">
            <text:p>7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1]+1" office:value-type="float" office:value="791" calcext:value-type="float">
            <text:p>7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2]+1" office:value-type="float" office:value="792" calcext:value-type="float">
            <text:p>7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3]+1" office:value-type="float" office:value="793" calcext:value-type="float">
            <text:p>7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4]+1" office:value-type="float" office:value="794" calcext:value-type="float">
            <text:p>7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5]+1" office:value-type="float" office:value="795" calcext:value-type="float">
            <text:p>7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6]+1" office:value-type="float" office:value="796" calcext:value-type="float">
            <text:p>7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7]+1" office:value-type="float" office:value="797" calcext:value-type="float">
            <text:p>7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8]+1" office:value-type="float" office:value="798" calcext:value-type="float">
            <text:p>7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799]+1" office:value-type="float" office:value="799" calcext:value-type="float">
            <text:p>7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0]+1" office:value-type="float" office:value="800" calcext:value-type="float">
            <text:p>8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1]+1" office:value-type="float" office:value="801" calcext:value-type="float">
            <text:p>8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2]+1" office:value-type="float" office:value="802" calcext:value-type="float">
            <text:p>8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3]+1" office:value-type="float" office:value="803" calcext:value-type="float">
            <text:p>8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4]+1" office:value-type="float" office:value="804" calcext:value-type="float">
            <text:p>8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5]+1" office:value-type="float" office:value="805" calcext:value-type="float">
            <text:p>8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6]+1" office:value-type="float" office:value="806" calcext:value-type="float">
            <text:p>8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7]+1" office:value-type="float" office:value="807" calcext:value-type="float">
            <text:p>8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8]+1" office:value-type="float" office:value="808" calcext:value-type="float">
            <text:p>8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09]+1" office:value-type="float" office:value="809" calcext:value-type="float">
            <text:p>8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0]+1" office:value-type="float" office:value="810" calcext:value-type="float">
            <text:p>8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1]+1" office:value-type="float" office:value="811" calcext:value-type="float">
            <text:p>8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2]+1" office:value-type="float" office:value="812" calcext:value-type="float">
            <text:p>8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3]+1" office:value-type="float" office:value="813" calcext:value-type="float">
            <text:p>8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4]+1" office:value-type="float" office:value="814" calcext:value-type="float">
            <text:p>8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5]+1" office:value-type="float" office:value="815" calcext:value-type="float">
            <text:p>8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6]+1" office:value-type="float" office:value="816" calcext:value-type="float">
            <text:p>8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7]+1" office:value-type="float" office:value="817" calcext:value-type="float">
            <text:p>8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8]+1" office:value-type="float" office:value="818" calcext:value-type="float">
            <text:p>8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19]+1" office:value-type="float" office:value="819" calcext:value-type="float">
            <text:p>8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0]+1" office:value-type="float" office:value="820" calcext:value-type="float">
            <text:p>8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1]+1" office:value-type="float" office:value="821" calcext:value-type="float">
            <text:p>8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2]+1" office:value-type="float" office:value="822" calcext:value-type="float">
            <text:p>8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3]+1" office:value-type="float" office:value="823" calcext:value-type="float">
            <text:p>8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4]+1" office:value-type="float" office:value="824" calcext:value-type="float">
            <text:p>8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5]+1" office:value-type="float" office:value="825" calcext:value-type="float">
            <text:p>8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6]+1" office:value-type="float" office:value="826" calcext:value-type="float">
            <text:p>8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7]+1" office:value-type="float" office:value="827" calcext:value-type="float">
            <text:p>8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8]+1" office:value-type="float" office:value="828" calcext:value-type="float">
            <text:p>8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29]+1" office:value-type="float" office:value="829" calcext:value-type="float">
            <text:p>8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0]+1" office:value-type="float" office:value="830" calcext:value-type="float">
            <text:p>8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1]+1" office:value-type="float" office:value="831" calcext:value-type="float">
            <text:p>8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2]+1" office:value-type="float" office:value="832" calcext:value-type="float">
            <text:p>8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3]+1" office:value-type="float" office:value="833" calcext:value-type="float">
            <text:p>8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4]+1" office:value-type="float" office:value="834" calcext:value-type="float">
            <text:p>8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5]+1" office:value-type="float" office:value="835" calcext:value-type="float">
            <text:p>8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6]+1" office:value-type="float" office:value="836" calcext:value-type="float">
            <text:p>8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7]+1" office:value-type="float" office:value="837" calcext:value-type="float">
            <text:p>8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8]+1" office:value-type="float" office:value="838" calcext:value-type="float">
            <text:p>8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39]+1" office:value-type="float" office:value="839" calcext:value-type="float">
            <text:p>8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0]+1" office:value-type="float" office:value="840" calcext:value-type="float">
            <text:p>8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1]+1" office:value-type="float" office:value="841" calcext:value-type="float">
            <text:p>8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2]+1" office:value-type="float" office:value="842" calcext:value-type="float">
            <text:p>8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3]+1" office:value-type="float" office:value="843" calcext:value-type="float">
            <text:p>8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4]+1" office:value-type="float" office:value="844" calcext:value-type="float">
            <text:p>8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5]+1" office:value-type="float" office:value="845" calcext:value-type="float">
            <text:p>8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6]+1" office:value-type="float" office:value="846" calcext:value-type="float">
            <text:p>8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7]+1" office:value-type="float" office:value="847" calcext:value-type="float">
            <text:p>8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8]+1" office:value-type="float" office:value="848" calcext:value-type="float">
            <text:p>8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49]+1" office:value-type="float" office:value="849" calcext:value-type="float">
            <text:p>8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0]+1" office:value-type="float" office:value="850" calcext:value-type="float">
            <text:p>8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1]+1" office:value-type="float" office:value="851" calcext:value-type="float">
            <text:p>8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2]+1" office:value-type="float" office:value="852" calcext:value-type="float">
            <text:p>8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3]+1" office:value-type="float" office:value="853" calcext:value-type="float">
            <text:p>8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4]+1" office:value-type="float" office:value="854" calcext:value-type="float">
            <text:p>8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5]+1" office:value-type="float" office:value="855" calcext:value-type="float">
            <text:p>8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6]+1" office:value-type="float" office:value="856" calcext:value-type="float">
            <text:p>8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7]+1" office:value-type="float" office:value="857" calcext:value-type="float">
            <text:p>8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8]+1" office:value-type="float" office:value="858" calcext:value-type="float">
            <text:p>8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59]+1" office:value-type="float" office:value="859" calcext:value-type="float">
            <text:p>8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0]+1" office:value-type="float" office:value="860" calcext:value-type="float">
            <text:p>8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1]+1" office:value-type="float" office:value="861" calcext:value-type="float">
            <text:p>8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2]+1" office:value-type="float" office:value="862" calcext:value-type="float">
            <text:p>8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3]+1" office:value-type="float" office:value="863" calcext:value-type="float">
            <text:p>8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4]+1" office:value-type="float" office:value="864" calcext:value-type="float">
            <text:p>8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5]+1" office:value-type="float" office:value="865" calcext:value-type="float">
            <text:p>8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6]+1" office:value-type="float" office:value="866" calcext:value-type="float">
            <text:p>8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7]+1" office:value-type="float" office:value="867" calcext:value-type="float">
            <text:p>8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8]+1" office:value-type="float" office:value="868" calcext:value-type="float">
            <text:p>8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69]+1" office:value-type="float" office:value="869" calcext:value-type="float">
            <text:p>8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0]+1" office:value-type="float" office:value="870" calcext:value-type="float">
            <text:p>8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1]+1" office:value-type="float" office:value="871" calcext:value-type="float">
            <text:p>8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2]+1" office:value-type="float" office:value="872" calcext:value-type="float">
            <text:p>8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3]+1" office:value-type="float" office:value="873" calcext:value-type="float">
            <text:p>8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4]+1" office:value-type="float" office:value="874" calcext:value-type="float">
            <text:p>8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5]+1" office:value-type="float" office:value="875" calcext:value-type="float">
            <text:p>8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6]+1" office:value-type="float" office:value="876" calcext:value-type="float">
            <text:p>8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7]+1" office:value-type="float" office:value="877" calcext:value-type="float">
            <text:p>8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8]+1" office:value-type="float" office:value="878" calcext:value-type="float">
            <text:p>8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79]+1" office:value-type="float" office:value="879" calcext:value-type="float">
            <text:p>8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0]+1" office:value-type="float" office:value="880" calcext:value-type="float">
            <text:p>8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1]+1" office:value-type="float" office:value="881" calcext:value-type="float">
            <text:p>8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2]+1" office:value-type="float" office:value="882" calcext:value-type="float">
            <text:p>8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3]+1" office:value-type="float" office:value="883" calcext:value-type="float">
            <text:p>8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4]+1" office:value-type="float" office:value="884" calcext:value-type="float">
            <text:p>8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5]+1" office:value-type="float" office:value="885" calcext:value-type="float">
            <text:p>8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6]+1" office:value-type="float" office:value="886" calcext:value-type="float">
            <text:p>8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7]+1" office:value-type="float" office:value="887" calcext:value-type="float">
            <text:p>8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8]+1" office:value-type="float" office:value="888" calcext:value-type="float">
            <text:p>8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89]+1" office:value-type="float" office:value="889" calcext:value-type="float">
            <text:p>8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0]+1" office:value-type="float" office:value="890" calcext:value-type="float">
            <text:p>8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1]+1" office:value-type="float" office:value="891" calcext:value-type="float">
            <text:p>8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2]+1" office:value-type="float" office:value="892" calcext:value-type="float">
            <text:p>8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3]+1" office:value-type="float" office:value="893" calcext:value-type="float">
            <text:p>8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4]+1" office:value-type="float" office:value="894" calcext:value-type="float">
            <text:p>8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5]+1" office:value-type="float" office:value="895" calcext:value-type="float">
            <text:p>8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6]+1" office:value-type="float" office:value="896" calcext:value-type="float">
            <text:p>8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7]+1" office:value-type="float" office:value="897" calcext:value-type="float">
            <text:p>8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8]+1" office:value-type="float" office:value="898" calcext:value-type="float">
            <text:p>8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899]+1" office:value-type="float" office:value="899" calcext:value-type="float">
            <text:p>8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0]+1" office:value-type="float" office:value="900" calcext:value-type="float">
            <text:p>90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1]+1" office:value-type="float" office:value="901" calcext:value-type="float">
            <text:p>90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2]+1" office:value-type="float" office:value="902" calcext:value-type="float">
            <text:p>90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3]+1" office:value-type="float" office:value="903" calcext:value-type="float">
            <text:p>90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4]+1" office:value-type="float" office:value="904" calcext:value-type="float">
            <text:p>90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5]+1" office:value-type="float" office:value="905" calcext:value-type="float">
            <text:p>90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6]+1" office:value-type="float" office:value="906" calcext:value-type="float">
            <text:p>90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7]+1" office:value-type="float" office:value="907" calcext:value-type="float">
            <text:p>90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8]+1" office:value-type="float" office:value="908" calcext:value-type="float">
            <text:p>90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09]+1" office:value-type="float" office:value="909" calcext:value-type="float">
            <text:p>90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0]+1" office:value-type="float" office:value="910" calcext:value-type="float">
            <text:p>91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1]+1" office:value-type="float" office:value="911" calcext:value-type="float">
            <text:p>91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2]+1" office:value-type="float" office:value="912" calcext:value-type="float">
            <text:p>91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3]+1" office:value-type="float" office:value="913" calcext:value-type="float">
            <text:p>91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4]+1" office:value-type="float" office:value="914" calcext:value-type="float">
            <text:p>91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5]+1" office:value-type="float" office:value="915" calcext:value-type="float">
            <text:p>91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6]+1" office:value-type="float" office:value="916" calcext:value-type="float">
            <text:p>91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7]+1" office:value-type="float" office:value="917" calcext:value-type="float">
            <text:p>91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8]+1" office:value-type="float" office:value="918" calcext:value-type="float">
            <text:p>91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19]+1" office:value-type="float" office:value="919" calcext:value-type="float">
            <text:p>91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0]+1" office:value-type="float" office:value="920" calcext:value-type="float">
            <text:p>92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1]+1" office:value-type="float" office:value="921" calcext:value-type="float">
            <text:p>92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2]+1" office:value-type="float" office:value="922" calcext:value-type="float">
            <text:p>92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3]+1" office:value-type="float" office:value="923" calcext:value-type="float">
            <text:p>92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4]+1" office:value-type="float" office:value="924" calcext:value-type="float">
            <text:p>92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5]+1" office:value-type="float" office:value="925" calcext:value-type="float">
            <text:p>92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6]+1" office:value-type="float" office:value="926" calcext:value-type="float">
            <text:p>92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7]+1" office:value-type="float" office:value="927" calcext:value-type="float">
            <text:p>92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8]+1" office:value-type="float" office:value="928" calcext:value-type="float">
            <text:p>92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29]+1" office:value-type="float" office:value="929" calcext:value-type="float">
            <text:p>92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0]+1" office:value-type="float" office:value="930" calcext:value-type="float">
            <text:p>93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1]+1" office:value-type="float" office:value="931" calcext:value-type="float">
            <text:p>93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2]+1" office:value-type="float" office:value="932" calcext:value-type="float">
            <text:p>93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3]+1" office:value-type="float" office:value="933" calcext:value-type="float">
            <text:p>93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4]+1" office:value-type="float" office:value="934" calcext:value-type="float">
            <text:p>93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5]+1" office:value-type="float" office:value="935" calcext:value-type="float">
            <text:p>93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6]+1" office:value-type="float" office:value="936" calcext:value-type="float">
            <text:p>93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7]+1" office:value-type="float" office:value="937" calcext:value-type="float">
            <text:p>93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8]+1" office:value-type="float" office:value="938" calcext:value-type="float">
            <text:p>93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39]+1" office:value-type="float" office:value="939" calcext:value-type="float">
            <text:p>93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0]+1" office:value-type="float" office:value="940" calcext:value-type="float">
            <text:p>94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1]+1" office:value-type="float" office:value="941" calcext:value-type="float">
            <text:p>94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2]+1" office:value-type="float" office:value="942" calcext:value-type="float">
            <text:p>94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3]+1" office:value-type="float" office:value="943" calcext:value-type="float">
            <text:p>94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4]+1" office:value-type="float" office:value="944" calcext:value-type="float">
            <text:p>94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5]+1" office:value-type="float" office:value="945" calcext:value-type="float">
            <text:p>94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6]+1" office:value-type="float" office:value="946" calcext:value-type="float">
            <text:p>94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7]+1" office:value-type="float" office:value="947" calcext:value-type="float">
            <text:p>94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8]+1" office:value-type="float" office:value="948" calcext:value-type="float">
            <text:p>94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49]+1" office:value-type="float" office:value="949" calcext:value-type="float">
            <text:p>94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0]+1" office:value-type="float" office:value="950" calcext:value-type="float">
            <text:p>95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1]+1" office:value-type="float" office:value="951" calcext:value-type="float">
            <text:p>95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2]+1" office:value-type="float" office:value="952" calcext:value-type="float">
            <text:p>95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3]+1" office:value-type="float" office:value="953" calcext:value-type="float">
            <text:p>95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4]+1" office:value-type="float" office:value="954" calcext:value-type="float">
            <text:p>95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5]+1" office:value-type="float" office:value="955" calcext:value-type="float">
            <text:p>95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6]+1" office:value-type="float" office:value="956" calcext:value-type="float">
            <text:p>95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7]+1" office:value-type="float" office:value="957" calcext:value-type="float">
            <text:p>95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8]+1" office:value-type="float" office:value="958" calcext:value-type="float">
            <text:p>95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59]+1" office:value-type="float" office:value="959" calcext:value-type="float">
            <text:p>95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0]+1" office:value-type="float" office:value="960" calcext:value-type="float">
            <text:p>96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1]+1" office:value-type="float" office:value="961" calcext:value-type="float">
            <text:p>96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2]+1" office:value-type="float" office:value="962" calcext:value-type="float">
            <text:p>96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3]+1" office:value-type="float" office:value="963" calcext:value-type="float">
            <text:p>96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4]+1" office:value-type="float" office:value="964" calcext:value-type="float">
            <text:p>96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5]+1" office:value-type="float" office:value="965" calcext:value-type="float">
            <text:p>96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6]+1" office:value-type="float" office:value="966" calcext:value-type="float">
            <text:p>96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7]+1" office:value-type="float" office:value="967" calcext:value-type="float">
            <text:p>96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8]+1" office:value-type="float" office:value="968" calcext:value-type="float">
            <text:p>96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69]+1" office:value-type="float" office:value="969" calcext:value-type="float">
            <text:p>96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0]+1" office:value-type="float" office:value="970" calcext:value-type="float">
            <text:p>97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1]+1" office:value-type="float" office:value="971" calcext:value-type="float">
            <text:p>97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2]+1" office:value-type="float" office:value="972" calcext:value-type="float">
            <text:p>97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3]+1" office:value-type="float" office:value="973" calcext:value-type="float">
            <text:p>97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4]+1" office:value-type="float" office:value="974" calcext:value-type="float">
            <text:p>97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5]+1" office:value-type="float" office:value="975" calcext:value-type="float">
            <text:p>97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6]+1" office:value-type="float" office:value="976" calcext:value-type="float">
            <text:p>97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7]+1" office:value-type="float" office:value="977" calcext:value-type="float">
            <text:p>97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8]+1" office:value-type="float" office:value="978" calcext:value-type="float">
            <text:p>97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79]+1" office:value-type="float" office:value="979" calcext:value-type="float">
            <text:p>97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0]+1" office:value-type="float" office:value="980" calcext:value-type="float">
            <text:p>98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1]+1" office:value-type="float" office:value="981" calcext:value-type="float">
            <text:p>98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2]+1" office:value-type="float" office:value="982" calcext:value-type="float">
            <text:p>98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3]+1" office:value-type="float" office:value="983" calcext:value-type="float">
            <text:p>98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4]+1" office:value-type="float" office:value="984" calcext:value-type="float">
            <text:p>98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5]+1" office:value-type="float" office:value="985" calcext:value-type="float">
            <text:p>98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6]+1" office:value-type="float" office:value="986" calcext:value-type="float">
            <text:p>98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7]+1" office:value-type="float" office:value="987" calcext:value-type="float">
            <text:p>98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8]+1" office:value-type="float" office:value="988" calcext:value-type="float">
            <text:p>98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89]+1" office:value-type="float" office:value="989" calcext:value-type="float">
            <text:p>98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0]+1" office:value-type="float" office:value="990" calcext:value-type="float">
            <text:p>990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1]+1" office:value-type="float" office:value="991" calcext:value-type="float">
            <text:p>991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2]+1" office:value-type="float" office:value="992" calcext:value-type="float">
            <text:p>992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3]+1" office:value-type="float" office:value="993" calcext:value-type="float">
            <text:p>993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4]+1" office:value-type="float" office:value="994" calcext:value-type="float">
            <text:p>994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5]+1" office:value-type="float" office:value="995" calcext:value-type="float">
            <text:p>995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6]+1" office:value-type="float" office:value="996" calcext:value-type="float">
            <text:p>996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7]+1" office:value-type="float" office:value="997" calcext:value-type="float">
            <text:p>997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8]+1" office:value-type="float" office:value="998" calcext:value-type="float">
            <text:p>998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999]+1" office:value-type="float" office:value="999" calcext:value-type="float">
            <text:p>999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21"/>
          <table:table-cell table:style-name="ce4" table:content-validation-name="val1" table:formula="of:=[.B1000]+1" office:value-type="float" office:value="1000" calcext:value-type="float">
            <text:p>1000</text:p>
          </table:table-cell>
          <table:table-cell table:style-name="ce21"/>
          <table:table-cell table:number-columns-repeated="16381"/>
        </table:table-row>
        <table:table-row table:style-name="ro1" table:visibility="collapse" table:number-rows-repeated="1047574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cat_lang.A1:cat_lang.C1">
            <calcext:condition calcext:apply-style-name="ConditionalStyle_1" calcext:value="formula-is(VLOOKUP([.A1];[$cat_other.$A$2:.$C$9];3;0)&lt;&gt;VLOOKUP([.A1];[$cat_other.$A$2:.$C$9];2;0))" calcext:base-cell-address="cat_lang.A1"/>
          </calcext:conditional-format>
        </calcext:conditional-formats>
      </table:table>
      <table:table table:name="cat_context_class" table:style-name="ta4">
        <table:table-column table:style-name="co8" table:number-columns-repeated="2" table:default-cell-style-name="ce22"/>
        <table:table-column table:style-name="co3" table:number-columns-repeated="16382" table:default-cell-style-name="ce22"/>
        <table:table-row table:style-name="ro1">
          <table:table-cell table:style-name="ce31" office:value-type="string" calcext:value-type="string">
            <text:p>context_class_code</text:p>
          </table:table-cell>
          <table:table-cell table:style-name="ce31" office:value-type="string" calcext:value-type="string">
            <text:p>context_class_id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Additive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]+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]+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]+1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]+1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]+1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]+1"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]+1"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]+1"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]+1"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]+1"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]+1"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]+1"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]+1"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]+1" office:value-type="float" office:value="15" calcext:value-type="float">
            <text:p>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]+1" office:value-type="float" office:value="16" calcext:value-type="float">
            <text:p>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]+1" office:value-type="float" office:value="17" calcext:value-type="float">
            <text:p>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]+1" office:value-type="float" office:value="18" calcext:value-type="float">
            <text:p>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]+1" office:value-type="float" office:value="19" calcext:value-type="float">
            <text:p>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]+1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]+1" office:value-type="float" office:value="21" calcext:value-type="float">
            <text:p>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]+1" office:value-type="float" office:value="22" calcext:value-type="float">
            <text:p>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]+1" office:value-type="float" office:value="23" calcext:value-type="float">
            <text:p>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]+1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]+1" office:value-type="float" office:value="25" calcext:value-type="float">
            <text:p>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]+1" office:value-type="float" office:value="26" calcext:value-type="float">
            <text:p>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]+1" office:value-type="float" office:value="27" calcext:value-type="float">
            <text:p>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]+1" office:value-type="float" office:value="28" calcext:value-type="float">
            <text:p>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]+1" office:value-type="float" office:value="29" calcext:value-type="float">
            <text:p>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]+1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]+1" office:value-type="float" office:value="31" calcext:value-type="float">
            <text:p>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]+1" office:value-type="float" office:value="32" calcext:value-type="float">
            <text:p>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]+1"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]+1" office:value-type="float" office:value="34" calcext:value-type="float">
            <text:p>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]+1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]+1" office:value-type="float" office:value="36" calcext:value-type="float">
            <text:p>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]+1" office:value-type="float" office:value="37" calcext:value-type="float">
            <text:p>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]+1" office:value-type="float" office:value="38" calcext:value-type="float">
            <text:p>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]+1" office:value-type="float" office:value="39" calcext:value-type="float">
            <text:p>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]+1" office:value-type="float" office:value="40" calcext:value-type="float">
            <text:p>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]+1" office:value-type="float" office:value="41" calcext:value-type="float">
            <text:p>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]+1" office:value-type="float" office:value="42" calcext:value-type="float">
            <text:p>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]+1" office:value-type="float" office:value="43" calcext:value-type="float">
            <text:p>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]+1" office:value-type="float" office:value="44" calcext:value-type="float">
            <text:p>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]+1" office:value-type="float" office:value="45" calcext:value-type="float">
            <text:p>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]+1" office:value-type="float" office:value="46" calcext:value-type="float">
            <text:p>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]+1" office:value-type="float" office:value="47" calcext:value-type="float">
            <text:p>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]+1" office:value-type="float" office:value="48" calcext:value-type="float">
            <text:p>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]+1" office:value-type="float" office:value="49" calcext:value-type="float">
            <text:p>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]+1"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]+1" office:value-type="float" office:value="51" calcext:value-type="float">
            <text:p>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]+1" office:value-type="float" office:value="52" calcext:value-type="float">
            <text:p>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]+1" office:value-type="float" office:value="53" calcext:value-type="float">
            <text:p>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]+1" office:value-type="float" office:value="54" calcext:value-type="float">
            <text:p>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]+1" office:value-type="float" office:value="55" calcext:value-type="float">
            <text:p>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]+1" office:value-type="float" office:value="56" calcext:value-type="float">
            <text:p>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]+1" office:value-type="float" office:value="57" calcext:value-type="float">
            <text:p>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]+1" office:value-type="float" office:value="58" calcext:value-type="float">
            <text:p>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]+1" office:value-type="float" office:value="59" calcext:value-type="float">
            <text:p>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]+1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]+1" office:value-type="float" office:value="61" calcext:value-type="float">
            <text:p>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]+1" office:value-type="float" office:value="62" calcext:value-type="float">
            <text:p>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]+1" office:value-type="float" office:value="63" calcext:value-type="float">
            <text:p>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]+1" office:value-type="float" office:value="64" calcext:value-type="float">
            <text:p>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]+1" office:value-type="float" office:value="65" calcext:value-type="float">
            <text:p>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]+1" office:value-type="float" office:value="66" calcext:value-type="float">
            <text:p>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]+1" office:value-type="float" office:value="67" calcext:value-type="float">
            <text:p>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]+1" office:value-type="float" office:value="68" calcext:value-type="float">
            <text:p>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]+1" office:value-type="float" office:value="69" calcext:value-type="float">
            <text:p>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]+1" office:value-type="float" office:value="70" calcext:value-type="float">
            <text:p>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]+1" office:value-type="float" office:value="71" calcext:value-type="float">
            <text:p>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]+1" office:value-type="float" office:value="72" calcext:value-type="float">
            <text:p>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]+1" office:value-type="float" office:value="73" calcext:value-type="float">
            <text:p>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]+1" office:value-type="float" office:value="74" calcext:value-type="float">
            <text:p>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]+1" office:value-type="float" office:value="75" calcext:value-type="float">
            <text:p>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]+1" office:value-type="float" office:value="76" calcext:value-type="float">
            <text:p>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]+1" office:value-type="float" office:value="77" calcext:value-type="float">
            <text:p>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]+1" office:value-type="float" office:value="78" calcext:value-type="float">
            <text:p>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]+1" office:value-type="float" office:value="79" calcext:value-type="float">
            <text:p>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]+1"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]+1" office:value-type="float" office:value="81" calcext:value-type="float">
            <text:p>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]+1" office:value-type="float" office:value="82" calcext:value-type="float">
            <text:p>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]+1" office:value-type="float" office:value="83" calcext:value-type="float">
            <text:p>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]+1" office:value-type="float" office:value="84" calcext:value-type="float">
            <text:p>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]+1"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]+1" office:value-type="float" office:value="86" calcext:value-type="float">
            <text:p>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]+1" office:value-type="float" office:value="87" calcext:value-type="float">
            <text:p>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]+1" office:value-type="float" office:value="88" calcext:value-type="float">
            <text:p>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]+1" office:value-type="float" office:value="89" calcext:value-type="float">
            <text:p>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]+1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]+1" office:value-type="float" office:value="91" calcext:value-type="float">
            <text:p>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]+1" office:value-type="float" office:value="92" calcext:value-type="float">
            <text:p>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]+1" office:value-type="float" office:value="93" calcext:value-type="float">
            <text:p>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]+1" office:value-type="float" office:value="94" calcext:value-type="float">
            <text:p>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]+1"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]+1" office:value-type="float" office:value="96" calcext:value-type="float">
            <text:p>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]+1" office:value-type="float" office:value="97" calcext:value-type="float">
            <text:p>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]+1" office:value-type="float" office:value="98" calcext:value-type="float">
            <text:p>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]+1" office:value-type="float" office:value="99" calcext:value-type="float">
            <text:p>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0]+1"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1]+1" office:value-type="float" office:value="101" calcext:value-type="float">
            <text:p>1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2]+1" office:value-type="float" office:value="102" calcext:value-type="float">
            <text:p>1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3]+1" office:value-type="float" office:value="103" calcext:value-type="float">
            <text:p>1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4]+1" office:value-type="float" office:value="104" calcext:value-type="float">
            <text:p>1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5]+1" office:value-type="float" office:value="105" calcext:value-type="float">
            <text:p>1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6]+1" office:value-type="float" office:value="106" calcext:value-type="float">
            <text:p>1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7]+1" office:value-type="float" office:value="107" calcext:value-type="float">
            <text:p>1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8]+1" office:value-type="float" office:value="108" calcext:value-type="float">
            <text:p>1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9]+1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0]+1" office:value-type="float" office:value="110" calcext:value-type="float">
            <text:p>1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1]+1" office:value-type="float" office:value="111" calcext:value-type="float">
            <text:p>1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2]+1" office:value-type="float" office:value="112" calcext:value-type="float">
            <text:p>1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3]+1" office:value-type="float" office:value="113" calcext:value-type="float">
            <text:p>1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4]+1" office:value-type="float" office:value="114" calcext:value-type="float">
            <text:p>1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5]+1" office:value-type="float" office:value="115" calcext:value-type="float">
            <text:p>1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6]+1" office:value-type="float" office:value="116" calcext:value-type="float">
            <text:p>1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7]+1" office:value-type="float" office:value="117" calcext:value-type="float">
            <text:p>1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8]+1" office:value-type="float" office:value="118" calcext:value-type="float">
            <text:p>1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19]+1" office:value-type="float" office:value="119" calcext:value-type="float">
            <text:p>1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0]+1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1]+1" office:value-type="float" office:value="121" calcext:value-type="float">
            <text:p>1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2]+1" office:value-type="float" office:value="122" calcext:value-type="float">
            <text:p>1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3]+1" office:value-type="float" office:value="123" calcext:value-type="float">
            <text:p>1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4]+1" office:value-type="float" office:value="124" calcext:value-type="float">
            <text:p>1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5]+1" office:value-type="float" office:value="125" calcext:value-type="float">
            <text:p>1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6]+1" office:value-type="float" office:value="126" calcext:value-type="float">
            <text:p>1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7]+1" office:value-type="float" office:value="127" calcext:value-type="float">
            <text:p>1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8]+1" office:value-type="float" office:value="128" calcext:value-type="float">
            <text:p>1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29]+1" office:value-type="float" office:value="129" calcext:value-type="float">
            <text:p>1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0]+1" office:value-type="float" office:value="130" calcext:value-type="float">
            <text:p>1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1]+1" office:value-type="float" office:value="131" calcext:value-type="float">
            <text:p>1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2]+1" office:value-type="float" office:value="132" calcext:value-type="float">
            <text:p>1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3]+1" office:value-type="float" office:value="133" calcext:value-type="float">
            <text:p>1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4]+1" office:value-type="float" office:value="134" calcext:value-type="float">
            <text:p>1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5]+1" office:value-type="float" office:value="135" calcext:value-type="float">
            <text:p>1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6]+1" office:value-type="float" office:value="136" calcext:value-type="float">
            <text:p>1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7]+1" office:value-type="float" office:value="137" calcext:value-type="float">
            <text:p>1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8]+1" office:value-type="float" office:value="138" calcext:value-type="float">
            <text:p>1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39]+1" office:value-type="float" office:value="139" calcext:value-type="float">
            <text:p>1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0]+1" office:value-type="float" office:value="140" calcext:value-type="float">
            <text:p>1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1]+1" office:value-type="float" office:value="141" calcext:value-type="float">
            <text:p>1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2]+1" office:value-type="float" office:value="142" calcext:value-type="float">
            <text:p>1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3]+1" office:value-type="float" office:value="143" calcext:value-type="float">
            <text:p>1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4]+1" office:value-type="float" office:value="144" calcext:value-type="float">
            <text:p>1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5]+1" office:value-type="float" office:value="145" calcext:value-type="float">
            <text:p>1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6]+1" office:value-type="float" office:value="146" calcext:value-type="float">
            <text:p>1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7]+1" office:value-type="float" office:value="147" calcext:value-type="float">
            <text:p>1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8]+1" office:value-type="float" office:value="148" calcext:value-type="float">
            <text:p>1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49]+1" office:value-type="float" office:value="149" calcext:value-type="float">
            <text:p>1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0]+1" office:value-type="float" office:value="150" calcext:value-type="float">
            <text:p>1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1]+1" office:value-type="float" office:value="151" calcext:value-type="float">
            <text:p>1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2]+1" office:value-type="float" office:value="152" calcext:value-type="float">
            <text:p>1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3]+1" office:value-type="float" office:value="153" calcext:value-type="float">
            <text:p>1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4]+1" office:value-type="float" office:value="154" calcext:value-type="float">
            <text:p>1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5]+1" office:value-type="float" office:value="155" calcext:value-type="float">
            <text:p>1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6]+1" office:value-type="float" office:value="156" calcext:value-type="float">
            <text:p>1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7]+1" office:value-type="float" office:value="157" calcext:value-type="float">
            <text:p>1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8]+1" office:value-type="float" office:value="158" calcext:value-type="float">
            <text:p>1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59]+1" office:value-type="float" office:value="159" calcext:value-type="float">
            <text:p>1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0]+1" office:value-type="float" office:value="160" calcext:value-type="float">
            <text:p>1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1]+1" office:value-type="float" office:value="161" calcext:value-type="float">
            <text:p>1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2]+1" office:value-type="float" office:value="162" calcext:value-type="float">
            <text:p>1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3]+1" office:value-type="float" office:value="163" calcext:value-type="float">
            <text:p>1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4]+1" office:value-type="float" office:value="164" calcext:value-type="float">
            <text:p>1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5]+1" office:value-type="float" office:value="165" calcext:value-type="float">
            <text:p>1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6]+1" office:value-type="float" office:value="166" calcext:value-type="float">
            <text:p>1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7]+1" office:value-type="float" office:value="167" calcext:value-type="float">
            <text:p>1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8]+1" office:value-type="float" office:value="168" calcext:value-type="float">
            <text:p>1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69]+1" office:value-type="float" office:value="169" calcext:value-type="float">
            <text:p>1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0]+1" office:value-type="float" office:value="170" calcext:value-type="float">
            <text:p>1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1]+1" office:value-type="float" office:value="171" calcext:value-type="float">
            <text:p>1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2]+1" office:value-type="float" office:value="172" calcext:value-type="float">
            <text:p>1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3]+1" office:value-type="float" office:value="173" calcext:value-type="float">
            <text:p>1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4]+1" office:value-type="float" office:value="174" calcext:value-type="float">
            <text:p>1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5]+1" office:value-type="float" office:value="175" calcext:value-type="float">
            <text:p>1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6]+1" office:value-type="float" office:value="176" calcext:value-type="float">
            <text:p>1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7]+1" office:value-type="float" office:value="177" calcext:value-type="float">
            <text:p>1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8]+1" office:value-type="float" office:value="178" calcext:value-type="float">
            <text:p>1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79]+1" office:value-type="float" office:value="179" calcext:value-type="float">
            <text:p>1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0]+1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1]+1" office:value-type="float" office:value="181" calcext:value-type="float">
            <text:p>1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2]+1" office:value-type="float" office:value="182" calcext:value-type="float">
            <text:p>1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3]+1" office:value-type="float" office:value="183" calcext:value-type="float">
            <text:p>1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4]+1" office:value-type="float" office:value="184" calcext:value-type="float">
            <text:p>1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5]+1" office:value-type="float" office:value="185" calcext:value-type="float">
            <text:p>1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6]+1" office:value-type="float" office:value="186" calcext:value-type="float">
            <text:p>1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7]+1" office:value-type="float" office:value="187" calcext:value-type="float">
            <text:p>1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8]+1" office:value-type="float" office:value="188" calcext:value-type="float">
            <text:p>1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89]+1" office:value-type="float" office:value="189" calcext:value-type="float">
            <text:p>1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0]+1" office:value-type="float" office:value="190" calcext:value-type="float">
            <text:p>1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1]+1" office:value-type="float" office:value="191" calcext:value-type="float">
            <text:p>1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2]+1" office:value-type="float" office:value="192" calcext:value-type="float">
            <text:p>1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3]+1" office:value-type="float" office:value="193" calcext:value-type="float">
            <text:p>1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4]+1" office:value-type="float" office:value="194" calcext:value-type="float">
            <text:p>1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5]+1" office:value-type="float" office:value="195" calcext:value-type="float">
            <text:p>1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6]+1" office:value-type="float" office:value="196" calcext:value-type="float">
            <text:p>1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7]+1" office:value-type="float" office:value="197" calcext:value-type="float">
            <text:p>1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8]+1" office:value-type="float" office:value="198" calcext:value-type="float">
            <text:p>1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99]+1" office:value-type="float" office:value="199" calcext:value-type="float">
            <text:p>1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0]+1"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1]+1" office:value-type="float" office:value="201" calcext:value-type="float">
            <text:p>2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2]+1" office:value-type="float" office:value="202" calcext:value-type="float">
            <text:p>2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3]+1" office:value-type="float" office:value="203" calcext:value-type="float">
            <text:p>2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4]+1" office:value-type="float" office:value="204" calcext:value-type="float">
            <text:p>2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5]+1" office:value-type="float" office:value="205" calcext:value-type="float">
            <text:p>2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6]+1" office:value-type="float" office:value="206" calcext:value-type="float">
            <text:p>2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7]+1" office:value-type="float" office:value="207" calcext:value-type="float">
            <text:p>2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8]+1" office:value-type="float" office:value="208" calcext:value-type="float">
            <text:p>2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09]+1" office:value-type="float" office:value="209" calcext:value-type="float">
            <text:p>2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0]+1" office:value-type="float" office:value="210" calcext:value-type="float">
            <text:p>2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1]+1" office:value-type="float" office:value="211" calcext:value-type="float">
            <text:p>2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2]+1" office:value-type="float" office:value="212" calcext:value-type="float">
            <text:p>2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3]+1" office:value-type="float" office:value="213" calcext:value-type="float">
            <text:p>2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4]+1" office:value-type="float" office:value="214" calcext:value-type="float">
            <text:p>2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5]+1" office:value-type="float" office:value="215" calcext:value-type="float">
            <text:p>2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6]+1" office:value-type="float" office:value="216" calcext:value-type="float">
            <text:p>2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7]+1" office:value-type="float" office:value="217" calcext:value-type="float">
            <text:p>2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8]+1" office:value-type="float" office:value="218" calcext:value-type="float">
            <text:p>2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19]+1" office:value-type="float" office:value="219" calcext:value-type="float">
            <text:p>2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0]+1" office:value-type="float" office:value="220" calcext:value-type="float">
            <text:p>2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1]+1" office:value-type="float" office:value="221" calcext:value-type="float">
            <text:p>2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2]+1" office:value-type="float" office:value="222" calcext:value-type="float">
            <text:p>2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3]+1" office:value-type="float" office:value="223" calcext:value-type="float">
            <text:p>2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4]+1" office:value-type="float" office:value="224" calcext:value-type="float">
            <text:p>2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5]+1" office:value-type="float" office:value="225" calcext:value-type="float">
            <text:p>2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6]+1" office:value-type="float" office:value="226" calcext:value-type="float">
            <text:p>2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7]+1" office:value-type="float" office:value="227" calcext:value-type="float">
            <text:p>2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8]+1" office:value-type="float" office:value="228" calcext:value-type="float">
            <text:p>2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29]+1" office:value-type="float" office:value="229" calcext:value-type="float">
            <text:p>2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0]+1" office:value-type="float" office:value="230" calcext:value-type="float">
            <text:p>2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1]+1" office:value-type="float" office:value="231" calcext:value-type="float">
            <text:p>2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2]+1" office:value-type="float" office:value="232" calcext:value-type="float">
            <text:p>2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3]+1" office:value-type="float" office:value="233" calcext:value-type="float">
            <text:p>2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4]+1" office:value-type="float" office:value="234" calcext:value-type="float">
            <text:p>2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5]+1" office:value-type="float" office:value="235" calcext:value-type="float">
            <text:p>2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6]+1" office:value-type="float" office:value="236" calcext:value-type="float">
            <text:p>2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7]+1" office:value-type="float" office:value="237" calcext:value-type="float">
            <text:p>2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8]+1" office:value-type="float" office:value="238" calcext:value-type="float">
            <text:p>2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39]+1" office:value-type="float" office:value="239" calcext:value-type="float">
            <text:p>2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0]+1" office:value-type="float" office:value="240" calcext:value-type="float">
            <text:p>2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1]+1" office:value-type="float" office:value="241" calcext:value-type="float">
            <text:p>2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2]+1" office:value-type="float" office:value="242" calcext:value-type="float">
            <text:p>2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3]+1" office:value-type="float" office:value="243" calcext:value-type="float">
            <text:p>2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4]+1" office:value-type="float" office:value="244" calcext:value-type="float">
            <text:p>2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5]+1" office:value-type="float" office:value="245" calcext:value-type="float">
            <text:p>2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6]+1" office:value-type="float" office:value="246" calcext:value-type="float">
            <text:p>2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7]+1" office:value-type="float" office:value="247" calcext:value-type="float">
            <text:p>2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8]+1" office:value-type="float" office:value="248" calcext:value-type="float">
            <text:p>2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49]+1" office:value-type="float" office:value="249" calcext:value-type="float">
            <text:p>2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0]+1" office:value-type="float" office:value="250" calcext:value-type="float">
            <text:p>2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1]+1" office:value-type="float" office:value="251" calcext:value-type="float">
            <text:p>2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2]+1" office:value-type="float" office:value="252" calcext:value-type="float">
            <text:p>2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3]+1" office:value-type="float" office:value="253" calcext:value-type="float">
            <text:p>2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4]+1" office:value-type="float" office:value="254" calcext:value-type="float">
            <text:p>2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5]+1" office:value-type="float" office:value="255" calcext:value-type="float">
            <text:p>2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6]+1" office:value-type="float" office:value="256" calcext:value-type="float">
            <text:p>2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7]+1" office:value-type="float" office:value="257" calcext:value-type="float">
            <text:p>2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8]+1" office:value-type="float" office:value="258" calcext:value-type="float">
            <text:p>2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59]+1" office:value-type="float" office:value="259" calcext:value-type="float">
            <text:p>2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0]+1" office:value-type="float" office:value="260" calcext:value-type="float">
            <text:p>2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1]+1" office:value-type="float" office:value="261" calcext:value-type="float">
            <text:p>2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2]+1" office:value-type="float" office:value="262" calcext:value-type="float">
            <text:p>2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3]+1" office:value-type="float" office:value="263" calcext:value-type="float">
            <text:p>2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4]+1" office:value-type="float" office:value="264" calcext:value-type="float">
            <text:p>2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5]+1" office:value-type="float" office:value="265" calcext:value-type="float">
            <text:p>2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6]+1" office:value-type="float" office:value="266" calcext:value-type="float">
            <text:p>2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7]+1" office:value-type="float" office:value="267" calcext:value-type="float">
            <text:p>2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8]+1" office:value-type="float" office:value="268" calcext:value-type="float">
            <text:p>2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69]+1" office:value-type="float" office:value="269" calcext:value-type="float">
            <text:p>2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0]+1" office:value-type="float" office:value="270" calcext:value-type="float">
            <text:p>2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1]+1" office:value-type="float" office:value="271" calcext:value-type="float">
            <text:p>2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2]+1" office:value-type="float" office:value="272" calcext:value-type="float">
            <text:p>2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3]+1" office:value-type="float" office:value="273" calcext:value-type="float">
            <text:p>2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4]+1" office:value-type="float" office:value="274" calcext:value-type="float">
            <text:p>2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5]+1" office:value-type="float" office:value="275" calcext:value-type="float">
            <text:p>2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6]+1" office:value-type="float" office:value="276" calcext:value-type="float">
            <text:p>2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7]+1" office:value-type="float" office:value="277" calcext:value-type="float">
            <text:p>2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8]+1" office:value-type="float" office:value="278" calcext:value-type="float">
            <text:p>2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79]+1" office:value-type="float" office:value="279" calcext:value-type="float">
            <text:p>2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0]+1" office:value-type="float" office:value="280" calcext:value-type="float">
            <text:p>2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1]+1" office:value-type="float" office:value="281" calcext:value-type="float">
            <text:p>2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2]+1" office:value-type="float" office:value="282" calcext:value-type="float">
            <text:p>2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3]+1" office:value-type="float" office:value="283" calcext:value-type="float">
            <text:p>2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4]+1" office:value-type="float" office:value="284" calcext:value-type="float">
            <text:p>2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5]+1" office:value-type="float" office:value="285" calcext:value-type="float">
            <text:p>2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6]+1" office:value-type="float" office:value="286" calcext:value-type="float">
            <text:p>2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7]+1" office:value-type="float" office:value="287" calcext:value-type="float">
            <text:p>2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8]+1" office:value-type="float" office:value="288" calcext:value-type="float">
            <text:p>2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89]+1" office:value-type="float" office:value="289" calcext:value-type="float">
            <text:p>2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0]+1" office:value-type="float" office:value="290" calcext:value-type="float">
            <text:p>2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1]+1" office:value-type="float" office:value="291" calcext:value-type="float">
            <text:p>2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2]+1" office:value-type="float" office:value="292" calcext:value-type="float">
            <text:p>2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3]+1" office:value-type="float" office:value="293" calcext:value-type="float">
            <text:p>2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4]+1" office:value-type="float" office:value="294" calcext:value-type="float">
            <text:p>2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5]+1" office:value-type="float" office:value="295" calcext:value-type="float">
            <text:p>2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6]+1" office:value-type="float" office:value="296" calcext:value-type="float">
            <text:p>2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7]+1" office:value-type="float" office:value="297" calcext:value-type="float">
            <text:p>2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8]+1" office:value-type="float" office:value="298" calcext:value-type="float">
            <text:p>2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299]+1" office:value-type="float" office:value="299" calcext:value-type="float">
            <text:p>2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0]+1"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1]+1" office:value-type="float" office:value="301" calcext:value-type="float">
            <text:p>3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2]+1" office:value-type="float" office:value="302" calcext:value-type="float">
            <text:p>3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3]+1" office:value-type="float" office:value="303" calcext:value-type="float">
            <text:p>3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4]+1" office:value-type="float" office:value="304" calcext:value-type="float">
            <text:p>3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5]+1" office:value-type="float" office:value="305" calcext:value-type="float">
            <text:p>3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6]+1" office:value-type="float" office:value="306" calcext:value-type="float">
            <text:p>3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7]+1" office:value-type="float" office:value="307" calcext:value-type="float">
            <text:p>3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8]+1" office:value-type="float" office:value="308" calcext:value-type="float">
            <text:p>3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09]+1" office:value-type="float" office:value="309" calcext:value-type="float">
            <text:p>3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0]+1" office:value-type="float" office:value="310" calcext:value-type="float">
            <text:p>3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1]+1" office:value-type="float" office:value="311" calcext:value-type="float">
            <text:p>3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2]+1" office:value-type="float" office:value="312" calcext:value-type="float">
            <text:p>3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3]+1" office:value-type="float" office:value="313" calcext:value-type="float">
            <text:p>3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4]+1" office:value-type="float" office:value="314" calcext:value-type="float">
            <text:p>3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5]+1" office:value-type="float" office:value="315" calcext:value-type="float">
            <text:p>3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6]+1" office:value-type="float" office:value="316" calcext:value-type="float">
            <text:p>3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7]+1" office:value-type="float" office:value="317" calcext:value-type="float">
            <text:p>3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8]+1"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19]+1" office:value-type="float" office:value="319" calcext:value-type="float">
            <text:p>3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0]+1" office:value-type="float" office:value="320" calcext:value-type="float">
            <text:p>3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1]+1" office:value-type="float" office:value="321" calcext:value-type="float">
            <text:p>3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2]+1" office:value-type="float" office:value="322" calcext:value-type="float">
            <text:p>3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3]+1" office:value-type="float" office:value="323" calcext:value-type="float">
            <text:p>3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4]+1" office:value-type="float" office:value="324" calcext:value-type="float">
            <text:p>3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5]+1" office:value-type="float" office:value="325" calcext:value-type="float">
            <text:p>3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6]+1" office:value-type="float" office:value="326" calcext:value-type="float">
            <text:p>3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7]+1" office:value-type="float" office:value="327" calcext:value-type="float">
            <text:p>3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8]+1" office:value-type="float" office:value="328" calcext:value-type="float">
            <text:p>3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29]+1" office:value-type="float" office:value="329" calcext:value-type="float">
            <text:p>3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0]+1" office:value-type="float" office:value="330" calcext:value-type="float">
            <text:p>3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1]+1" office:value-type="float" office:value="331" calcext:value-type="float">
            <text:p>3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2]+1" office:value-type="float" office:value="332" calcext:value-type="float">
            <text:p>3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3]+1" office:value-type="float" office:value="333" calcext:value-type="float">
            <text:p>3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4]+1" office:value-type="float" office:value="334" calcext:value-type="float">
            <text:p>3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5]+1" office:value-type="float" office:value="335" calcext:value-type="float">
            <text:p>3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6]+1" office:value-type="float" office:value="336" calcext:value-type="float">
            <text:p>3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7]+1" office:value-type="float" office:value="337" calcext:value-type="float">
            <text:p>3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8]+1" office:value-type="float" office:value="338" calcext:value-type="float">
            <text:p>3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39]+1" office:value-type="float" office:value="339" calcext:value-type="float">
            <text:p>3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0]+1" office:value-type="float" office:value="340" calcext:value-type="float">
            <text:p>3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1]+1" office:value-type="float" office:value="341" calcext:value-type="float">
            <text:p>3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2]+1" office:value-type="float" office:value="342" calcext:value-type="float">
            <text:p>3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3]+1" office:value-type="float" office:value="343" calcext:value-type="float">
            <text:p>3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4]+1" office:value-type="float" office:value="344" calcext:value-type="float">
            <text:p>3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5]+1" office:value-type="float" office:value="345" calcext:value-type="float">
            <text:p>3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6]+1" office:value-type="float" office:value="346" calcext:value-type="float">
            <text:p>3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7]+1" office:value-type="float" office:value="347" calcext:value-type="float">
            <text:p>3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8]+1" office:value-type="float" office:value="348" calcext:value-type="float">
            <text:p>3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49]+1" office:value-type="float" office:value="349" calcext:value-type="float">
            <text:p>3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0]+1" office:value-type="float" office:value="350" calcext:value-type="float">
            <text:p>3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1]+1" office:value-type="float" office:value="351" calcext:value-type="float">
            <text:p>3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2]+1" office:value-type="float" office:value="352" calcext:value-type="float">
            <text:p>3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3]+1" office:value-type="float" office:value="353" calcext:value-type="float">
            <text:p>3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4]+1" office:value-type="float" office:value="354" calcext:value-type="float">
            <text:p>3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5]+1" office:value-type="float" office:value="355" calcext:value-type="float">
            <text:p>3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6]+1" office:value-type="float" office:value="356" calcext:value-type="float">
            <text:p>3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7]+1" office:value-type="float" office:value="357" calcext:value-type="float">
            <text:p>3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8]+1" office:value-type="float" office:value="358" calcext:value-type="float">
            <text:p>3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59]+1" office:value-type="float" office:value="359" calcext:value-type="float">
            <text:p>3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0]+1" office:value-type="float" office:value="360" calcext:value-type="float">
            <text:p>3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1]+1" office:value-type="float" office:value="361" calcext:value-type="float">
            <text:p>3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2]+1" office:value-type="float" office:value="362" calcext:value-type="float">
            <text:p>3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3]+1" office:value-type="float" office:value="363" calcext:value-type="float">
            <text:p>3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4]+1" office:value-type="float" office:value="364" calcext:value-type="float">
            <text:p>3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5]+1" office:value-type="float" office:value="365" calcext:value-type="float">
            <text:p>3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6]+1" office:value-type="float" office:value="366" calcext:value-type="float">
            <text:p>3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7]+1" office:value-type="float" office:value="367" calcext:value-type="float">
            <text:p>3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8]+1" office:value-type="float" office:value="368" calcext:value-type="float">
            <text:p>3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69]+1" office:value-type="float" office:value="369" calcext:value-type="float">
            <text:p>3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0]+1" office:value-type="float" office:value="370" calcext:value-type="float">
            <text:p>3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1]+1" office:value-type="float" office:value="371" calcext:value-type="float">
            <text:p>3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2]+1" office:value-type="float" office:value="372" calcext:value-type="float">
            <text:p>3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3]+1" office:value-type="float" office:value="373" calcext:value-type="float">
            <text:p>3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4]+1" office:value-type="float" office:value="374" calcext:value-type="float">
            <text:p>3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5]+1" office:value-type="float" office:value="375" calcext:value-type="float">
            <text:p>3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6]+1" office:value-type="float" office:value="376" calcext:value-type="float">
            <text:p>3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7]+1" office:value-type="float" office:value="377" calcext:value-type="float">
            <text:p>3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8]+1" office:value-type="float" office:value="378" calcext:value-type="float">
            <text:p>3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79]+1" office:value-type="float" office:value="379" calcext:value-type="float">
            <text:p>3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0]+1" office:value-type="float" office:value="380" calcext:value-type="float">
            <text:p>3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1]+1" office:value-type="float" office:value="381" calcext:value-type="float">
            <text:p>3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2]+1" office:value-type="float" office:value="382" calcext:value-type="float">
            <text:p>3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3]+1" office:value-type="float" office:value="383" calcext:value-type="float">
            <text:p>3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4]+1" office:value-type="float" office:value="384" calcext:value-type="float">
            <text:p>3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5]+1" office:value-type="float" office:value="385" calcext:value-type="float">
            <text:p>3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6]+1" office:value-type="float" office:value="386" calcext:value-type="float">
            <text:p>3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7]+1" office:value-type="float" office:value="387" calcext:value-type="float">
            <text:p>3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8]+1" office:value-type="float" office:value="388" calcext:value-type="float">
            <text:p>3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89]+1" office:value-type="float" office:value="389" calcext:value-type="float">
            <text:p>3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0]+1" office:value-type="float" office:value="390" calcext:value-type="float">
            <text:p>3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1]+1" office:value-type="float" office:value="391" calcext:value-type="float">
            <text:p>3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2]+1" office:value-type="float" office:value="392" calcext:value-type="float">
            <text:p>3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3]+1" office:value-type="float" office:value="393" calcext:value-type="float">
            <text:p>3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4]+1" office:value-type="float" office:value="394" calcext:value-type="float">
            <text:p>3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5]+1" office:value-type="float" office:value="395" calcext:value-type="float">
            <text:p>3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6]+1" office:value-type="float" office:value="396" calcext:value-type="float">
            <text:p>3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7]+1" office:value-type="float" office:value="397" calcext:value-type="float">
            <text:p>3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8]+1" office:value-type="float" office:value="398" calcext:value-type="float">
            <text:p>3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399]+1" office:value-type="float" office:value="399" calcext:value-type="float">
            <text:p>3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0]+1" office:value-type="float" office:value="400" calcext:value-type="float">
            <text:p>4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1]+1" office:value-type="float" office:value="401" calcext:value-type="float">
            <text:p>4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2]+1" office:value-type="float" office:value="402" calcext:value-type="float">
            <text:p>4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3]+1" office:value-type="float" office:value="403" calcext:value-type="float">
            <text:p>4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4]+1" office:value-type="float" office:value="404" calcext:value-type="float">
            <text:p>4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5]+1" office:value-type="float" office:value="405" calcext:value-type="float">
            <text:p>4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6]+1" office:value-type="float" office:value="406" calcext:value-type="float">
            <text:p>4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7]+1" office:value-type="float" office:value="407" calcext:value-type="float">
            <text:p>4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8]+1" office:value-type="float" office:value="408" calcext:value-type="float">
            <text:p>4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09]+1" office:value-type="float" office:value="409" calcext:value-type="float">
            <text:p>4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0]+1" office:value-type="float" office:value="410" calcext:value-type="float">
            <text:p>4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1]+1" office:value-type="float" office:value="411" calcext:value-type="float">
            <text:p>4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2]+1" office:value-type="float" office:value="412" calcext:value-type="float">
            <text:p>4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3]+1" office:value-type="float" office:value="413" calcext:value-type="float">
            <text:p>4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4]+1" office:value-type="float" office:value="414" calcext:value-type="float">
            <text:p>4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5]+1" office:value-type="float" office:value="415" calcext:value-type="float">
            <text:p>4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6]+1" office:value-type="float" office:value="416" calcext:value-type="float">
            <text:p>4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7]+1" office:value-type="float" office:value="417" calcext:value-type="float">
            <text:p>4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8]+1" office:value-type="float" office:value="418" calcext:value-type="float">
            <text:p>4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19]+1" office:value-type="float" office:value="419" calcext:value-type="float">
            <text:p>4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0]+1" office:value-type="float" office:value="420" calcext:value-type="float">
            <text:p>4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1]+1" office:value-type="float" office:value="421" calcext:value-type="float">
            <text:p>4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2]+1" office:value-type="float" office:value="422" calcext:value-type="float">
            <text:p>4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3]+1" office:value-type="float" office:value="423" calcext:value-type="float">
            <text:p>4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4]+1" office:value-type="float" office:value="424" calcext:value-type="float">
            <text:p>4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5]+1" office:value-type="float" office:value="425" calcext:value-type="float">
            <text:p>4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6]+1" office:value-type="float" office:value="426" calcext:value-type="float">
            <text:p>4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7]+1" office:value-type="float" office:value="427" calcext:value-type="float">
            <text:p>4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8]+1" office:value-type="float" office:value="428" calcext:value-type="float">
            <text:p>4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29]+1" office:value-type="float" office:value="429" calcext:value-type="float">
            <text:p>4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0]+1" office:value-type="float" office:value="430" calcext:value-type="float">
            <text:p>4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1]+1" office:value-type="float" office:value="431" calcext:value-type="float">
            <text:p>4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2]+1" office:value-type="float" office:value="432" calcext:value-type="float">
            <text:p>4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3]+1" office:value-type="float" office:value="433" calcext:value-type="float">
            <text:p>4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4]+1" office:value-type="float" office:value="434" calcext:value-type="float">
            <text:p>4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5]+1" office:value-type="float" office:value="435" calcext:value-type="float">
            <text:p>4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6]+1" office:value-type="float" office:value="436" calcext:value-type="float">
            <text:p>4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7]+1" office:value-type="float" office:value="437" calcext:value-type="float">
            <text:p>4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8]+1" office:value-type="float" office:value="438" calcext:value-type="float">
            <text:p>4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39]+1" office:value-type="float" office:value="439" calcext:value-type="float">
            <text:p>4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0]+1" office:value-type="float" office:value="440" calcext:value-type="float">
            <text:p>4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1]+1" office:value-type="float" office:value="441" calcext:value-type="float">
            <text:p>4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2]+1" office:value-type="float" office:value="442" calcext:value-type="float">
            <text:p>4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3]+1" office:value-type="float" office:value="443" calcext:value-type="float">
            <text:p>4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4]+1" office:value-type="float" office:value="444" calcext:value-type="float">
            <text:p>4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5]+1" office:value-type="float" office:value="445" calcext:value-type="float">
            <text:p>4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6]+1" office:value-type="float" office:value="446" calcext:value-type="float">
            <text:p>4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7]+1" office:value-type="float" office:value="447" calcext:value-type="float">
            <text:p>4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8]+1" office:value-type="float" office:value="448" calcext:value-type="float">
            <text:p>4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49]+1" office:value-type="float" office:value="449" calcext:value-type="float">
            <text:p>4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0]+1" office:value-type="float" office:value="450" calcext:value-type="float">
            <text:p>4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1]+1" office:value-type="float" office:value="451" calcext:value-type="float">
            <text:p>4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2]+1" office:value-type="float" office:value="452" calcext:value-type="float">
            <text:p>4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3]+1" office:value-type="float" office:value="453" calcext:value-type="float">
            <text:p>4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4]+1" office:value-type="float" office:value="454" calcext:value-type="float">
            <text:p>4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5]+1" office:value-type="float" office:value="455" calcext:value-type="float">
            <text:p>4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6]+1" office:value-type="float" office:value="456" calcext:value-type="float">
            <text:p>4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7]+1" office:value-type="float" office:value="457" calcext:value-type="float">
            <text:p>4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8]+1" office:value-type="float" office:value="458" calcext:value-type="float">
            <text:p>4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59]+1" office:value-type="float" office:value="459" calcext:value-type="float">
            <text:p>4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0]+1" office:value-type="float" office:value="460" calcext:value-type="float">
            <text:p>4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1]+1" office:value-type="float" office:value="461" calcext:value-type="float">
            <text:p>4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2]+1" office:value-type="float" office:value="462" calcext:value-type="float">
            <text:p>4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3]+1" office:value-type="float" office:value="463" calcext:value-type="float">
            <text:p>4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4]+1" office:value-type="float" office:value="464" calcext:value-type="float">
            <text:p>4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5]+1" office:value-type="float" office:value="465" calcext:value-type="float">
            <text:p>4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6]+1" office:value-type="float" office:value="466" calcext:value-type="float">
            <text:p>4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7]+1" office:value-type="float" office:value="467" calcext:value-type="float">
            <text:p>4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8]+1" office:value-type="float" office:value="468" calcext:value-type="float">
            <text:p>4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69]+1" office:value-type="float" office:value="469" calcext:value-type="float">
            <text:p>4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0]+1" office:value-type="float" office:value="470" calcext:value-type="float">
            <text:p>4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1]+1" office:value-type="float" office:value="471" calcext:value-type="float">
            <text:p>4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2]+1" office:value-type="float" office:value="472" calcext:value-type="float">
            <text:p>4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3]+1" office:value-type="float" office:value="473" calcext:value-type="float">
            <text:p>4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4]+1" office:value-type="float" office:value="474" calcext:value-type="float">
            <text:p>4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5]+1" office:value-type="float" office:value="475" calcext:value-type="float">
            <text:p>4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6]+1" office:value-type="float" office:value="476" calcext:value-type="float">
            <text:p>4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7]+1" office:value-type="float" office:value="477" calcext:value-type="float">
            <text:p>4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8]+1" office:value-type="float" office:value="478" calcext:value-type="float">
            <text:p>4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79]+1" office:value-type="float" office:value="479" calcext:value-type="float">
            <text:p>4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0]+1" office:value-type="float" office:value="480" calcext:value-type="float">
            <text:p>4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1]+1" office:value-type="float" office:value="481" calcext:value-type="float">
            <text:p>4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2]+1" office:value-type="float" office:value="482" calcext:value-type="float">
            <text:p>4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3]+1" office:value-type="float" office:value="483" calcext:value-type="float">
            <text:p>4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4]+1" office:value-type="float" office:value="484" calcext:value-type="float">
            <text:p>4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5]+1" office:value-type="float" office:value="485" calcext:value-type="float">
            <text:p>4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6]+1" office:value-type="float" office:value="486" calcext:value-type="float">
            <text:p>4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7]+1" office:value-type="float" office:value="487" calcext:value-type="float">
            <text:p>4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8]+1" office:value-type="float" office:value="488" calcext:value-type="float">
            <text:p>4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89]+1" office:value-type="float" office:value="489" calcext:value-type="float">
            <text:p>4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0]+1" office:value-type="float" office:value="490" calcext:value-type="float">
            <text:p>4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1]+1" office:value-type="float" office:value="491" calcext:value-type="float">
            <text:p>4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2]+1" office:value-type="float" office:value="492" calcext:value-type="float">
            <text:p>4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3]+1" office:value-type="float" office:value="493" calcext:value-type="float">
            <text:p>4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4]+1" office:value-type="float" office:value="494" calcext:value-type="float">
            <text:p>4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5]+1" office:value-type="float" office:value="495" calcext:value-type="float">
            <text:p>4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6]+1" office:value-type="float" office:value="496" calcext:value-type="float">
            <text:p>4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7]+1" office:value-type="float" office:value="497" calcext:value-type="float">
            <text:p>4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8]+1" office:value-type="float" office:value="498" calcext:value-type="float">
            <text:p>4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499]+1" office:value-type="float" office:value="499" calcext:value-type="float">
            <text:p>4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0]+1" office:value-type="float" office:value="500" calcext:value-type="float">
            <text:p>5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1]+1" office:value-type="float" office:value="501" calcext:value-type="float">
            <text:p>5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2]+1" office:value-type="float" office:value="502" calcext:value-type="float">
            <text:p>5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3]+1" office:value-type="float" office:value="503" calcext:value-type="float">
            <text:p>5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4]+1" office:value-type="float" office:value="504" calcext:value-type="float">
            <text:p>5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5]+1" office:value-type="float" office:value="505" calcext:value-type="float">
            <text:p>5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6]+1" office:value-type="float" office:value="506" calcext:value-type="float">
            <text:p>5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7]+1" office:value-type="float" office:value="507" calcext:value-type="float">
            <text:p>5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8]+1" office:value-type="float" office:value="508" calcext:value-type="float">
            <text:p>5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09]+1" office:value-type="float" office:value="509" calcext:value-type="float">
            <text:p>5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0]+1" office:value-type="float" office:value="510" calcext:value-type="float">
            <text:p>5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1]+1" office:value-type="float" office:value="511" calcext:value-type="float">
            <text:p>5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2]+1" office:value-type="float" office:value="512" calcext:value-type="float">
            <text:p>5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3]+1" office:value-type="float" office:value="513" calcext:value-type="float">
            <text:p>5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4]+1" office:value-type="float" office:value="514" calcext:value-type="float">
            <text:p>5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5]+1" office:value-type="float" office:value="515" calcext:value-type="float">
            <text:p>5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6]+1" office:value-type="float" office:value="516" calcext:value-type="float">
            <text:p>5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7]+1" office:value-type="float" office:value="517" calcext:value-type="float">
            <text:p>5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8]+1" office:value-type="float" office:value="518" calcext:value-type="float">
            <text:p>5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19]+1" office:value-type="float" office:value="519" calcext:value-type="float">
            <text:p>5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0]+1" office:value-type="float" office:value="520" calcext:value-type="float">
            <text:p>5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1]+1" office:value-type="float" office:value="521" calcext:value-type="float">
            <text:p>5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2]+1" office:value-type="float" office:value="522" calcext:value-type="float">
            <text:p>5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3]+1" office:value-type="float" office:value="523" calcext:value-type="float">
            <text:p>5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4]+1" office:value-type="float" office:value="524" calcext:value-type="float">
            <text:p>5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5]+1" office:value-type="float" office:value="525" calcext:value-type="float">
            <text:p>5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6]+1" office:value-type="float" office:value="526" calcext:value-type="float">
            <text:p>5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7]+1" office:value-type="float" office:value="527" calcext:value-type="float">
            <text:p>5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8]+1" office:value-type="float" office:value="528" calcext:value-type="float">
            <text:p>5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29]+1" office:value-type="float" office:value="529" calcext:value-type="float">
            <text:p>5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0]+1" office:value-type="float" office:value="530" calcext:value-type="float">
            <text:p>5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1]+1" office:value-type="float" office:value="531" calcext:value-type="float">
            <text:p>5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2]+1" office:value-type="float" office:value="532" calcext:value-type="float">
            <text:p>5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3]+1" office:value-type="float" office:value="533" calcext:value-type="float">
            <text:p>5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4]+1" office:value-type="float" office:value="534" calcext:value-type="float">
            <text:p>5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5]+1" office:value-type="float" office:value="535" calcext:value-type="float">
            <text:p>5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6]+1" office:value-type="float" office:value="536" calcext:value-type="float">
            <text:p>5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7]+1" office:value-type="float" office:value="537" calcext:value-type="float">
            <text:p>5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8]+1" office:value-type="float" office:value="538" calcext:value-type="float">
            <text:p>5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39]+1" office:value-type="float" office:value="539" calcext:value-type="float">
            <text:p>5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0]+1" office:value-type="float" office:value="540" calcext:value-type="float">
            <text:p>5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1]+1" office:value-type="float" office:value="541" calcext:value-type="float">
            <text:p>5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2]+1" office:value-type="float" office:value="542" calcext:value-type="float">
            <text:p>5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3]+1" office:value-type="float" office:value="543" calcext:value-type="float">
            <text:p>5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4]+1" office:value-type="float" office:value="544" calcext:value-type="float">
            <text:p>5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5]+1" office:value-type="float" office:value="545" calcext:value-type="float">
            <text:p>5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6]+1" office:value-type="float" office:value="546" calcext:value-type="float">
            <text:p>5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7]+1" office:value-type="float" office:value="547" calcext:value-type="float">
            <text:p>5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8]+1" office:value-type="float" office:value="548" calcext:value-type="float">
            <text:p>5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49]+1" office:value-type="float" office:value="549" calcext:value-type="float">
            <text:p>5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0]+1" office:value-type="float" office:value="550" calcext:value-type="float">
            <text:p>5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1]+1" office:value-type="float" office:value="551" calcext:value-type="float">
            <text:p>5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2]+1" office:value-type="float" office:value="552" calcext:value-type="float">
            <text:p>5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3]+1" office:value-type="float" office:value="553" calcext:value-type="float">
            <text:p>5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4]+1" office:value-type="float" office:value="554" calcext:value-type="float">
            <text:p>5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5]+1" office:value-type="float" office:value="555" calcext:value-type="float">
            <text:p>5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6]+1" office:value-type="float" office:value="556" calcext:value-type="float">
            <text:p>5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7]+1" office:value-type="float" office:value="557" calcext:value-type="float">
            <text:p>5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8]+1" office:value-type="float" office:value="558" calcext:value-type="float">
            <text:p>5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59]+1" office:value-type="float" office:value="559" calcext:value-type="float">
            <text:p>5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0]+1" office:value-type="float" office:value="560" calcext:value-type="float">
            <text:p>5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1]+1" office:value-type="float" office:value="561" calcext:value-type="float">
            <text:p>5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2]+1" office:value-type="float" office:value="562" calcext:value-type="float">
            <text:p>5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3]+1" office:value-type="float" office:value="563" calcext:value-type="float">
            <text:p>5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4]+1" office:value-type="float" office:value="564" calcext:value-type="float">
            <text:p>5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5]+1" office:value-type="float" office:value="565" calcext:value-type="float">
            <text:p>5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6]+1" office:value-type="float" office:value="566" calcext:value-type="float">
            <text:p>5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7]+1" office:value-type="float" office:value="567" calcext:value-type="float">
            <text:p>5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8]+1" office:value-type="float" office:value="568" calcext:value-type="float">
            <text:p>5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69]+1" office:value-type="float" office:value="569" calcext:value-type="float">
            <text:p>5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0]+1" office:value-type="float" office:value="570" calcext:value-type="float">
            <text:p>5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1]+1" office:value-type="float" office:value="571" calcext:value-type="float">
            <text:p>5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2]+1" office:value-type="float" office:value="572" calcext:value-type="float">
            <text:p>5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3]+1" office:value-type="float" office:value="573" calcext:value-type="float">
            <text:p>5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4]+1" office:value-type="float" office:value="574" calcext:value-type="float">
            <text:p>5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5]+1" office:value-type="float" office:value="575" calcext:value-type="float">
            <text:p>5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6]+1" office:value-type="float" office:value="576" calcext:value-type="float">
            <text:p>5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7]+1" office:value-type="float" office:value="577" calcext:value-type="float">
            <text:p>5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8]+1" office:value-type="float" office:value="578" calcext:value-type="float">
            <text:p>5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79]+1" office:value-type="float" office:value="579" calcext:value-type="float">
            <text:p>5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0]+1" office:value-type="float" office:value="580" calcext:value-type="float">
            <text:p>5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1]+1" office:value-type="float" office:value="581" calcext:value-type="float">
            <text:p>5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2]+1" office:value-type="float" office:value="582" calcext:value-type="float">
            <text:p>5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3]+1" office:value-type="float" office:value="583" calcext:value-type="float">
            <text:p>5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4]+1" office:value-type="float" office:value="584" calcext:value-type="float">
            <text:p>5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5]+1" office:value-type="float" office:value="585" calcext:value-type="float">
            <text:p>5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6]+1" office:value-type="float" office:value="586" calcext:value-type="float">
            <text:p>5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7]+1" office:value-type="float" office:value="587" calcext:value-type="float">
            <text:p>5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8]+1" office:value-type="float" office:value="588" calcext:value-type="float">
            <text:p>5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89]+1" office:value-type="float" office:value="589" calcext:value-type="float">
            <text:p>5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0]+1" office:value-type="float" office:value="590" calcext:value-type="float">
            <text:p>5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1]+1" office:value-type="float" office:value="591" calcext:value-type="float">
            <text:p>5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2]+1" office:value-type="float" office:value="592" calcext:value-type="float">
            <text:p>5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3]+1" office:value-type="float" office:value="593" calcext:value-type="float">
            <text:p>5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4]+1" office:value-type="float" office:value="594" calcext:value-type="float">
            <text:p>5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5]+1" office:value-type="float" office:value="595" calcext:value-type="float">
            <text:p>5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6]+1" office:value-type="float" office:value="596" calcext:value-type="float">
            <text:p>5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7]+1" office:value-type="float" office:value="597" calcext:value-type="float">
            <text:p>5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8]+1" office:value-type="float" office:value="598" calcext:value-type="float">
            <text:p>5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599]+1" office:value-type="float" office:value="599" calcext:value-type="float">
            <text:p>5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0]+1" office:value-type="float" office:value="600" calcext:value-type="float">
            <text:p>6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1]+1" office:value-type="float" office:value="601" calcext:value-type="float">
            <text:p>6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2]+1" office:value-type="float" office:value="602" calcext:value-type="float">
            <text:p>6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3]+1" office:value-type="float" office:value="603" calcext:value-type="float">
            <text:p>6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4]+1" office:value-type="float" office:value="604" calcext:value-type="float">
            <text:p>6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5]+1" office:value-type="float" office:value="605" calcext:value-type="float">
            <text:p>6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6]+1" office:value-type="float" office:value="606" calcext:value-type="float">
            <text:p>6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7]+1" office:value-type="float" office:value="607" calcext:value-type="float">
            <text:p>6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8]+1" office:value-type="float" office:value="608" calcext:value-type="float">
            <text:p>6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09]+1" office:value-type="float" office:value="609" calcext:value-type="float">
            <text:p>6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0]+1" office:value-type="float" office:value="610" calcext:value-type="float">
            <text:p>6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1]+1" office:value-type="float" office:value="611" calcext:value-type="float">
            <text:p>6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2]+1" office:value-type="float" office:value="612" calcext:value-type="float">
            <text:p>6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3]+1" office:value-type="float" office:value="613" calcext:value-type="float">
            <text:p>6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4]+1" office:value-type="float" office:value="614" calcext:value-type="float">
            <text:p>6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5]+1" office:value-type="float" office:value="615" calcext:value-type="float">
            <text:p>6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6]+1" office:value-type="float" office:value="616" calcext:value-type="float">
            <text:p>6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7]+1" office:value-type="float" office:value="617" calcext:value-type="float">
            <text:p>6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8]+1" office:value-type="float" office:value="618" calcext:value-type="float">
            <text:p>6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19]+1" office:value-type="float" office:value="619" calcext:value-type="float">
            <text:p>6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0]+1" office:value-type="float" office:value="620" calcext:value-type="float">
            <text:p>6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1]+1" office:value-type="float" office:value="621" calcext:value-type="float">
            <text:p>6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2]+1" office:value-type="float" office:value="622" calcext:value-type="float">
            <text:p>6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3]+1" office:value-type="float" office:value="623" calcext:value-type="float">
            <text:p>6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4]+1" office:value-type="float" office:value="624" calcext:value-type="float">
            <text:p>6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5]+1" office:value-type="float" office:value="625" calcext:value-type="float">
            <text:p>6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6]+1" office:value-type="float" office:value="626" calcext:value-type="float">
            <text:p>6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7]+1" office:value-type="float" office:value="627" calcext:value-type="float">
            <text:p>6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8]+1" office:value-type="float" office:value="628" calcext:value-type="float">
            <text:p>6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29]+1" office:value-type="float" office:value="629" calcext:value-type="float">
            <text:p>6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0]+1" office:value-type="float" office:value="630" calcext:value-type="float">
            <text:p>6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1]+1" office:value-type="float" office:value="631" calcext:value-type="float">
            <text:p>6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2]+1" office:value-type="float" office:value="632" calcext:value-type="float">
            <text:p>6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3]+1" office:value-type="float" office:value="633" calcext:value-type="float">
            <text:p>6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4]+1" office:value-type="float" office:value="634" calcext:value-type="float">
            <text:p>6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5]+1" office:value-type="float" office:value="635" calcext:value-type="float">
            <text:p>6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6]+1" office:value-type="float" office:value="636" calcext:value-type="float">
            <text:p>6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7]+1" office:value-type="float" office:value="637" calcext:value-type="float">
            <text:p>6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8]+1" office:value-type="float" office:value="638" calcext:value-type="float">
            <text:p>6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39]+1" office:value-type="float" office:value="639" calcext:value-type="float">
            <text:p>6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0]+1" office:value-type="float" office:value="640" calcext:value-type="float">
            <text:p>6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1]+1" office:value-type="float" office:value="641" calcext:value-type="float">
            <text:p>6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2]+1" office:value-type="float" office:value="642" calcext:value-type="float">
            <text:p>6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3]+1" office:value-type="float" office:value="643" calcext:value-type="float">
            <text:p>6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4]+1" office:value-type="float" office:value="644" calcext:value-type="float">
            <text:p>6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5]+1" office:value-type="float" office:value="645" calcext:value-type="float">
            <text:p>6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6]+1" office:value-type="float" office:value="646" calcext:value-type="float">
            <text:p>6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7]+1" office:value-type="float" office:value="647" calcext:value-type="float">
            <text:p>6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8]+1" office:value-type="float" office:value="648" calcext:value-type="float">
            <text:p>6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49]+1" office:value-type="float" office:value="649" calcext:value-type="float">
            <text:p>6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0]+1" office:value-type="float" office:value="650" calcext:value-type="float">
            <text:p>6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1]+1" office:value-type="float" office:value="651" calcext:value-type="float">
            <text:p>6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2]+1" office:value-type="float" office:value="652" calcext:value-type="float">
            <text:p>6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3]+1" office:value-type="float" office:value="653" calcext:value-type="float">
            <text:p>6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4]+1" office:value-type="float" office:value="654" calcext:value-type="float">
            <text:p>6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5]+1" office:value-type="float" office:value="655" calcext:value-type="float">
            <text:p>6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6]+1" office:value-type="float" office:value="656" calcext:value-type="float">
            <text:p>6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7]+1" office:value-type="float" office:value="657" calcext:value-type="float">
            <text:p>6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8]+1" office:value-type="float" office:value="658" calcext:value-type="float">
            <text:p>6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59]+1" office:value-type="float" office:value="659" calcext:value-type="float">
            <text:p>6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0]+1" office:value-type="float" office:value="660" calcext:value-type="float">
            <text:p>6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1]+1" office:value-type="float" office:value="661" calcext:value-type="float">
            <text:p>6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2]+1" office:value-type="float" office:value="662" calcext:value-type="float">
            <text:p>6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3]+1" office:value-type="float" office:value="663" calcext:value-type="float">
            <text:p>6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4]+1" office:value-type="float" office:value="664" calcext:value-type="float">
            <text:p>6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5]+1" office:value-type="float" office:value="665" calcext:value-type="float">
            <text:p>6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6]+1" office:value-type="float" office:value="666" calcext:value-type="float">
            <text:p>6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7]+1" office:value-type="float" office:value="667" calcext:value-type="float">
            <text:p>6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8]+1" office:value-type="float" office:value="668" calcext:value-type="float">
            <text:p>6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69]+1" office:value-type="float" office:value="669" calcext:value-type="float">
            <text:p>6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0]+1" office:value-type="float" office:value="670" calcext:value-type="float">
            <text:p>6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1]+1" office:value-type="float" office:value="671" calcext:value-type="float">
            <text:p>6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2]+1" office:value-type="float" office:value="672" calcext:value-type="float">
            <text:p>6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3]+1" office:value-type="float" office:value="673" calcext:value-type="float">
            <text:p>6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4]+1" office:value-type="float" office:value="674" calcext:value-type="float">
            <text:p>6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5]+1" office:value-type="float" office:value="675" calcext:value-type="float">
            <text:p>6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6]+1" office:value-type="float" office:value="676" calcext:value-type="float">
            <text:p>6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7]+1" office:value-type="float" office:value="677" calcext:value-type="float">
            <text:p>6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8]+1" office:value-type="float" office:value="678" calcext:value-type="float">
            <text:p>6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79]+1" office:value-type="float" office:value="679" calcext:value-type="float">
            <text:p>6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0]+1" office:value-type="float" office:value="680" calcext:value-type="float">
            <text:p>6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1]+1" office:value-type="float" office:value="681" calcext:value-type="float">
            <text:p>6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2]+1" office:value-type="float" office:value="682" calcext:value-type="float">
            <text:p>6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3]+1" office:value-type="float" office:value="683" calcext:value-type="float">
            <text:p>6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4]+1" office:value-type="float" office:value="684" calcext:value-type="float">
            <text:p>6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5]+1" office:value-type="float" office:value="685" calcext:value-type="float">
            <text:p>6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6]+1" office:value-type="float" office:value="686" calcext:value-type="float">
            <text:p>6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7]+1" office:value-type="float" office:value="687" calcext:value-type="float">
            <text:p>6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8]+1" office:value-type="float" office:value="688" calcext:value-type="float">
            <text:p>6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89]+1" office:value-type="float" office:value="689" calcext:value-type="float">
            <text:p>6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0]+1" office:value-type="float" office:value="690" calcext:value-type="float">
            <text:p>6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1]+1" office:value-type="float" office:value="691" calcext:value-type="float">
            <text:p>6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2]+1" office:value-type="float" office:value="692" calcext:value-type="float">
            <text:p>6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3]+1" office:value-type="float" office:value="693" calcext:value-type="float">
            <text:p>6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4]+1" office:value-type="float" office:value="694" calcext:value-type="float">
            <text:p>6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5]+1" office:value-type="float" office:value="695" calcext:value-type="float">
            <text:p>6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6]+1" office:value-type="float" office:value="696" calcext:value-type="float">
            <text:p>6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7]+1" office:value-type="float" office:value="697" calcext:value-type="float">
            <text:p>6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8]+1" office:value-type="float" office:value="698" calcext:value-type="float">
            <text:p>6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699]+1" office:value-type="float" office:value="699" calcext:value-type="float">
            <text:p>6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0]+1" office:value-type="float" office:value="700" calcext:value-type="float">
            <text:p>7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1]+1" office:value-type="float" office:value="701" calcext:value-type="float">
            <text:p>7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2]+1" office:value-type="float" office:value="702" calcext:value-type="float">
            <text:p>7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3]+1" office:value-type="float" office:value="703" calcext:value-type="float">
            <text:p>7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4]+1" office:value-type="float" office:value="704" calcext:value-type="float">
            <text:p>7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5]+1" office:value-type="float" office:value="705" calcext:value-type="float">
            <text:p>7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6]+1" office:value-type="float" office:value="706" calcext:value-type="float">
            <text:p>7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7]+1" office:value-type="float" office:value="707" calcext:value-type="float">
            <text:p>7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8]+1" office:value-type="float" office:value="708" calcext:value-type="float">
            <text:p>7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09]+1" office:value-type="float" office:value="709" calcext:value-type="float">
            <text:p>7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0]+1" office:value-type="float" office:value="710" calcext:value-type="float">
            <text:p>7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1]+1" office:value-type="float" office:value="711" calcext:value-type="float">
            <text:p>7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2]+1" office:value-type="float" office:value="712" calcext:value-type="float">
            <text:p>7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3]+1" office:value-type="float" office:value="713" calcext:value-type="float">
            <text:p>7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4]+1" office:value-type="float" office:value="714" calcext:value-type="float">
            <text:p>7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5]+1" office:value-type="float" office:value="715" calcext:value-type="float">
            <text:p>7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6]+1" office:value-type="float" office:value="716" calcext:value-type="float">
            <text:p>7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7]+1" office:value-type="float" office:value="717" calcext:value-type="float">
            <text:p>7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8]+1" office:value-type="float" office:value="718" calcext:value-type="float">
            <text:p>7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19]+1" office:value-type="float" office:value="719" calcext:value-type="float">
            <text:p>7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0]+1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1]+1" office:value-type="float" office:value="721" calcext:value-type="float">
            <text:p>7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2]+1" office:value-type="float" office:value="722" calcext:value-type="float">
            <text:p>7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3]+1" office:value-type="float" office:value="723" calcext:value-type="float">
            <text:p>7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4]+1" office:value-type="float" office:value="724" calcext:value-type="float">
            <text:p>7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5]+1" office:value-type="float" office:value="725" calcext:value-type="float">
            <text:p>7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6]+1" office:value-type="float" office:value="726" calcext:value-type="float">
            <text:p>7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7]+1" office:value-type="float" office:value="727" calcext:value-type="float">
            <text:p>7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8]+1" office:value-type="float" office:value="728" calcext:value-type="float">
            <text:p>7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29]+1" office:value-type="float" office:value="729" calcext:value-type="float">
            <text:p>7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0]+1" office:value-type="float" office:value="730" calcext:value-type="float">
            <text:p>7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1]+1" office:value-type="float" office:value="731" calcext:value-type="float">
            <text:p>7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2]+1" office:value-type="float" office:value="732" calcext:value-type="float">
            <text:p>7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3]+1" office:value-type="float" office:value="733" calcext:value-type="float">
            <text:p>7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4]+1" office:value-type="float" office:value="734" calcext:value-type="float">
            <text:p>7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5]+1" office:value-type="float" office:value="735" calcext:value-type="float">
            <text:p>7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6]+1" office:value-type="float" office:value="736" calcext:value-type="float">
            <text:p>7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7]+1" office:value-type="float" office:value="737" calcext:value-type="float">
            <text:p>7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8]+1" office:value-type="float" office:value="738" calcext:value-type="float">
            <text:p>7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39]+1" office:value-type="float" office:value="739" calcext:value-type="float">
            <text:p>7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0]+1" office:value-type="float" office:value="740" calcext:value-type="float">
            <text:p>7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1]+1" office:value-type="float" office:value="741" calcext:value-type="float">
            <text:p>7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2]+1" office:value-type="float" office:value="742" calcext:value-type="float">
            <text:p>7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3]+1" office:value-type="float" office:value="743" calcext:value-type="float">
            <text:p>7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4]+1" office:value-type="float" office:value="744" calcext:value-type="float">
            <text:p>7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5]+1" office:value-type="float" office:value="745" calcext:value-type="float">
            <text:p>7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6]+1" office:value-type="float" office:value="746" calcext:value-type="float">
            <text:p>7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7]+1" office:value-type="float" office:value="747" calcext:value-type="float">
            <text:p>7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8]+1" office:value-type="float" office:value="748" calcext:value-type="float">
            <text:p>7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49]+1" office:value-type="float" office:value="749" calcext:value-type="float">
            <text:p>7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0]+1" office:value-type="float" office:value="750" calcext:value-type="float">
            <text:p>7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1]+1" office:value-type="float" office:value="751" calcext:value-type="float">
            <text:p>7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2]+1" office:value-type="float" office:value="752" calcext:value-type="float">
            <text:p>7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3]+1" office:value-type="float" office:value="753" calcext:value-type="float">
            <text:p>7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4]+1" office:value-type="float" office:value="754" calcext:value-type="float">
            <text:p>7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5]+1" office:value-type="float" office:value="755" calcext:value-type="float">
            <text:p>7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6]+1" office:value-type="float" office:value="756" calcext:value-type="float">
            <text:p>7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7]+1" office:value-type="float" office:value="757" calcext:value-type="float">
            <text:p>7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8]+1" office:value-type="float" office:value="758" calcext:value-type="float">
            <text:p>7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59]+1" office:value-type="float" office:value="759" calcext:value-type="float">
            <text:p>7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0]+1" office:value-type="float" office:value="760" calcext:value-type="float">
            <text:p>7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1]+1" office:value-type="float" office:value="761" calcext:value-type="float">
            <text:p>7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2]+1" office:value-type="float" office:value="762" calcext:value-type="float">
            <text:p>7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3]+1" office:value-type="float" office:value="763" calcext:value-type="float">
            <text:p>7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4]+1" office:value-type="float" office:value="764" calcext:value-type="float">
            <text:p>7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5]+1" office:value-type="float" office:value="765" calcext:value-type="float">
            <text:p>7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6]+1" office:value-type="float" office:value="766" calcext:value-type="float">
            <text:p>7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7]+1" office:value-type="float" office:value="767" calcext:value-type="float">
            <text:p>7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8]+1" office:value-type="float" office:value="768" calcext:value-type="float">
            <text:p>7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69]+1" office:value-type="float" office:value="769" calcext:value-type="float">
            <text:p>7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0]+1" office:value-type="float" office:value="770" calcext:value-type="float">
            <text:p>7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1]+1" office:value-type="float" office:value="771" calcext:value-type="float">
            <text:p>7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2]+1" office:value-type="float" office:value="772" calcext:value-type="float">
            <text:p>7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3]+1" office:value-type="float" office:value="773" calcext:value-type="float">
            <text:p>7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4]+1" office:value-type="float" office:value="774" calcext:value-type="float">
            <text:p>7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5]+1" office:value-type="float" office:value="775" calcext:value-type="float">
            <text:p>7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6]+1" office:value-type="float" office:value="776" calcext:value-type="float">
            <text:p>7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7]+1" office:value-type="float" office:value="777" calcext:value-type="float">
            <text:p>7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8]+1" office:value-type="float" office:value="778" calcext:value-type="float">
            <text:p>7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79]+1" office:value-type="float" office:value="779" calcext:value-type="float">
            <text:p>7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0]+1" office:value-type="float" office:value="780" calcext:value-type="float">
            <text:p>7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1]+1" office:value-type="float" office:value="781" calcext:value-type="float">
            <text:p>7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2]+1" office:value-type="float" office:value="782" calcext:value-type="float">
            <text:p>7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3]+1" office:value-type="float" office:value="783" calcext:value-type="float">
            <text:p>7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4]+1" office:value-type="float" office:value="784" calcext:value-type="float">
            <text:p>7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5]+1" office:value-type="float" office:value="785" calcext:value-type="float">
            <text:p>7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6]+1" office:value-type="float" office:value="786" calcext:value-type="float">
            <text:p>7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7]+1" office:value-type="float" office:value="787" calcext:value-type="float">
            <text:p>7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8]+1" office:value-type="float" office:value="788" calcext:value-type="float">
            <text:p>7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89]+1" office:value-type="float" office:value="789" calcext:value-type="float">
            <text:p>7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0]+1" office:value-type="float" office:value="790" calcext:value-type="float">
            <text:p>7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1]+1" office:value-type="float" office:value="791" calcext:value-type="float">
            <text:p>7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2]+1" office:value-type="float" office:value="792" calcext:value-type="float">
            <text:p>7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3]+1" office:value-type="float" office:value="793" calcext:value-type="float">
            <text:p>7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4]+1" office:value-type="float" office:value="794" calcext:value-type="float">
            <text:p>7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5]+1" office:value-type="float" office:value="795" calcext:value-type="float">
            <text:p>7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6]+1" office:value-type="float" office:value="796" calcext:value-type="float">
            <text:p>7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7]+1" office:value-type="float" office:value="797" calcext:value-type="float">
            <text:p>7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8]+1" office:value-type="float" office:value="798" calcext:value-type="float">
            <text:p>7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799]+1" office:value-type="float" office:value="799" calcext:value-type="float">
            <text:p>7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0]+1" office:value-type="float" office:value="800" calcext:value-type="float">
            <text:p>8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1]+1" office:value-type="float" office:value="801" calcext:value-type="float">
            <text:p>8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2]+1" office:value-type="float" office:value="802" calcext:value-type="float">
            <text:p>8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3]+1" office:value-type="float" office:value="803" calcext:value-type="float">
            <text:p>8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4]+1" office:value-type="float" office:value="804" calcext:value-type="float">
            <text:p>8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5]+1" office:value-type="float" office:value="805" calcext:value-type="float">
            <text:p>8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6]+1" office:value-type="float" office:value="806" calcext:value-type="float">
            <text:p>8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7]+1" office:value-type="float" office:value="807" calcext:value-type="float">
            <text:p>8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8]+1" office:value-type="float" office:value="808" calcext:value-type="float">
            <text:p>8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09]+1" office:value-type="float" office:value="809" calcext:value-type="float">
            <text:p>8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0]+1" office:value-type="float" office:value="810" calcext:value-type="float">
            <text:p>8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1]+1" office:value-type="float" office:value="811" calcext:value-type="float">
            <text:p>8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2]+1" office:value-type="float" office:value="812" calcext:value-type="float">
            <text:p>8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3]+1" office:value-type="float" office:value="813" calcext:value-type="float">
            <text:p>8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4]+1" office:value-type="float" office:value="814" calcext:value-type="float">
            <text:p>8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5]+1" office:value-type="float" office:value="815" calcext:value-type="float">
            <text:p>8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6]+1" office:value-type="float" office:value="816" calcext:value-type="float">
            <text:p>8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7]+1" office:value-type="float" office:value="817" calcext:value-type="float">
            <text:p>8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8]+1" office:value-type="float" office:value="818" calcext:value-type="float">
            <text:p>8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19]+1" office:value-type="float" office:value="819" calcext:value-type="float">
            <text:p>8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0]+1" office:value-type="float" office:value="820" calcext:value-type="float">
            <text:p>8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1]+1" office:value-type="float" office:value="821" calcext:value-type="float">
            <text:p>8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2]+1" office:value-type="float" office:value="822" calcext:value-type="float">
            <text:p>8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3]+1" office:value-type="float" office:value="823" calcext:value-type="float">
            <text:p>8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4]+1" office:value-type="float" office:value="824" calcext:value-type="float">
            <text:p>8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5]+1" office:value-type="float" office:value="825" calcext:value-type="float">
            <text:p>8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6]+1" office:value-type="float" office:value="826" calcext:value-type="float">
            <text:p>8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7]+1" office:value-type="float" office:value="827" calcext:value-type="float">
            <text:p>8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8]+1" office:value-type="float" office:value="828" calcext:value-type="float">
            <text:p>8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29]+1" office:value-type="float" office:value="829" calcext:value-type="float">
            <text:p>8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0]+1" office:value-type="float" office:value="830" calcext:value-type="float">
            <text:p>8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1]+1" office:value-type="float" office:value="831" calcext:value-type="float">
            <text:p>8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2]+1" office:value-type="float" office:value="832" calcext:value-type="float">
            <text:p>8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3]+1" office:value-type="float" office:value="833" calcext:value-type="float">
            <text:p>8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4]+1" office:value-type="float" office:value="834" calcext:value-type="float">
            <text:p>8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5]+1" office:value-type="float" office:value="835" calcext:value-type="float">
            <text:p>8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6]+1" office:value-type="float" office:value="836" calcext:value-type="float">
            <text:p>8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7]+1" office:value-type="float" office:value="837" calcext:value-type="float">
            <text:p>8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8]+1" office:value-type="float" office:value="838" calcext:value-type="float">
            <text:p>8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39]+1" office:value-type="float" office:value="839" calcext:value-type="float">
            <text:p>8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0]+1" office:value-type="float" office:value="840" calcext:value-type="float">
            <text:p>8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1]+1" office:value-type="float" office:value="841" calcext:value-type="float">
            <text:p>8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2]+1" office:value-type="float" office:value="842" calcext:value-type="float">
            <text:p>8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3]+1" office:value-type="float" office:value="843" calcext:value-type="float">
            <text:p>8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4]+1" office:value-type="float" office:value="844" calcext:value-type="float">
            <text:p>8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5]+1" office:value-type="float" office:value="845" calcext:value-type="float">
            <text:p>8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6]+1" office:value-type="float" office:value="846" calcext:value-type="float">
            <text:p>8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7]+1" office:value-type="float" office:value="847" calcext:value-type="float">
            <text:p>8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8]+1" office:value-type="float" office:value="848" calcext:value-type="float">
            <text:p>8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49]+1" office:value-type="float" office:value="849" calcext:value-type="float">
            <text:p>8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0]+1" office:value-type="float" office:value="850" calcext:value-type="float">
            <text:p>8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1]+1" office:value-type="float" office:value="851" calcext:value-type="float">
            <text:p>8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2]+1" office:value-type="float" office:value="852" calcext:value-type="float">
            <text:p>8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3]+1" office:value-type="float" office:value="853" calcext:value-type="float">
            <text:p>8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4]+1" office:value-type="float" office:value="854" calcext:value-type="float">
            <text:p>8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5]+1" office:value-type="float" office:value="855" calcext:value-type="float">
            <text:p>8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6]+1" office:value-type="float" office:value="856" calcext:value-type="float">
            <text:p>8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7]+1" office:value-type="float" office:value="857" calcext:value-type="float">
            <text:p>8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8]+1" office:value-type="float" office:value="858" calcext:value-type="float">
            <text:p>8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59]+1" office:value-type="float" office:value="859" calcext:value-type="float">
            <text:p>8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0]+1" office:value-type="float" office:value="860" calcext:value-type="float">
            <text:p>8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1]+1" office:value-type="float" office:value="861" calcext:value-type="float">
            <text:p>8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2]+1" office:value-type="float" office:value="862" calcext:value-type="float">
            <text:p>8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3]+1" office:value-type="float" office:value="863" calcext:value-type="float">
            <text:p>8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4]+1" office:value-type="float" office:value="864" calcext:value-type="float">
            <text:p>8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5]+1" office:value-type="float" office:value="865" calcext:value-type="float">
            <text:p>8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6]+1" office:value-type="float" office:value="866" calcext:value-type="float">
            <text:p>8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7]+1" office:value-type="float" office:value="867" calcext:value-type="float">
            <text:p>8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8]+1" office:value-type="float" office:value="868" calcext:value-type="float">
            <text:p>8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69]+1" office:value-type="float" office:value="869" calcext:value-type="float">
            <text:p>8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0]+1" office:value-type="float" office:value="870" calcext:value-type="float">
            <text:p>8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1]+1" office:value-type="float" office:value="871" calcext:value-type="float">
            <text:p>8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2]+1" office:value-type="float" office:value="872" calcext:value-type="float">
            <text:p>8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3]+1" office:value-type="float" office:value="873" calcext:value-type="float">
            <text:p>8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4]+1" office:value-type="float" office:value="874" calcext:value-type="float">
            <text:p>8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5]+1" office:value-type="float" office:value="875" calcext:value-type="float">
            <text:p>8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6]+1" office:value-type="float" office:value="876" calcext:value-type="float">
            <text:p>8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7]+1" office:value-type="float" office:value="877" calcext:value-type="float">
            <text:p>8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8]+1" office:value-type="float" office:value="878" calcext:value-type="float">
            <text:p>8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79]+1" office:value-type="float" office:value="879" calcext:value-type="float">
            <text:p>8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0]+1" office:value-type="float" office:value="880" calcext:value-type="float">
            <text:p>8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1]+1" office:value-type="float" office:value="881" calcext:value-type="float">
            <text:p>8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2]+1" office:value-type="float" office:value="882" calcext:value-type="float">
            <text:p>8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3]+1" office:value-type="float" office:value="883" calcext:value-type="float">
            <text:p>8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4]+1" office:value-type="float" office:value="884" calcext:value-type="float">
            <text:p>8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5]+1" office:value-type="float" office:value="885" calcext:value-type="float">
            <text:p>8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6]+1" office:value-type="float" office:value="886" calcext:value-type="float">
            <text:p>8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7]+1" office:value-type="float" office:value="887" calcext:value-type="float">
            <text:p>8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8]+1" office:value-type="float" office:value="888" calcext:value-type="float">
            <text:p>8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89]+1" office:value-type="float" office:value="889" calcext:value-type="float">
            <text:p>8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0]+1" office:value-type="float" office:value="890" calcext:value-type="float">
            <text:p>8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1]+1" office:value-type="float" office:value="891" calcext:value-type="float">
            <text:p>8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2]+1" office:value-type="float" office:value="892" calcext:value-type="float">
            <text:p>8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3]+1" office:value-type="float" office:value="893" calcext:value-type="float">
            <text:p>8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4]+1" office:value-type="float" office:value="894" calcext:value-type="float">
            <text:p>8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5]+1" office:value-type="float" office:value="895" calcext:value-type="float">
            <text:p>8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6]+1" office:value-type="float" office:value="896" calcext:value-type="float">
            <text:p>8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7]+1" office:value-type="float" office:value="897" calcext:value-type="float">
            <text:p>8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8]+1" office:value-type="float" office:value="898" calcext:value-type="float">
            <text:p>8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899]+1" office:value-type="float" office:value="899" calcext:value-type="float">
            <text:p>8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0]+1" office:value-type="float" office:value="900" calcext:value-type="float">
            <text:p>90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1]+1" office:value-type="float" office:value="901" calcext:value-type="float">
            <text:p>90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2]+1" office:value-type="float" office:value="902" calcext:value-type="float">
            <text:p>90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3]+1" office:value-type="float" office:value="903" calcext:value-type="float">
            <text:p>90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4]+1" office:value-type="float" office:value="904" calcext:value-type="float">
            <text:p>90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5]+1" office:value-type="float" office:value="905" calcext:value-type="float">
            <text:p>90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6]+1" office:value-type="float" office:value="906" calcext:value-type="float">
            <text:p>90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7]+1" office:value-type="float" office:value="907" calcext:value-type="float">
            <text:p>90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8]+1" office:value-type="float" office:value="908" calcext:value-type="float">
            <text:p>90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09]+1" office:value-type="float" office:value="909" calcext:value-type="float">
            <text:p>90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0]+1" office:value-type="float" office:value="910" calcext:value-type="float">
            <text:p>91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1]+1" office:value-type="float" office:value="911" calcext:value-type="float">
            <text:p>91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2]+1" office:value-type="float" office:value="912" calcext:value-type="float">
            <text:p>91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3]+1" office:value-type="float" office:value="913" calcext:value-type="float">
            <text:p>91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4]+1" office:value-type="float" office:value="914" calcext:value-type="float">
            <text:p>91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5]+1" office:value-type="float" office:value="915" calcext:value-type="float">
            <text:p>91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6]+1" office:value-type="float" office:value="916" calcext:value-type="float">
            <text:p>91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7]+1" office:value-type="float" office:value="917" calcext:value-type="float">
            <text:p>91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8]+1" office:value-type="float" office:value="918" calcext:value-type="float">
            <text:p>91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19]+1" office:value-type="float" office:value="919" calcext:value-type="float">
            <text:p>91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0]+1" office:value-type="float" office:value="920" calcext:value-type="float">
            <text:p>92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1]+1" office:value-type="float" office:value="921" calcext:value-type="float">
            <text:p>92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2]+1" office:value-type="float" office:value="922" calcext:value-type="float">
            <text:p>92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3]+1" office:value-type="float" office:value="923" calcext:value-type="float">
            <text:p>92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4]+1" office:value-type="float" office:value="924" calcext:value-type="float">
            <text:p>92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5]+1" office:value-type="float" office:value="925" calcext:value-type="float">
            <text:p>92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6]+1" office:value-type="float" office:value="926" calcext:value-type="float">
            <text:p>92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7]+1" office:value-type="float" office:value="927" calcext:value-type="float">
            <text:p>92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8]+1" office:value-type="float" office:value="928" calcext:value-type="float">
            <text:p>92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29]+1" office:value-type="float" office:value="929" calcext:value-type="float">
            <text:p>92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0]+1" office:value-type="float" office:value="930" calcext:value-type="float">
            <text:p>93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1]+1" office:value-type="float" office:value="931" calcext:value-type="float">
            <text:p>93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2]+1" office:value-type="float" office:value="932" calcext:value-type="float">
            <text:p>93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3]+1" office:value-type="float" office:value="933" calcext:value-type="float">
            <text:p>93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4]+1" office:value-type="float" office:value="934" calcext:value-type="float">
            <text:p>93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5]+1" office:value-type="float" office:value="935" calcext:value-type="float">
            <text:p>93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6]+1" office:value-type="float" office:value="936" calcext:value-type="float">
            <text:p>93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7]+1" office:value-type="float" office:value="937" calcext:value-type="float">
            <text:p>93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8]+1" office:value-type="float" office:value="938" calcext:value-type="float">
            <text:p>93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39]+1" office:value-type="float" office:value="939" calcext:value-type="float">
            <text:p>93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0]+1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1]+1" office:value-type="float" office:value="941" calcext:value-type="float">
            <text:p>94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2]+1" office:value-type="float" office:value="942" calcext:value-type="float">
            <text:p>94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3]+1" office:value-type="float" office:value="943" calcext:value-type="float">
            <text:p>94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4]+1" office:value-type="float" office:value="944" calcext:value-type="float">
            <text:p>94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5]+1" office:value-type="float" office:value="945" calcext:value-type="float">
            <text:p>94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6]+1" office:value-type="float" office:value="946" calcext:value-type="float">
            <text:p>94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7]+1" office:value-type="float" office:value="947" calcext:value-type="float">
            <text:p>94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8]+1" office:value-type="float" office:value="948" calcext:value-type="float">
            <text:p>94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49]+1" office:value-type="float" office:value="949" calcext:value-type="float">
            <text:p>94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0]+1" office:value-type="float" office:value="950" calcext:value-type="float">
            <text:p>95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1]+1" office:value-type="float" office:value="951" calcext:value-type="float">
            <text:p>95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2]+1" office:value-type="float" office:value="952" calcext:value-type="float">
            <text:p>95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3]+1" office:value-type="float" office:value="953" calcext:value-type="float">
            <text:p>95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4]+1" office:value-type="float" office:value="954" calcext:value-type="float">
            <text:p>95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5]+1" office:value-type="float" office:value="955" calcext:value-type="float">
            <text:p>95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6]+1" office:value-type="float" office:value="956" calcext:value-type="float">
            <text:p>95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7]+1" office:value-type="float" office:value="957" calcext:value-type="float">
            <text:p>95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8]+1" office:value-type="float" office:value="958" calcext:value-type="float">
            <text:p>95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59]+1" office:value-type="float" office:value="959" calcext:value-type="float">
            <text:p>95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0]+1" office:value-type="float" office:value="960" calcext:value-type="float">
            <text:p>96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1]+1" office:value-type="float" office:value="961" calcext:value-type="float">
            <text:p>96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2]+1" office:value-type="float" office:value="962" calcext:value-type="float">
            <text:p>96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3]+1" office:value-type="float" office:value="963" calcext:value-type="float">
            <text:p>96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4]+1" office:value-type="float" office:value="964" calcext:value-type="float">
            <text:p>96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5]+1" office:value-type="float" office:value="965" calcext:value-type="float">
            <text:p>96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6]+1" office:value-type="float" office:value="966" calcext:value-type="float">
            <text:p>96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7]+1" office:value-type="float" office:value="967" calcext:value-type="float">
            <text:p>96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8]+1" office:value-type="float" office:value="968" calcext:value-type="float">
            <text:p>96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69]+1" office:value-type="float" office:value="969" calcext:value-type="float">
            <text:p>96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0]+1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1]+1" office:value-type="float" office:value="971" calcext:value-type="float">
            <text:p>97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2]+1" office:value-type="float" office:value="972" calcext:value-type="float">
            <text:p>97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3]+1" office:value-type="float" office:value="973" calcext:value-type="float">
            <text:p>97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4]+1" office:value-type="float" office:value="974" calcext:value-type="float">
            <text:p>97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5]+1" office:value-type="float" office:value="975" calcext:value-type="float">
            <text:p>97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6]+1" office:value-type="float" office:value="976" calcext:value-type="float">
            <text:p>97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7]+1" office:value-type="float" office:value="977" calcext:value-type="float">
            <text:p>97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8]+1" office:value-type="float" office:value="978" calcext:value-type="float">
            <text:p>97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79]+1" office:value-type="float" office:value="979" calcext:value-type="float">
            <text:p>97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0]+1" office:value-type="float" office:value="980" calcext:value-type="float">
            <text:p>98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1]+1" office:value-type="float" office:value="981" calcext:value-type="float">
            <text:p>98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2]+1" office:value-type="float" office:value="982" calcext:value-type="float">
            <text:p>98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3]+1" office:value-type="float" office:value="983" calcext:value-type="float">
            <text:p>98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4]+1" office:value-type="float" office:value="984" calcext:value-type="float">
            <text:p>98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5]+1" office:value-type="float" office:value="985" calcext:value-type="float">
            <text:p>98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6]+1" office:value-type="float" office:value="986" calcext:value-type="float">
            <text:p>98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7]+1" office:value-type="float" office:value="987" calcext:value-type="float">
            <text:p>98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8]+1" office:value-type="float" office:value="988" calcext:value-type="float">
            <text:p>98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89]+1" office:value-type="float" office:value="989" calcext:value-type="float">
            <text:p>98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0]+1" office:value-type="float" office:value="990" calcext:value-type="float">
            <text:p>990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1]+1" office:value-type="float" office:value="991" calcext:value-type="float">
            <text:p>991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2]+1" office:value-type="float" office:value="992" calcext:value-type="float">
            <text:p>992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3]+1" office:value-type="float" office:value="993" calcext:value-type="float">
            <text:p>993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4]+1" office:value-type="float" office:value="994" calcext:value-type="float">
            <text:p>994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5]+1" office:value-type="float" office:value="995" calcext:value-type="float">
            <text:p>995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6]+1" office:value-type="float" office:value="996" calcext:value-type="float">
            <text:p>996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7]+1" office:value-type="float" office:value="997" calcext:value-type="float">
            <text:p>997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8]+1" office:value-type="float" office:value="998" calcext:value-type="float">
            <text:p>998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999]+1" office:value-type="float" office:value="999" calcext:value-type="float">
            <text:p>999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4" table:content-validation-name="val1" table:formula="of:=[.B1000]+1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 table:visibility="collapse" table:number-rows-repeated="1047574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cat_context_class.A1:cat_context_class.B1">
            <calcext:condition calcext:apply-style-name="ConditionalStyle_1" calcext:value="formula-is(VLOOKUP([.A1];[$cat_other.$A$2:.$C$9];3;0)&lt;&gt;VLOOKUP([.A1];[$cat_other.$A$2:.$C$9];2;0))" calcext:base-cell-address="cat_context_class.A1"/>
          </calcext:conditional-format>
        </calcext:conditional-formats>
      </table:table>
      <table:table table:name="cat_context" table:style-name="ta5">
        <office:forms form:automatic-focus="false" form:apply-design-mode="false"/>
        <table:table-column table:style-name="co6" table:default-cell-style-name="ce22"/>
        <table:table-column table:style-name="co7" table:default-cell-style-name="ce22"/>
        <table:table-column table:style-name="co9" table:default-cell-style-name="ce34"/>
        <table:table-column table:style-name="co10" table:default-cell-style-name="ce22"/>
        <table:table-column table:style-name="co3" table:number-columns-repeated="16380" table:default-cell-style-name="ce22"/>
        <table:table-row table:style-name="ro1">
          <table:table-cell table:style-name="ce32" office:value-type="string" calcext:value-type="string">
            <text:p>context_code</text:p>
          </table:table-cell>
          <table:table-cell table:style-name="ce32" office:value-type="string" calcext:value-type="string">
            <text:p>context_id</text:p>
          </table:table-cell>
          <table:table-cell table:style-name="ce33" office:value-type="string" calcext:value-type="string">
            <text:p>context_class_id</text:p>
          </table:table-cell>
          <table:table-cell table:style-name="ce33" office:value-type="string" calcext:value-type="string">
            <text:p>context_class_code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SS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content-validation-name="val2" table:formula="of:=VLOOKUP([.D2];[$cat_context_class.$A$2:.$B$1001];2;0)" office:value-type="float" office:value="1" calcext:value-type="float">
            <text:p>1</text:p>
          </table:table-cell>
          <table:table-cell table:style-name="ce9" table:content-validation-name="val3" office:value-type="string" calcext:value-type="string">
            <text:p>Additive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SS-IAU</text:p>
          </table:table-cell>
          <table:table-cell table:style-name="ce4" table:content-validation-name="val1" table:formula="of:=[.B2]+1" office:value-type="float" office:value="2" calcext:value-type="float">
            <text:p>2</text:p>
          </table:table-cell>
          <table:table-cell table:content-validation-name="val2" table:formula="of:=VLOOKUP([.D3];[$cat_context_class.$A$2:.$B$1001];2;0)" office:value-type="float" office:value="1" calcext:value-type="float">
            <text:p>1</text:p>
          </table:table-cell>
          <table:table-cell table:style-name="ce9" table:content-validation-name="val3" office:value-type="string" calcext:value-type="string">
            <text:p>Additive</text:p>
          </table:table-cell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]+1" office:value-type="float" office:value="3" calcext:value-type="float">
            <text:p>3</text:p>
          </table:table-cell>
          <table:table-cell table:content-validation-name="val2" table:formula="of:=VLOOKUP([.D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]+1" office:value-type="float" office:value="4" calcext:value-type="float">
            <text:p>4</text:p>
          </table:table-cell>
          <table:table-cell table:content-validation-name="val2" table:formula="of:=VLOOKUP([.D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]+1" office:value-type="float" office:value="5" calcext:value-type="float">
            <text:p>5</text:p>
          </table:table-cell>
          <table:table-cell table:content-validation-name="val2" table:formula="of:=VLOOKUP([.D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]+1" office:value-type="float" office:value="6" calcext:value-type="float">
            <text:p>6</text:p>
          </table:table-cell>
          <table:table-cell table:content-validation-name="val2" table:formula="of:=VLOOKUP([.D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]+1" office:value-type="float" office:value="7" calcext:value-type="float">
            <text:p>7</text:p>
          </table:table-cell>
          <table:table-cell table:content-validation-name="val2" table:formula="of:=VLOOKUP([.D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]+1" office:value-type="float" office:value="8" calcext:value-type="float">
            <text:p>8</text:p>
          </table:table-cell>
          <table:table-cell table:content-validation-name="val2" table:formula="of:=VLOOKUP([.D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]+1" office:value-type="float" office:value="9" calcext:value-type="float">
            <text:p>9</text:p>
          </table:table-cell>
          <table:table-cell table:content-validation-name="val2" table:formula="of:=VLOOKUP([.D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]+1" office:value-type="float" office:value="10" calcext:value-type="float">
            <text:p>10</text:p>
          </table:table-cell>
          <table:table-cell table:content-validation-name="val2" table:formula="of:=VLOOKUP([.D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]+1" office:value-type="float" office:value="11" calcext:value-type="float">
            <text:p>11</text:p>
          </table:table-cell>
          <table:table-cell table:content-validation-name="val2" table:formula="of:=VLOOKUP([.D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]+1" office:value-type="float" office:value="12" calcext:value-type="float">
            <text:p>12</text:p>
          </table:table-cell>
          <table:table-cell table:content-validation-name="val2" table:formula="of:=VLOOKUP([.D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]+1" office:value-type="float" office:value="13" calcext:value-type="float">
            <text:p>13</text:p>
          </table:table-cell>
          <table:table-cell table:content-validation-name="val2" table:formula="of:=VLOOKUP([.D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]+1" office:value-type="float" office:value="14" calcext:value-type="float">
            <text:p>14</text:p>
          </table:table-cell>
          <table:table-cell table:content-validation-name="val2" table:formula="of:=VLOOKUP([.D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]+1" office:value-type="float" office:value="15" calcext:value-type="float">
            <text:p>15</text:p>
          </table:table-cell>
          <table:table-cell table:content-validation-name="val2" table:formula="of:=VLOOKUP([.D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]+1" office:value-type="float" office:value="16" calcext:value-type="float">
            <text:p>16</text:p>
          </table:table-cell>
          <table:table-cell table:content-validation-name="val2" table:formula="of:=VLOOKUP([.D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]+1" office:value-type="float" office:value="17" calcext:value-type="float">
            <text:p>17</text:p>
          </table:table-cell>
          <table:table-cell table:content-validation-name="val2" table:formula="of:=VLOOKUP([.D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]+1" office:value-type="float" office:value="18" calcext:value-type="float">
            <text:p>18</text:p>
          </table:table-cell>
          <table:table-cell table:content-validation-name="val2" table:formula="of:=VLOOKUP([.D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]+1" office:value-type="float" office:value="19" calcext:value-type="float">
            <text:p>19</text:p>
          </table:table-cell>
          <table:table-cell table:content-validation-name="val2" table:formula="of:=VLOOKUP([.D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]+1" office:value-type="float" office:value="20" calcext:value-type="float">
            <text:p>20</text:p>
          </table:table-cell>
          <table:table-cell table:content-validation-name="val2" table:formula="of:=VLOOKUP([.D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]+1" office:value-type="float" office:value="21" calcext:value-type="float">
            <text:p>21</text:p>
          </table:table-cell>
          <table:table-cell table:content-validation-name="val2" table:formula="of:=VLOOKUP([.D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]+1" office:value-type="float" office:value="22" calcext:value-type="float">
            <text:p>22</text:p>
          </table:table-cell>
          <table:table-cell table:content-validation-name="val2" table:formula="of:=VLOOKUP([.D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]+1" office:value-type="float" office:value="23" calcext:value-type="float">
            <text:p>23</text:p>
          </table:table-cell>
          <table:table-cell table:content-validation-name="val2" table:formula="of:=VLOOKUP([.D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]+1" office:value-type="float" office:value="24" calcext:value-type="float">
            <text:p>24</text:p>
          </table:table-cell>
          <table:table-cell table:content-validation-name="val2" table:formula="of:=VLOOKUP([.D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]+1" office:value-type="float" office:value="25" calcext:value-type="float">
            <text:p>25</text:p>
          </table:table-cell>
          <table:table-cell table:content-validation-name="val2" table:formula="of:=VLOOKUP([.D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]+1" office:value-type="float" office:value="26" calcext:value-type="float">
            <text:p>26</text:p>
          </table:table-cell>
          <table:table-cell table:content-validation-name="val2" table:formula="of:=VLOOKUP([.D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]+1" office:value-type="float" office:value="27" calcext:value-type="float">
            <text:p>27</text:p>
          </table:table-cell>
          <table:table-cell table:content-validation-name="val2" table:formula="of:=VLOOKUP([.D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]+1" office:value-type="float" office:value="28" calcext:value-type="float">
            <text:p>28</text:p>
          </table:table-cell>
          <table:table-cell table:content-validation-name="val2" table:formula="of:=VLOOKUP([.D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]+1" office:value-type="float" office:value="29" calcext:value-type="float">
            <text:p>29</text:p>
          </table:table-cell>
          <table:table-cell table:content-validation-name="val2" table:formula="of:=VLOOKUP([.D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]+1" office:value-type="float" office:value="30" calcext:value-type="float">
            <text:p>30</text:p>
          </table:table-cell>
          <table:table-cell table:content-validation-name="val2" table:formula="of:=VLOOKUP([.D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]+1" office:value-type="float" office:value="31" calcext:value-type="float">
            <text:p>31</text:p>
          </table:table-cell>
          <table:table-cell table:content-validation-name="val2" table:formula="of:=VLOOKUP([.D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]+1" office:value-type="float" office:value="32" calcext:value-type="float">
            <text:p>32</text:p>
          </table:table-cell>
          <table:table-cell table:content-validation-name="val2" table:formula="of:=VLOOKUP([.D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]+1" office:value-type="float" office:value="33" calcext:value-type="float">
            <text:p>33</text:p>
          </table:table-cell>
          <table:table-cell table:content-validation-name="val2" table:formula="of:=VLOOKUP([.D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]+1" office:value-type="float" office:value="34" calcext:value-type="float">
            <text:p>34</text:p>
          </table:table-cell>
          <table:table-cell table:content-validation-name="val2" table:formula="of:=VLOOKUP([.D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]+1" office:value-type="float" office:value="35" calcext:value-type="float">
            <text:p>35</text:p>
          </table:table-cell>
          <table:table-cell table:content-validation-name="val2" table:formula="of:=VLOOKUP([.D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]+1" office:value-type="float" office:value="36" calcext:value-type="float">
            <text:p>36</text:p>
          </table:table-cell>
          <table:table-cell table:content-validation-name="val2" table:formula="of:=VLOOKUP([.D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]+1" office:value-type="float" office:value="37" calcext:value-type="float">
            <text:p>37</text:p>
          </table:table-cell>
          <table:table-cell table:content-validation-name="val2" table:formula="of:=VLOOKUP([.D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]+1" office:value-type="float" office:value="38" calcext:value-type="float">
            <text:p>38</text:p>
          </table:table-cell>
          <table:table-cell table:content-validation-name="val2" table:formula="of:=VLOOKUP([.D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]+1" office:value-type="float" office:value="39" calcext:value-type="float">
            <text:p>39</text:p>
          </table:table-cell>
          <table:table-cell table:content-validation-name="val2" table:formula="of:=VLOOKUP([.D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]+1" office:value-type="float" office:value="40" calcext:value-type="float">
            <text:p>40</text:p>
          </table:table-cell>
          <table:table-cell table:content-validation-name="val2" table:formula="of:=VLOOKUP([.D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]+1" office:value-type="float" office:value="41" calcext:value-type="float">
            <text:p>41</text:p>
          </table:table-cell>
          <table:table-cell table:content-validation-name="val2" table:formula="of:=VLOOKUP([.D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]+1" office:value-type="float" office:value="42" calcext:value-type="float">
            <text:p>42</text:p>
          </table:table-cell>
          <table:table-cell table:content-validation-name="val2" table:formula="of:=VLOOKUP([.D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]+1" office:value-type="float" office:value="43" calcext:value-type="float">
            <text:p>43</text:p>
          </table:table-cell>
          <table:table-cell table:content-validation-name="val2" table:formula="of:=VLOOKUP([.D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]+1" office:value-type="float" office:value="44" calcext:value-type="float">
            <text:p>44</text:p>
          </table:table-cell>
          <table:table-cell table:content-validation-name="val2" table:formula="of:=VLOOKUP([.D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]+1" office:value-type="float" office:value="45" calcext:value-type="float">
            <text:p>45</text:p>
          </table:table-cell>
          <table:table-cell table:content-validation-name="val2" table:formula="of:=VLOOKUP([.D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]+1" office:value-type="float" office:value="46" calcext:value-type="float">
            <text:p>46</text:p>
          </table:table-cell>
          <table:table-cell table:content-validation-name="val2" table:formula="of:=VLOOKUP([.D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]+1" office:value-type="float" office:value="47" calcext:value-type="float">
            <text:p>47</text:p>
          </table:table-cell>
          <table:table-cell table:content-validation-name="val2" table:formula="of:=VLOOKUP([.D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]+1" office:value-type="float" office:value="48" calcext:value-type="float">
            <text:p>48</text:p>
          </table:table-cell>
          <table:table-cell table:content-validation-name="val2" table:formula="of:=VLOOKUP([.D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]+1" office:value-type="float" office:value="49" calcext:value-type="float">
            <text:p>49</text:p>
          </table:table-cell>
          <table:table-cell table:content-validation-name="val2" table:formula="of:=VLOOKUP([.D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]+1" office:value-type="float" office:value="50" calcext:value-type="float">
            <text:p>50</text:p>
          </table:table-cell>
          <table:table-cell table:content-validation-name="val2" table:formula="of:=VLOOKUP([.D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]+1" office:value-type="float" office:value="51" calcext:value-type="float">
            <text:p>51</text:p>
          </table:table-cell>
          <table:table-cell table:content-validation-name="val2" table:formula="of:=VLOOKUP([.D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]+1" office:value-type="float" office:value="52" calcext:value-type="float">
            <text:p>52</text:p>
          </table:table-cell>
          <table:table-cell table:content-validation-name="val2" table:formula="of:=VLOOKUP([.D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]+1" office:value-type="float" office:value="53" calcext:value-type="float">
            <text:p>53</text:p>
          </table:table-cell>
          <table:table-cell table:content-validation-name="val2" table:formula="of:=VLOOKUP([.D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]+1" office:value-type="float" office:value="54" calcext:value-type="float">
            <text:p>54</text:p>
          </table:table-cell>
          <table:table-cell table:content-validation-name="val2" table:formula="of:=VLOOKUP([.D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]+1" office:value-type="float" office:value="55" calcext:value-type="float">
            <text:p>55</text:p>
          </table:table-cell>
          <table:table-cell table:content-validation-name="val2" table:formula="of:=VLOOKUP([.D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]+1" office:value-type="float" office:value="56" calcext:value-type="float">
            <text:p>56</text:p>
          </table:table-cell>
          <table:table-cell table:content-validation-name="val2" table:formula="of:=VLOOKUP([.D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]+1" office:value-type="float" office:value="57" calcext:value-type="float">
            <text:p>57</text:p>
          </table:table-cell>
          <table:table-cell table:content-validation-name="val2" table:formula="of:=VLOOKUP([.D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]+1" office:value-type="float" office:value="58" calcext:value-type="float">
            <text:p>58</text:p>
          </table:table-cell>
          <table:table-cell table:content-validation-name="val2" table:formula="of:=VLOOKUP([.D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]+1" office:value-type="float" office:value="59" calcext:value-type="float">
            <text:p>59</text:p>
          </table:table-cell>
          <table:table-cell table:content-validation-name="val2" table:formula="of:=VLOOKUP([.D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]+1" office:value-type="float" office:value="60" calcext:value-type="float">
            <text:p>60</text:p>
          </table:table-cell>
          <table:table-cell table:content-validation-name="val2" table:formula="of:=VLOOKUP([.D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]+1" office:value-type="float" office:value="61" calcext:value-type="float">
            <text:p>61</text:p>
          </table:table-cell>
          <table:table-cell table:content-validation-name="val2" table:formula="of:=VLOOKUP([.D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]+1" office:value-type="float" office:value="62" calcext:value-type="float">
            <text:p>62</text:p>
          </table:table-cell>
          <table:table-cell table:content-validation-name="val2" table:formula="of:=VLOOKUP([.D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]+1" office:value-type="float" office:value="63" calcext:value-type="float">
            <text:p>63</text:p>
          </table:table-cell>
          <table:table-cell table:content-validation-name="val2" table:formula="of:=VLOOKUP([.D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]+1" office:value-type="float" office:value="64" calcext:value-type="float">
            <text:p>64</text:p>
          </table:table-cell>
          <table:table-cell table:content-validation-name="val2" table:formula="of:=VLOOKUP([.D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]+1" office:value-type="float" office:value="65" calcext:value-type="float">
            <text:p>65</text:p>
          </table:table-cell>
          <table:table-cell table:content-validation-name="val2" table:formula="of:=VLOOKUP([.D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]+1" office:value-type="float" office:value="66" calcext:value-type="float">
            <text:p>66</text:p>
          </table:table-cell>
          <table:table-cell table:content-validation-name="val2" table:formula="of:=VLOOKUP([.D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]+1" office:value-type="float" office:value="67" calcext:value-type="float">
            <text:p>67</text:p>
          </table:table-cell>
          <table:table-cell table:content-validation-name="val2" table:formula="of:=VLOOKUP([.D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]+1" office:value-type="float" office:value="68" calcext:value-type="float">
            <text:p>68</text:p>
          </table:table-cell>
          <table:table-cell table:content-validation-name="val2" table:formula="of:=VLOOKUP([.D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]+1" office:value-type="float" office:value="69" calcext:value-type="float">
            <text:p>69</text:p>
          </table:table-cell>
          <table:table-cell table:content-validation-name="val2" table:formula="of:=VLOOKUP([.D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]+1" office:value-type="float" office:value="70" calcext:value-type="float">
            <text:p>70</text:p>
          </table:table-cell>
          <table:table-cell table:content-validation-name="val2" table:formula="of:=VLOOKUP([.D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]+1" office:value-type="float" office:value="71" calcext:value-type="float">
            <text:p>71</text:p>
          </table:table-cell>
          <table:table-cell table:content-validation-name="val2" table:formula="of:=VLOOKUP([.D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]+1" office:value-type="float" office:value="72" calcext:value-type="float">
            <text:p>72</text:p>
          </table:table-cell>
          <table:table-cell table:content-validation-name="val2" table:formula="of:=VLOOKUP([.D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]+1" office:value-type="float" office:value="73" calcext:value-type="float">
            <text:p>73</text:p>
          </table:table-cell>
          <table:table-cell table:content-validation-name="val2" table:formula="of:=VLOOKUP([.D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]+1" office:value-type="float" office:value="74" calcext:value-type="float">
            <text:p>74</text:p>
          </table:table-cell>
          <table:table-cell table:content-validation-name="val2" table:formula="of:=VLOOKUP([.D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]+1" office:value-type="float" office:value="75" calcext:value-type="float">
            <text:p>75</text:p>
          </table:table-cell>
          <table:table-cell table:content-validation-name="val2" table:formula="of:=VLOOKUP([.D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]+1" office:value-type="float" office:value="76" calcext:value-type="float">
            <text:p>76</text:p>
          </table:table-cell>
          <table:table-cell table:content-validation-name="val2" table:formula="of:=VLOOKUP([.D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]+1" office:value-type="float" office:value="77" calcext:value-type="float">
            <text:p>77</text:p>
          </table:table-cell>
          <table:table-cell table:content-validation-name="val2" table:formula="of:=VLOOKUP([.D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]+1" office:value-type="float" office:value="78" calcext:value-type="float">
            <text:p>78</text:p>
          </table:table-cell>
          <table:table-cell table:content-validation-name="val2" table:formula="of:=VLOOKUP([.D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]+1" office:value-type="float" office:value="79" calcext:value-type="float">
            <text:p>79</text:p>
          </table:table-cell>
          <table:table-cell table:content-validation-name="val2" table:formula="of:=VLOOKUP([.D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]+1" office:value-type="float" office:value="80" calcext:value-type="float">
            <text:p>80</text:p>
          </table:table-cell>
          <table:table-cell table:content-validation-name="val2" table:formula="of:=VLOOKUP([.D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]+1" office:value-type="float" office:value="81" calcext:value-type="float">
            <text:p>81</text:p>
          </table:table-cell>
          <table:table-cell table:content-validation-name="val2" table:formula="of:=VLOOKUP([.D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]+1" office:value-type="float" office:value="82" calcext:value-type="float">
            <text:p>82</text:p>
          </table:table-cell>
          <table:table-cell table:content-validation-name="val2" table:formula="of:=VLOOKUP([.D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]+1" office:value-type="float" office:value="83" calcext:value-type="float">
            <text:p>83</text:p>
          </table:table-cell>
          <table:table-cell table:content-validation-name="val2" table:formula="of:=VLOOKUP([.D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]+1" office:value-type="float" office:value="84" calcext:value-type="float">
            <text:p>84</text:p>
          </table:table-cell>
          <table:table-cell table:content-validation-name="val2" table:formula="of:=VLOOKUP([.D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]+1" office:value-type="float" office:value="85" calcext:value-type="float">
            <text:p>85</text:p>
          </table:table-cell>
          <table:table-cell table:content-validation-name="val2" table:formula="of:=VLOOKUP([.D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]+1" office:value-type="float" office:value="86" calcext:value-type="float">
            <text:p>86</text:p>
          </table:table-cell>
          <table:table-cell table:content-validation-name="val2" table:formula="of:=VLOOKUP([.D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]+1" office:value-type="float" office:value="87" calcext:value-type="float">
            <text:p>87</text:p>
          </table:table-cell>
          <table:table-cell table:content-validation-name="val2" table:formula="of:=VLOOKUP([.D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]+1" office:value-type="float" office:value="88" calcext:value-type="float">
            <text:p>88</text:p>
          </table:table-cell>
          <table:table-cell table:content-validation-name="val2" table:formula="of:=VLOOKUP([.D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]+1" office:value-type="float" office:value="89" calcext:value-type="float">
            <text:p>89</text:p>
          </table:table-cell>
          <table:table-cell table:content-validation-name="val2" table:formula="of:=VLOOKUP([.D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]+1" office:value-type="float" office:value="90" calcext:value-type="float">
            <text:p>90</text:p>
          </table:table-cell>
          <table:table-cell table:content-validation-name="val2" table:formula="of:=VLOOKUP([.D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]+1" office:value-type="float" office:value="91" calcext:value-type="float">
            <text:p>91</text:p>
          </table:table-cell>
          <table:table-cell table:content-validation-name="val2" table:formula="of:=VLOOKUP([.D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]+1" office:value-type="float" office:value="92" calcext:value-type="float">
            <text:p>92</text:p>
          </table:table-cell>
          <table:table-cell table:content-validation-name="val2" table:formula="of:=VLOOKUP([.D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]+1" office:value-type="float" office:value="93" calcext:value-type="float">
            <text:p>93</text:p>
          </table:table-cell>
          <table:table-cell table:content-validation-name="val2" table:formula="of:=VLOOKUP([.D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]+1" office:value-type="float" office:value="94" calcext:value-type="float">
            <text:p>94</text:p>
          </table:table-cell>
          <table:table-cell table:content-validation-name="val2" table:formula="of:=VLOOKUP([.D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]+1" office:value-type="float" office:value="95" calcext:value-type="float">
            <text:p>95</text:p>
          </table:table-cell>
          <table:table-cell table:content-validation-name="val2" table:formula="of:=VLOOKUP([.D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]+1" office:value-type="float" office:value="96" calcext:value-type="float">
            <text:p>96</text:p>
          </table:table-cell>
          <table:table-cell table:content-validation-name="val2" table:formula="of:=VLOOKUP([.D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]+1" office:value-type="float" office:value="97" calcext:value-type="float">
            <text:p>97</text:p>
          </table:table-cell>
          <table:table-cell table:content-validation-name="val2" table:formula="of:=VLOOKUP([.D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]+1" office:value-type="float" office:value="98" calcext:value-type="float">
            <text:p>98</text:p>
          </table:table-cell>
          <table:table-cell table:content-validation-name="val2" table:formula="of:=VLOOKUP([.D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]+1" office:value-type="float" office:value="99" calcext:value-type="float">
            <text:p>99</text:p>
          </table:table-cell>
          <table:table-cell table:content-validation-name="val2" table:formula="of:=VLOOKUP([.D1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0]+1" office:value-type="float" office:value="100" calcext:value-type="float">
            <text:p>100</text:p>
          </table:table-cell>
          <table:table-cell table:content-validation-name="val2" table:formula="of:=VLOOKUP([.D1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1]+1" office:value-type="float" office:value="101" calcext:value-type="float">
            <text:p>101</text:p>
          </table:table-cell>
          <table:table-cell table:content-validation-name="val2" table:formula="of:=VLOOKUP([.D1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2]+1" office:value-type="float" office:value="102" calcext:value-type="float">
            <text:p>102</text:p>
          </table:table-cell>
          <table:table-cell table:content-validation-name="val2" table:formula="of:=VLOOKUP([.D1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3]+1" office:value-type="float" office:value="103" calcext:value-type="float">
            <text:p>103</text:p>
          </table:table-cell>
          <table:table-cell table:content-validation-name="val2" table:formula="of:=VLOOKUP([.D1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4]+1" office:value-type="float" office:value="104" calcext:value-type="float">
            <text:p>104</text:p>
          </table:table-cell>
          <table:table-cell table:content-validation-name="val2" table:formula="of:=VLOOKUP([.D1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5]+1" office:value-type="float" office:value="105" calcext:value-type="float">
            <text:p>105</text:p>
          </table:table-cell>
          <table:table-cell table:content-validation-name="val2" table:formula="of:=VLOOKUP([.D1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6]+1" office:value-type="float" office:value="106" calcext:value-type="float">
            <text:p>106</text:p>
          </table:table-cell>
          <table:table-cell table:content-validation-name="val2" table:formula="of:=VLOOKUP([.D1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7]+1" office:value-type="float" office:value="107" calcext:value-type="float">
            <text:p>107</text:p>
          </table:table-cell>
          <table:table-cell table:content-validation-name="val2" table:formula="of:=VLOOKUP([.D1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8]+1" office:value-type="float" office:value="108" calcext:value-type="float">
            <text:p>108</text:p>
          </table:table-cell>
          <table:table-cell table:content-validation-name="val2" table:formula="of:=VLOOKUP([.D1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9]+1" office:value-type="float" office:value="109" calcext:value-type="float">
            <text:p>109</text:p>
          </table:table-cell>
          <table:table-cell table:content-validation-name="val2" table:formula="of:=VLOOKUP([.D1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0]+1" office:value-type="float" office:value="110" calcext:value-type="float">
            <text:p>110</text:p>
          </table:table-cell>
          <table:table-cell table:content-validation-name="val2" table:formula="of:=VLOOKUP([.D1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1]+1" office:value-type="float" office:value="111" calcext:value-type="float">
            <text:p>111</text:p>
          </table:table-cell>
          <table:table-cell table:content-validation-name="val2" table:formula="of:=VLOOKUP([.D1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2]+1" office:value-type="float" office:value="112" calcext:value-type="float">
            <text:p>112</text:p>
          </table:table-cell>
          <table:table-cell table:content-validation-name="val2" table:formula="of:=VLOOKUP([.D1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3]+1" office:value-type="float" office:value="113" calcext:value-type="float">
            <text:p>113</text:p>
          </table:table-cell>
          <table:table-cell table:content-validation-name="val2" table:formula="of:=VLOOKUP([.D1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4]+1" office:value-type="float" office:value="114" calcext:value-type="float">
            <text:p>114</text:p>
          </table:table-cell>
          <table:table-cell table:content-validation-name="val2" table:formula="of:=VLOOKUP([.D1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5]+1" office:value-type="float" office:value="115" calcext:value-type="float">
            <text:p>115</text:p>
          </table:table-cell>
          <table:table-cell table:content-validation-name="val2" table:formula="of:=VLOOKUP([.D1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6]+1" office:value-type="float" office:value="116" calcext:value-type="float">
            <text:p>116</text:p>
          </table:table-cell>
          <table:table-cell table:content-validation-name="val2" table:formula="of:=VLOOKUP([.D1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7]+1" office:value-type="float" office:value="117" calcext:value-type="float">
            <text:p>117</text:p>
          </table:table-cell>
          <table:table-cell table:content-validation-name="val2" table:formula="of:=VLOOKUP([.D1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8]+1" office:value-type="float" office:value="118" calcext:value-type="float">
            <text:p>118</text:p>
          </table:table-cell>
          <table:table-cell table:content-validation-name="val2" table:formula="of:=VLOOKUP([.D1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19]+1" office:value-type="float" office:value="119" calcext:value-type="float">
            <text:p>119</text:p>
          </table:table-cell>
          <table:table-cell table:content-validation-name="val2" table:formula="of:=VLOOKUP([.D1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0]+1" office:value-type="float" office:value="120" calcext:value-type="float">
            <text:p>120</text:p>
          </table:table-cell>
          <table:table-cell table:content-validation-name="val2" table:formula="of:=VLOOKUP([.D1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1]+1" office:value-type="float" office:value="121" calcext:value-type="float">
            <text:p>121</text:p>
          </table:table-cell>
          <table:table-cell table:content-validation-name="val2" table:formula="of:=VLOOKUP([.D1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2]+1" office:value-type="float" office:value="122" calcext:value-type="float">
            <text:p>122</text:p>
          </table:table-cell>
          <table:table-cell table:content-validation-name="val2" table:formula="of:=VLOOKUP([.D1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3]+1" office:value-type="float" office:value="123" calcext:value-type="float">
            <text:p>123</text:p>
          </table:table-cell>
          <table:table-cell table:content-validation-name="val2" table:formula="of:=VLOOKUP([.D1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4]+1" office:value-type="float" office:value="124" calcext:value-type="float">
            <text:p>124</text:p>
          </table:table-cell>
          <table:table-cell table:content-validation-name="val2" table:formula="of:=VLOOKUP([.D1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5]+1" office:value-type="float" office:value="125" calcext:value-type="float">
            <text:p>125</text:p>
          </table:table-cell>
          <table:table-cell table:content-validation-name="val2" table:formula="of:=VLOOKUP([.D1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6]+1" office:value-type="float" office:value="126" calcext:value-type="float">
            <text:p>126</text:p>
          </table:table-cell>
          <table:table-cell table:content-validation-name="val2" table:formula="of:=VLOOKUP([.D1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7]+1" office:value-type="float" office:value="127" calcext:value-type="float">
            <text:p>127</text:p>
          </table:table-cell>
          <table:table-cell table:content-validation-name="val2" table:formula="of:=VLOOKUP([.D1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8]+1" office:value-type="float" office:value="128" calcext:value-type="float">
            <text:p>128</text:p>
          </table:table-cell>
          <table:table-cell table:content-validation-name="val2" table:formula="of:=VLOOKUP([.D1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29]+1" office:value-type="float" office:value="129" calcext:value-type="float">
            <text:p>129</text:p>
          </table:table-cell>
          <table:table-cell table:content-validation-name="val2" table:formula="of:=VLOOKUP([.D1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0]+1" office:value-type="float" office:value="130" calcext:value-type="float">
            <text:p>130</text:p>
          </table:table-cell>
          <table:table-cell table:content-validation-name="val2" table:formula="of:=VLOOKUP([.D1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1]+1" office:value-type="float" office:value="131" calcext:value-type="float">
            <text:p>131</text:p>
          </table:table-cell>
          <table:table-cell table:content-validation-name="val2" table:formula="of:=VLOOKUP([.D1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2]+1" office:value-type="float" office:value="132" calcext:value-type="float">
            <text:p>132</text:p>
          </table:table-cell>
          <table:table-cell table:content-validation-name="val2" table:formula="of:=VLOOKUP([.D1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3]+1" office:value-type="float" office:value="133" calcext:value-type="float">
            <text:p>133</text:p>
          </table:table-cell>
          <table:table-cell table:content-validation-name="val2" table:formula="of:=VLOOKUP([.D1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4]+1" office:value-type="float" office:value="134" calcext:value-type="float">
            <text:p>134</text:p>
          </table:table-cell>
          <table:table-cell table:content-validation-name="val2" table:formula="of:=VLOOKUP([.D1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5]+1" office:value-type="float" office:value="135" calcext:value-type="float">
            <text:p>135</text:p>
          </table:table-cell>
          <table:table-cell table:content-validation-name="val2" table:formula="of:=VLOOKUP([.D1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6]+1" office:value-type="float" office:value="136" calcext:value-type="float">
            <text:p>136</text:p>
          </table:table-cell>
          <table:table-cell table:content-validation-name="val2" table:formula="of:=VLOOKUP([.D1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7]+1" office:value-type="float" office:value="137" calcext:value-type="float">
            <text:p>137</text:p>
          </table:table-cell>
          <table:table-cell table:content-validation-name="val2" table:formula="of:=VLOOKUP([.D1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8]+1" office:value-type="float" office:value="138" calcext:value-type="float">
            <text:p>138</text:p>
          </table:table-cell>
          <table:table-cell table:content-validation-name="val2" table:formula="of:=VLOOKUP([.D1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39]+1" office:value-type="float" office:value="139" calcext:value-type="float">
            <text:p>139</text:p>
          </table:table-cell>
          <table:table-cell table:content-validation-name="val2" table:formula="of:=VLOOKUP([.D1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0]+1" office:value-type="float" office:value="140" calcext:value-type="float">
            <text:p>140</text:p>
          </table:table-cell>
          <table:table-cell table:content-validation-name="val2" table:formula="of:=VLOOKUP([.D1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1]+1" office:value-type="float" office:value="141" calcext:value-type="float">
            <text:p>141</text:p>
          </table:table-cell>
          <table:table-cell table:content-validation-name="val2" table:formula="of:=VLOOKUP([.D1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2]+1" office:value-type="float" office:value="142" calcext:value-type="float">
            <text:p>142</text:p>
          </table:table-cell>
          <table:table-cell table:content-validation-name="val2" table:formula="of:=VLOOKUP([.D1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3]+1" office:value-type="float" office:value="143" calcext:value-type="float">
            <text:p>143</text:p>
          </table:table-cell>
          <table:table-cell table:content-validation-name="val2" table:formula="of:=VLOOKUP([.D1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4]+1" office:value-type="float" office:value="144" calcext:value-type="float">
            <text:p>144</text:p>
          </table:table-cell>
          <table:table-cell table:content-validation-name="val2" table:formula="of:=VLOOKUP([.D1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5]+1" office:value-type="float" office:value="145" calcext:value-type="float">
            <text:p>145</text:p>
          </table:table-cell>
          <table:table-cell table:content-validation-name="val2" table:formula="of:=VLOOKUP([.D1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6]+1" office:value-type="float" office:value="146" calcext:value-type="float">
            <text:p>146</text:p>
          </table:table-cell>
          <table:table-cell table:content-validation-name="val2" table:formula="of:=VLOOKUP([.D1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7]+1" office:value-type="float" office:value="147" calcext:value-type="float">
            <text:p>147</text:p>
          </table:table-cell>
          <table:table-cell table:content-validation-name="val2" table:formula="of:=VLOOKUP([.D1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8]+1" office:value-type="float" office:value="148" calcext:value-type="float">
            <text:p>148</text:p>
          </table:table-cell>
          <table:table-cell table:content-validation-name="val2" table:formula="of:=VLOOKUP([.D1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49]+1" office:value-type="float" office:value="149" calcext:value-type="float">
            <text:p>149</text:p>
          </table:table-cell>
          <table:table-cell table:content-validation-name="val2" table:formula="of:=VLOOKUP([.D1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0]+1" office:value-type="float" office:value="150" calcext:value-type="float">
            <text:p>150</text:p>
          </table:table-cell>
          <table:table-cell table:content-validation-name="val2" table:formula="of:=VLOOKUP([.D1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1]+1" office:value-type="float" office:value="151" calcext:value-type="float">
            <text:p>151</text:p>
          </table:table-cell>
          <table:table-cell table:content-validation-name="val2" table:formula="of:=VLOOKUP([.D1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2]+1" office:value-type="float" office:value="152" calcext:value-type="float">
            <text:p>152</text:p>
          </table:table-cell>
          <table:table-cell table:content-validation-name="val2" table:formula="of:=VLOOKUP([.D1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3]+1" office:value-type="float" office:value="153" calcext:value-type="float">
            <text:p>153</text:p>
          </table:table-cell>
          <table:table-cell table:content-validation-name="val2" table:formula="of:=VLOOKUP([.D1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4]+1" office:value-type="float" office:value="154" calcext:value-type="float">
            <text:p>154</text:p>
          </table:table-cell>
          <table:table-cell table:content-validation-name="val2" table:formula="of:=VLOOKUP([.D1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5]+1" office:value-type="float" office:value="155" calcext:value-type="float">
            <text:p>155</text:p>
          </table:table-cell>
          <table:table-cell table:content-validation-name="val2" table:formula="of:=VLOOKUP([.D1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6]+1" office:value-type="float" office:value="156" calcext:value-type="float">
            <text:p>156</text:p>
          </table:table-cell>
          <table:table-cell table:content-validation-name="val2" table:formula="of:=VLOOKUP([.D1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7]+1" office:value-type="float" office:value="157" calcext:value-type="float">
            <text:p>157</text:p>
          </table:table-cell>
          <table:table-cell table:content-validation-name="val2" table:formula="of:=VLOOKUP([.D1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8]+1" office:value-type="float" office:value="158" calcext:value-type="float">
            <text:p>158</text:p>
          </table:table-cell>
          <table:table-cell table:content-validation-name="val2" table:formula="of:=VLOOKUP([.D1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59]+1" office:value-type="float" office:value="159" calcext:value-type="float">
            <text:p>159</text:p>
          </table:table-cell>
          <table:table-cell table:content-validation-name="val2" table:formula="of:=VLOOKUP([.D1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0]+1" office:value-type="float" office:value="160" calcext:value-type="float">
            <text:p>160</text:p>
          </table:table-cell>
          <table:table-cell table:content-validation-name="val2" table:formula="of:=VLOOKUP([.D1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1]+1" office:value-type="float" office:value="161" calcext:value-type="float">
            <text:p>161</text:p>
          </table:table-cell>
          <table:table-cell table:content-validation-name="val2" table:formula="of:=VLOOKUP([.D1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2]+1" office:value-type="float" office:value="162" calcext:value-type="float">
            <text:p>162</text:p>
          </table:table-cell>
          <table:table-cell table:content-validation-name="val2" table:formula="of:=VLOOKUP([.D1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3]+1" office:value-type="float" office:value="163" calcext:value-type="float">
            <text:p>163</text:p>
          </table:table-cell>
          <table:table-cell table:content-validation-name="val2" table:formula="of:=VLOOKUP([.D1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4]+1" office:value-type="float" office:value="164" calcext:value-type="float">
            <text:p>164</text:p>
          </table:table-cell>
          <table:table-cell table:content-validation-name="val2" table:formula="of:=VLOOKUP([.D1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5]+1" office:value-type="float" office:value="165" calcext:value-type="float">
            <text:p>165</text:p>
          </table:table-cell>
          <table:table-cell table:content-validation-name="val2" table:formula="of:=VLOOKUP([.D1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6]+1" office:value-type="float" office:value="166" calcext:value-type="float">
            <text:p>166</text:p>
          </table:table-cell>
          <table:table-cell table:content-validation-name="val2" table:formula="of:=VLOOKUP([.D1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7]+1" office:value-type="float" office:value="167" calcext:value-type="float">
            <text:p>167</text:p>
          </table:table-cell>
          <table:table-cell table:content-validation-name="val2" table:formula="of:=VLOOKUP([.D1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8]+1" office:value-type="float" office:value="168" calcext:value-type="float">
            <text:p>168</text:p>
          </table:table-cell>
          <table:table-cell table:content-validation-name="val2" table:formula="of:=VLOOKUP([.D1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69]+1" office:value-type="float" office:value="169" calcext:value-type="float">
            <text:p>169</text:p>
          </table:table-cell>
          <table:table-cell table:content-validation-name="val2" table:formula="of:=VLOOKUP([.D1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0]+1" office:value-type="float" office:value="170" calcext:value-type="float">
            <text:p>170</text:p>
          </table:table-cell>
          <table:table-cell table:content-validation-name="val2" table:formula="of:=VLOOKUP([.D1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1]+1" office:value-type="float" office:value="171" calcext:value-type="float">
            <text:p>171</text:p>
          </table:table-cell>
          <table:table-cell table:content-validation-name="val2" table:formula="of:=VLOOKUP([.D1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2]+1" office:value-type="float" office:value="172" calcext:value-type="float">
            <text:p>172</text:p>
          </table:table-cell>
          <table:table-cell table:content-validation-name="val2" table:formula="of:=VLOOKUP([.D1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3]+1" office:value-type="float" office:value="173" calcext:value-type="float">
            <text:p>173</text:p>
          </table:table-cell>
          <table:table-cell table:content-validation-name="val2" table:formula="of:=VLOOKUP([.D1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4]+1" office:value-type="float" office:value="174" calcext:value-type="float">
            <text:p>174</text:p>
          </table:table-cell>
          <table:table-cell table:content-validation-name="val2" table:formula="of:=VLOOKUP([.D1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5]+1" office:value-type="float" office:value="175" calcext:value-type="float">
            <text:p>175</text:p>
          </table:table-cell>
          <table:table-cell table:content-validation-name="val2" table:formula="of:=VLOOKUP([.D1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6]+1" office:value-type="float" office:value="176" calcext:value-type="float">
            <text:p>176</text:p>
          </table:table-cell>
          <table:table-cell table:content-validation-name="val2" table:formula="of:=VLOOKUP([.D1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7]+1" office:value-type="float" office:value="177" calcext:value-type="float">
            <text:p>177</text:p>
          </table:table-cell>
          <table:table-cell table:content-validation-name="val2" table:formula="of:=VLOOKUP([.D1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8]+1" office:value-type="float" office:value="178" calcext:value-type="float">
            <text:p>178</text:p>
          </table:table-cell>
          <table:table-cell table:content-validation-name="val2" table:formula="of:=VLOOKUP([.D1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79]+1" office:value-type="float" office:value="179" calcext:value-type="float">
            <text:p>179</text:p>
          </table:table-cell>
          <table:table-cell table:content-validation-name="val2" table:formula="of:=VLOOKUP([.D1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0]+1" office:value-type="float" office:value="180" calcext:value-type="float">
            <text:p>180</text:p>
          </table:table-cell>
          <table:table-cell table:content-validation-name="val2" table:formula="of:=VLOOKUP([.D1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1]+1" office:value-type="float" office:value="181" calcext:value-type="float">
            <text:p>181</text:p>
          </table:table-cell>
          <table:table-cell table:content-validation-name="val2" table:formula="of:=VLOOKUP([.D1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2]+1" office:value-type="float" office:value="182" calcext:value-type="float">
            <text:p>182</text:p>
          </table:table-cell>
          <table:table-cell table:content-validation-name="val2" table:formula="of:=VLOOKUP([.D1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3]+1" office:value-type="float" office:value="183" calcext:value-type="float">
            <text:p>183</text:p>
          </table:table-cell>
          <table:table-cell table:content-validation-name="val2" table:formula="of:=VLOOKUP([.D1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4]+1" office:value-type="float" office:value="184" calcext:value-type="float">
            <text:p>184</text:p>
          </table:table-cell>
          <table:table-cell table:content-validation-name="val2" table:formula="of:=VLOOKUP([.D1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5]+1" office:value-type="float" office:value="185" calcext:value-type="float">
            <text:p>185</text:p>
          </table:table-cell>
          <table:table-cell table:content-validation-name="val2" table:formula="of:=VLOOKUP([.D1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6]+1" office:value-type="float" office:value="186" calcext:value-type="float">
            <text:p>186</text:p>
          </table:table-cell>
          <table:table-cell table:content-validation-name="val2" table:formula="of:=VLOOKUP([.D1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7]+1" office:value-type="float" office:value="187" calcext:value-type="float">
            <text:p>187</text:p>
          </table:table-cell>
          <table:table-cell table:content-validation-name="val2" table:formula="of:=VLOOKUP([.D1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8]+1" office:value-type="float" office:value="188" calcext:value-type="float">
            <text:p>188</text:p>
          </table:table-cell>
          <table:table-cell table:content-validation-name="val2" table:formula="of:=VLOOKUP([.D1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89]+1" office:value-type="float" office:value="189" calcext:value-type="float">
            <text:p>189</text:p>
          </table:table-cell>
          <table:table-cell table:content-validation-name="val2" table:formula="of:=VLOOKUP([.D1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0]+1" office:value-type="float" office:value="190" calcext:value-type="float">
            <text:p>190</text:p>
          </table:table-cell>
          <table:table-cell table:content-validation-name="val2" table:formula="of:=VLOOKUP([.D1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1]+1" office:value-type="float" office:value="191" calcext:value-type="float">
            <text:p>191</text:p>
          </table:table-cell>
          <table:table-cell table:content-validation-name="val2" table:formula="of:=VLOOKUP([.D1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2]+1" office:value-type="float" office:value="192" calcext:value-type="float">
            <text:p>192</text:p>
          </table:table-cell>
          <table:table-cell table:content-validation-name="val2" table:formula="of:=VLOOKUP([.D1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3]+1" office:value-type="float" office:value="193" calcext:value-type="float">
            <text:p>193</text:p>
          </table:table-cell>
          <table:table-cell table:content-validation-name="val2" table:formula="of:=VLOOKUP([.D1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4]+1" office:value-type="float" office:value="194" calcext:value-type="float">
            <text:p>194</text:p>
          </table:table-cell>
          <table:table-cell table:content-validation-name="val2" table:formula="of:=VLOOKUP([.D1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5]+1" office:value-type="float" office:value="195" calcext:value-type="float">
            <text:p>195</text:p>
          </table:table-cell>
          <table:table-cell table:content-validation-name="val2" table:formula="of:=VLOOKUP([.D1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6]+1" office:value-type="float" office:value="196" calcext:value-type="float">
            <text:p>196</text:p>
          </table:table-cell>
          <table:table-cell table:content-validation-name="val2" table:formula="of:=VLOOKUP([.D1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7]+1" office:value-type="float" office:value="197" calcext:value-type="float">
            <text:p>197</text:p>
          </table:table-cell>
          <table:table-cell table:content-validation-name="val2" table:formula="of:=VLOOKUP([.D1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8]+1" office:value-type="float" office:value="198" calcext:value-type="float">
            <text:p>198</text:p>
          </table:table-cell>
          <table:table-cell table:content-validation-name="val2" table:formula="of:=VLOOKUP([.D1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99]+1" office:value-type="float" office:value="199" calcext:value-type="float">
            <text:p>199</text:p>
          </table:table-cell>
          <table:table-cell table:content-validation-name="val2" table:formula="of:=VLOOKUP([.D2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0]+1" office:value-type="float" office:value="200" calcext:value-type="float">
            <text:p>200</text:p>
          </table:table-cell>
          <table:table-cell table:content-validation-name="val2" table:formula="of:=VLOOKUP([.D2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1]+1" office:value-type="float" office:value="201" calcext:value-type="float">
            <text:p>201</text:p>
          </table:table-cell>
          <table:table-cell table:content-validation-name="val2" table:formula="of:=VLOOKUP([.D2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2]+1" office:value-type="float" office:value="202" calcext:value-type="float">
            <text:p>202</text:p>
          </table:table-cell>
          <table:table-cell table:content-validation-name="val2" table:formula="of:=VLOOKUP([.D2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3]+1" office:value-type="float" office:value="203" calcext:value-type="float">
            <text:p>203</text:p>
          </table:table-cell>
          <table:table-cell table:content-validation-name="val2" table:formula="of:=VLOOKUP([.D2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4]+1" office:value-type="float" office:value="204" calcext:value-type="float">
            <text:p>204</text:p>
          </table:table-cell>
          <table:table-cell table:content-validation-name="val2" table:formula="of:=VLOOKUP([.D2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5]+1" office:value-type="float" office:value="205" calcext:value-type="float">
            <text:p>205</text:p>
          </table:table-cell>
          <table:table-cell table:content-validation-name="val2" table:formula="of:=VLOOKUP([.D2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6]+1" office:value-type="float" office:value="206" calcext:value-type="float">
            <text:p>206</text:p>
          </table:table-cell>
          <table:table-cell table:content-validation-name="val2" table:formula="of:=VLOOKUP([.D2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7]+1" office:value-type="float" office:value="207" calcext:value-type="float">
            <text:p>207</text:p>
          </table:table-cell>
          <table:table-cell table:content-validation-name="val2" table:formula="of:=VLOOKUP([.D2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8]+1" office:value-type="float" office:value="208" calcext:value-type="float">
            <text:p>208</text:p>
          </table:table-cell>
          <table:table-cell table:content-validation-name="val2" table:formula="of:=VLOOKUP([.D2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09]+1" office:value-type="float" office:value="209" calcext:value-type="float">
            <text:p>209</text:p>
          </table:table-cell>
          <table:table-cell table:content-validation-name="val2" table:formula="of:=VLOOKUP([.D2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0]+1" office:value-type="float" office:value="210" calcext:value-type="float">
            <text:p>210</text:p>
          </table:table-cell>
          <table:table-cell table:content-validation-name="val2" table:formula="of:=VLOOKUP([.D2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1]+1" office:value-type="float" office:value="211" calcext:value-type="float">
            <text:p>211</text:p>
          </table:table-cell>
          <table:table-cell table:content-validation-name="val2" table:formula="of:=VLOOKUP([.D2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2]+1" office:value-type="float" office:value="212" calcext:value-type="float">
            <text:p>212</text:p>
          </table:table-cell>
          <table:table-cell table:content-validation-name="val2" table:formula="of:=VLOOKUP([.D2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3]+1" office:value-type="float" office:value="213" calcext:value-type="float">
            <text:p>213</text:p>
          </table:table-cell>
          <table:table-cell table:content-validation-name="val2" table:formula="of:=VLOOKUP([.D2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4]+1" office:value-type="float" office:value="214" calcext:value-type="float">
            <text:p>214</text:p>
          </table:table-cell>
          <table:table-cell table:content-validation-name="val2" table:formula="of:=VLOOKUP([.D2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5]+1" office:value-type="float" office:value="215" calcext:value-type="float">
            <text:p>215</text:p>
          </table:table-cell>
          <table:table-cell table:content-validation-name="val2" table:formula="of:=VLOOKUP([.D2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6]+1" office:value-type="float" office:value="216" calcext:value-type="float">
            <text:p>216</text:p>
          </table:table-cell>
          <table:table-cell table:content-validation-name="val2" table:formula="of:=VLOOKUP([.D2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7]+1" office:value-type="float" office:value="217" calcext:value-type="float">
            <text:p>217</text:p>
          </table:table-cell>
          <table:table-cell table:content-validation-name="val2" table:formula="of:=VLOOKUP([.D2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8]+1" office:value-type="float" office:value="218" calcext:value-type="float">
            <text:p>218</text:p>
          </table:table-cell>
          <table:table-cell table:content-validation-name="val2" table:formula="of:=VLOOKUP([.D2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19]+1" office:value-type="float" office:value="219" calcext:value-type="float">
            <text:p>219</text:p>
          </table:table-cell>
          <table:table-cell table:content-validation-name="val2" table:formula="of:=VLOOKUP([.D2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0]+1" office:value-type="float" office:value="220" calcext:value-type="float">
            <text:p>220</text:p>
          </table:table-cell>
          <table:table-cell table:content-validation-name="val2" table:formula="of:=VLOOKUP([.D2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1]+1" office:value-type="float" office:value="221" calcext:value-type="float">
            <text:p>221</text:p>
          </table:table-cell>
          <table:table-cell table:content-validation-name="val2" table:formula="of:=VLOOKUP([.D2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2]+1" office:value-type="float" office:value="222" calcext:value-type="float">
            <text:p>222</text:p>
          </table:table-cell>
          <table:table-cell table:content-validation-name="val2" table:formula="of:=VLOOKUP([.D2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3]+1" office:value-type="float" office:value="223" calcext:value-type="float">
            <text:p>223</text:p>
          </table:table-cell>
          <table:table-cell table:content-validation-name="val2" table:formula="of:=VLOOKUP([.D2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4]+1" office:value-type="float" office:value="224" calcext:value-type="float">
            <text:p>224</text:p>
          </table:table-cell>
          <table:table-cell table:content-validation-name="val2" table:formula="of:=VLOOKUP([.D2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5]+1" office:value-type="float" office:value="225" calcext:value-type="float">
            <text:p>225</text:p>
          </table:table-cell>
          <table:table-cell table:content-validation-name="val2" table:formula="of:=VLOOKUP([.D2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6]+1" office:value-type="float" office:value="226" calcext:value-type="float">
            <text:p>226</text:p>
          </table:table-cell>
          <table:table-cell table:content-validation-name="val2" table:formula="of:=VLOOKUP([.D2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7]+1" office:value-type="float" office:value="227" calcext:value-type="float">
            <text:p>227</text:p>
          </table:table-cell>
          <table:table-cell table:content-validation-name="val2" table:formula="of:=VLOOKUP([.D2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8]+1" office:value-type="float" office:value="228" calcext:value-type="float">
            <text:p>228</text:p>
          </table:table-cell>
          <table:table-cell table:content-validation-name="val2" table:formula="of:=VLOOKUP([.D2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29]+1" office:value-type="float" office:value="229" calcext:value-type="float">
            <text:p>229</text:p>
          </table:table-cell>
          <table:table-cell table:content-validation-name="val2" table:formula="of:=VLOOKUP([.D2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0]+1" office:value-type="float" office:value="230" calcext:value-type="float">
            <text:p>230</text:p>
          </table:table-cell>
          <table:table-cell table:content-validation-name="val2" table:formula="of:=VLOOKUP([.D2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1]+1" office:value-type="float" office:value="231" calcext:value-type="float">
            <text:p>231</text:p>
          </table:table-cell>
          <table:table-cell table:content-validation-name="val2" table:formula="of:=VLOOKUP([.D2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2]+1" office:value-type="float" office:value="232" calcext:value-type="float">
            <text:p>232</text:p>
          </table:table-cell>
          <table:table-cell table:content-validation-name="val2" table:formula="of:=VLOOKUP([.D2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3]+1" office:value-type="float" office:value="233" calcext:value-type="float">
            <text:p>233</text:p>
          </table:table-cell>
          <table:table-cell table:content-validation-name="val2" table:formula="of:=VLOOKUP([.D2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4]+1" office:value-type="float" office:value="234" calcext:value-type="float">
            <text:p>234</text:p>
          </table:table-cell>
          <table:table-cell table:content-validation-name="val2" table:formula="of:=VLOOKUP([.D2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5]+1" office:value-type="float" office:value="235" calcext:value-type="float">
            <text:p>235</text:p>
          </table:table-cell>
          <table:table-cell table:content-validation-name="val2" table:formula="of:=VLOOKUP([.D2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6]+1" office:value-type="float" office:value="236" calcext:value-type="float">
            <text:p>236</text:p>
          </table:table-cell>
          <table:table-cell table:content-validation-name="val2" table:formula="of:=VLOOKUP([.D2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7]+1" office:value-type="float" office:value="237" calcext:value-type="float">
            <text:p>237</text:p>
          </table:table-cell>
          <table:table-cell table:content-validation-name="val2" table:formula="of:=VLOOKUP([.D2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8]+1" office:value-type="float" office:value="238" calcext:value-type="float">
            <text:p>238</text:p>
          </table:table-cell>
          <table:table-cell table:content-validation-name="val2" table:formula="of:=VLOOKUP([.D2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39]+1" office:value-type="float" office:value="239" calcext:value-type="float">
            <text:p>239</text:p>
          </table:table-cell>
          <table:table-cell table:content-validation-name="val2" table:formula="of:=VLOOKUP([.D2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0]+1" office:value-type="float" office:value="240" calcext:value-type="float">
            <text:p>240</text:p>
          </table:table-cell>
          <table:table-cell table:content-validation-name="val2" table:formula="of:=VLOOKUP([.D2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1]+1" office:value-type="float" office:value="241" calcext:value-type="float">
            <text:p>241</text:p>
          </table:table-cell>
          <table:table-cell table:content-validation-name="val2" table:formula="of:=VLOOKUP([.D2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2]+1" office:value-type="float" office:value="242" calcext:value-type="float">
            <text:p>242</text:p>
          </table:table-cell>
          <table:table-cell table:content-validation-name="val2" table:formula="of:=VLOOKUP([.D2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3]+1" office:value-type="float" office:value="243" calcext:value-type="float">
            <text:p>243</text:p>
          </table:table-cell>
          <table:table-cell table:content-validation-name="val2" table:formula="of:=VLOOKUP([.D2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4]+1" office:value-type="float" office:value="244" calcext:value-type="float">
            <text:p>244</text:p>
          </table:table-cell>
          <table:table-cell table:content-validation-name="val2" table:formula="of:=VLOOKUP([.D2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5]+1" office:value-type="float" office:value="245" calcext:value-type="float">
            <text:p>245</text:p>
          </table:table-cell>
          <table:table-cell table:content-validation-name="val2" table:formula="of:=VLOOKUP([.D2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6]+1" office:value-type="float" office:value="246" calcext:value-type="float">
            <text:p>246</text:p>
          </table:table-cell>
          <table:table-cell table:content-validation-name="val2" table:formula="of:=VLOOKUP([.D2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7]+1" office:value-type="float" office:value="247" calcext:value-type="float">
            <text:p>247</text:p>
          </table:table-cell>
          <table:table-cell table:content-validation-name="val2" table:formula="of:=VLOOKUP([.D2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8]+1" office:value-type="float" office:value="248" calcext:value-type="float">
            <text:p>248</text:p>
          </table:table-cell>
          <table:table-cell table:content-validation-name="val2" table:formula="of:=VLOOKUP([.D2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49]+1" office:value-type="float" office:value="249" calcext:value-type="float">
            <text:p>249</text:p>
          </table:table-cell>
          <table:table-cell table:content-validation-name="val2" table:formula="of:=VLOOKUP([.D2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0]+1" office:value-type="float" office:value="250" calcext:value-type="float">
            <text:p>250</text:p>
          </table:table-cell>
          <table:table-cell table:content-validation-name="val2" table:formula="of:=VLOOKUP([.D2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1]+1" office:value-type="float" office:value="251" calcext:value-type="float">
            <text:p>251</text:p>
          </table:table-cell>
          <table:table-cell table:content-validation-name="val2" table:formula="of:=VLOOKUP([.D2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2]+1" office:value-type="float" office:value="252" calcext:value-type="float">
            <text:p>252</text:p>
          </table:table-cell>
          <table:table-cell table:content-validation-name="val2" table:formula="of:=VLOOKUP([.D2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3]+1" office:value-type="float" office:value="253" calcext:value-type="float">
            <text:p>253</text:p>
          </table:table-cell>
          <table:table-cell table:content-validation-name="val2" table:formula="of:=VLOOKUP([.D2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4]+1" office:value-type="float" office:value="254" calcext:value-type="float">
            <text:p>254</text:p>
          </table:table-cell>
          <table:table-cell table:content-validation-name="val2" table:formula="of:=VLOOKUP([.D2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5]+1" office:value-type="float" office:value="255" calcext:value-type="float">
            <text:p>255</text:p>
          </table:table-cell>
          <table:table-cell table:content-validation-name="val2" table:formula="of:=VLOOKUP([.D2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6]+1" office:value-type="float" office:value="256" calcext:value-type="float">
            <text:p>256</text:p>
          </table:table-cell>
          <table:table-cell table:content-validation-name="val2" table:formula="of:=VLOOKUP([.D2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7]+1" office:value-type="float" office:value="257" calcext:value-type="float">
            <text:p>257</text:p>
          </table:table-cell>
          <table:table-cell table:content-validation-name="val2" table:formula="of:=VLOOKUP([.D2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8]+1" office:value-type="float" office:value="258" calcext:value-type="float">
            <text:p>258</text:p>
          </table:table-cell>
          <table:table-cell table:content-validation-name="val2" table:formula="of:=VLOOKUP([.D2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59]+1" office:value-type="float" office:value="259" calcext:value-type="float">
            <text:p>259</text:p>
          </table:table-cell>
          <table:table-cell table:content-validation-name="val2" table:formula="of:=VLOOKUP([.D2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0]+1" office:value-type="float" office:value="260" calcext:value-type="float">
            <text:p>260</text:p>
          </table:table-cell>
          <table:table-cell table:content-validation-name="val2" table:formula="of:=VLOOKUP([.D2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1]+1" office:value-type="float" office:value="261" calcext:value-type="float">
            <text:p>261</text:p>
          </table:table-cell>
          <table:table-cell table:content-validation-name="val2" table:formula="of:=VLOOKUP([.D2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2]+1" office:value-type="float" office:value="262" calcext:value-type="float">
            <text:p>262</text:p>
          </table:table-cell>
          <table:table-cell table:content-validation-name="val2" table:formula="of:=VLOOKUP([.D2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3]+1" office:value-type="float" office:value="263" calcext:value-type="float">
            <text:p>263</text:p>
          </table:table-cell>
          <table:table-cell table:content-validation-name="val2" table:formula="of:=VLOOKUP([.D2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4]+1" office:value-type="float" office:value="264" calcext:value-type="float">
            <text:p>264</text:p>
          </table:table-cell>
          <table:table-cell table:content-validation-name="val2" table:formula="of:=VLOOKUP([.D2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5]+1" office:value-type="float" office:value="265" calcext:value-type="float">
            <text:p>265</text:p>
          </table:table-cell>
          <table:table-cell table:content-validation-name="val2" table:formula="of:=VLOOKUP([.D2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6]+1" office:value-type="float" office:value="266" calcext:value-type="float">
            <text:p>266</text:p>
          </table:table-cell>
          <table:table-cell table:content-validation-name="val2" table:formula="of:=VLOOKUP([.D2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7]+1" office:value-type="float" office:value="267" calcext:value-type="float">
            <text:p>267</text:p>
          </table:table-cell>
          <table:table-cell table:content-validation-name="val2" table:formula="of:=VLOOKUP([.D2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8]+1" office:value-type="float" office:value="268" calcext:value-type="float">
            <text:p>268</text:p>
          </table:table-cell>
          <table:table-cell table:content-validation-name="val2" table:formula="of:=VLOOKUP([.D2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69]+1" office:value-type="float" office:value="269" calcext:value-type="float">
            <text:p>269</text:p>
          </table:table-cell>
          <table:table-cell table:content-validation-name="val2" table:formula="of:=VLOOKUP([.D2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0]+1" office:value-type="float" office:value="270" calcext:value-type="float">
            <text:p>270</text:p>
          </table:table-cell>
          <table:table-cell table:content-validation-name="val2" table:formula="of:=VLOOKUP([.D2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1]+1" office:value-type="float" office:value="271" calcext:value-type="float">
            <text:p>271</text:p>
          </table:table-cell>
          <table:table-cell table:content-validation-name="val2" table:formula="of:=VLOOKUP([.D2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2]+1" office:value-type="float" office:value="272" calcext:value-type="float">
            <text:p>272</text:p>
          </table:table-cell>
          <table:table-cell table:content-validation-name="val2" table:formula="of:=VLOOKUP([.D2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3]+1" office:value-type="float" office:value="273" calcext:value-type="float">
            <text:p>273</text:p>
          </table:table-cell>
          <table:table-cell table:content-validation-name="val2" table:formula="of:=VLOOKUP([.D2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4]+1" office:value-type="float" office:value="274" calcext:value-type="float">
            <text:p>274</text:p>
          </table:table-cell>
          <table:table-cell table:content-validation-name="val2" table:formula="of:=VLOOKUP([.D2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5]+1" office:value-type="float" office:value="275" calcext:value-type="float">
            <text:p>275</text:p>
          </table:table-cell>
          <table:table-cell table:content-validation-name="val2" table:formula="of:=VLOOKUP([.D2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6]+1" office:value-type="float" office:value="276" calcext:value-type="float">
            <text:p>276</text:p>
          </table:table-cell>
          <table:table-cell table:content-validation-name="val2" table:formula="of:=VLOOKUP([.D2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7]+1" office:value-type="float" office:value="277" calcext:value-type="float">
            <text:p>277</text:p>
          </table:table-cell>
          <table:table-cell table:content-validation-name="val2" table:formula="of:=VLOOKUP([.D2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8]+1" office:value-type="float" office:value="278" calcext:value-type="float">
            <text:p>278</text:p>
          </table:table-cell>
          <table:table-cell table:content-validation-name="val2" table:formula="of:=VLOOKUP([.D2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79]+1" office:value-type="float" office:value="279" calcext:value-type="float">
            <text:p>279</text:p>
          </table:table-cell>
          <table:table-cell table:content-validation-name="val2" table:formula="of:=VLOOKUP([.D2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0]+1" office:value-type="float" office:value="280" calcext:value-type="float">
            <text:p>280</text:p>
          </table:table-cell>
          <table:table-cell table:content-validation-name="val2" table:formula="of:=VLOOKUP([.D2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1]+1" office:value-type="float" office:value="281" calcext:value-type="float">
            <text:p>281</text:p>
          </table:table-cell>
          <table:table-cell table:content-validation-name="val2" table:formula="of:=VLOOKUP([.D2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2]+1" office:value-type="float" office:value="282" calcext:value-type="float">
            <text:p>282</text:p>
          </table:table-cell>
          <table:table-cell table:content-validation-name="val2" table:formula="of:=VLOOKUP([.D2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3]+1" office:value-type="float" office:value="283" calcext:value-type="float">
            <text:p>283</text:p>
          </table:table-cell>
          <table:table-cell table:content-validation-name="val2" table:formula="of:=VLOOKUP([.D2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4]+1" office:value-type="float" office:value="284" calcext:value-type="float">
            <text:p>284</text:p>
          </table:table-cell>
          <table:table-cell table:content-validation-name="val2" table:formula="of:=VLOOKUP([.D2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5]+1" office:value-type="float" office:value="285" calcext:value-type="float">
            <text:p>285</text:p>
          </table:table-cell>
          <table:table-cell table:content-validation-name="val2" table:formula="of:=VLOOKUP([.D2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6]+1" office:value-type="float" office:value="286" calcext:value-type="float">
            <text:p>286</text:p>
          </table:table-cell>
          <table:table-cell table:content-validation-name="val2" table:formula="of:=VLOOKUP([.D2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7]+1" office:value-type="float" office:value="287" calcext:value-type="float">
            <text:p>287</text:p>
          </table:table-cell>
          <table:table-cell table:content-validation-name="val2" table:formula="of:=VLOOKUP([.D2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8]+1" office:value-type="float" office:value="288" calcext:value-type="float">
            <text:p>288</text:p>
          </table:table-cell>
          <table:table-cell table:content-validation-name="val2" table:formula="of:=VLOOKUP([.D2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89]+1" office:value-type="float" office:value="289" calcext:value-type="float">
            <text:p>289</text:p>
          </table:table-cell>
          <table:table-cell table:content-validation-name="val2" table:formula="of:=VLOOKUP([.D2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0]+1" office:value-type="float" office:value="290" calcext:value-type="float">
            <text:p>290</text:p>
          </table:table-cell>
          <table:table-cell table:content-validation-name="val2" table:formula="of:=VLOOKUP([.D2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1]+1" office:value-type="float" office:value="291" calcext:value-type="float">
            <text:p>291</text:p>
          </table:table-cell>
          <table:table-cell table:content-validation-name="val2" table:formula="of:=VLOOKUP([.D2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2]+1" office:value-type="float" office:value="292" calcext:value-type="float">
            <text:p>292</text:p>
          </table:table-cell>
          <table:table-cell table:content-validation-name="val2" table:formula="of:=VLOOKUP([.D2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3]+1" office:value-type="float" office:value="293" calcext:value-type="float">
            <text:p>293</text:p>
          </table:table-cell>
          <table:table-cell table:content-validation-name="val2" table:formula="of:=VLOOKUP([.D2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4]+1" office:value-type="float" office:value="294" calcext:value-type="float">
            <text:p>294</text:p>
          </table:table-cell>
          <table:table-cell table:content-validation-name="val2" table:formula="of:=VLOOKUP([.D2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5]+1" office:value-type="float" office:value="295" calcext:value-type="float">
            <text:p>295</text:p>
          </table:table-cell>
          <table:table-cell table:content-validation-name="val2" table:formula="of:=VLOOKUP([.D2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6]+1" office:value-type="float" office:value="296" calcext:value-type="float">
            <text:p>296</text:p>
          </table:table-cell>
          <table:table-cell table:content-validation-name="val2" table:formula="of:=VLOOKUP([.D2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7]+1" office:value-type="float" office:value="297" calcext:value-type="float">
            <text:p>297</text:p>
          </table:table-cell>
          <table:table-cell table:content-validation-name="val2" table:formula="of:=VLOOKUP([.D2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8]+1" office:value-type="float" office:value="298" calcext:value-type="float">
            <text:p>298</text:p>
          </table:table-cell>
          <table:table-cell table:content-validation-name="val2" table:formula="of:=VLOOKUP([.D2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299]+1" office:value-type="float" office:value="299" calcext:value-type="float">
            <text:p>299</text:p>
          </table:table-cell>
          <table:table-cell table:content-validation-name="val2" table:formula="of:=VLOOKUP([.D3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0]+1" office:value-type="float" office:value="300" calcext:value-type="float">
            <text:p>300</text:p>
          </table:table-cell>
          <table:table-cell table:content-validation-name="val2" table:formula="of:=VLOOKUP([.D3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1]+1" office:value-type="float" office:value="301" calcext:value-type="float">
            <text:p>301</text:p>
          </table:table-cell>
          <table:table-cell table:content-validation-name="val2" table:formula="of:=VLOOKUP([.D3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2]+1" office:value-type="float" office:value="302" calcext:value-type="float">
            <text:p>302</text:p>
          </table:table-cell>
          <table:table-cell table:content-validation-name="val2" table:formula="of:=VLOOKUP([.D3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3]+1" office:value-type="float" office:value="303" calcext:value-type="float">
            <text:p>303</text:p>
          </table:table-cell>
          <table:table-cell table:content-validation-name="val2" table:formula="of:=VLOOKUP([.D3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4]+1" office:value-type="float" office:value="304" calcext:value-type="float">
            <text:p>304</text:p>
          </table:table-cell>
          <table:table-cell table:content-validation-name="val2" table:formula="of:=VLOOKUP([.D3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5]+1" office:value-type="float" office:value="305" calcext:value-type="float">
            <text:p>305</text:p>
          </table:table-cell>
          <table:table-cell table:content-validation-name="val2" table:formula="of:=VLOOKUP([.D3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6]+1" office:value-type="float" office:value="306" calcext:value-type="float">
            <text:p>306</text:p>
          </table:table-cell>
          <table:table-cell table:content-validation-name="val2" table:formula="of:=VLOOKUP([.D3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7]+1" office:value-type="float" office:value="307" calcext:value-type="float">
            <text:p>307</text:p>
          </table:table-cell>
          <table:table-cell table:content-validation-name="val2" table:formula="of:=VLOOKUP([.D3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8]+1" office:value-type="float" office:value="308" calcext:value-type="float">
            <text:p>308</text:p>
          </table:table-cell>
          <table:table-cell table:content-validation-name="val2" table:formula="of:=VLOOKUP([.D3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09]+1" office:value-type="float" office:value="309" calcext:value-type="float">
            <text:p>309</text:p>
          </table:table-cell>
          <table:table-cell table:content-validation-name="val2" table:formula="of:=VLOOKUP([.D3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0]+1" office:value-type="float" office:value="310" calcext:value-type="float">
            <text:p>310</text:p>
          </table:table-cell>
          <table:table-cell table:content-validation-name="val2" table:formula="of:=VLOOKUP([.D3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1]+1" office:value-type="float" office:value="311" calcext:value-type="float">
            <text:p>311</text:p>
          </table:table-cell>
          <table:table-cell table:content-validation-name="val2" table:formula="of:=VLOOKUP([.D3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2]+1" office:value-type="float" office:value="312" calcext:value-type="float">
            <text:p>312</text:p>
          </table:table-cell>
          <table:table-cell table:content-validation-name="val2" table:formula="of:=VLOOKUP([.D3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3]+1" office:value-type="float" office:value="313" calcext:value-type="float">
            <text:p>313</text:p>
          </table:table-cell>
          <table:table-cell table:content-validation-name="val2" table:formula="of:=VLOOKUP([.D3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4]+1" office:value-type="float" office:value="314" calcext:value-type="float">
            <text:p>314</text:p>
          </table:table-cell>
          <table:table-cell table:content-validation-name="val2" table:formula="of:=VLOOKUP([.D3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5]+1" office:value-type="float" office:value="315" calcext:value-type="float">
            <text:p>315</text:p>
          </table:table-cell>
          <table:table-cell table:content-validation-name="val2" table:formula="of:=VLOOKUP([.D3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6]+1" office:value-type="float" office:value="316" calcext:value-type="float">
            <text:p>316</text:p>
          </table:table-cell>
          <table:table-cell table:content-validation-name="val2" table:formula="of:=VLOOKUP([.D3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7]+1" office:value-type="float" office:value="317" calcext:value-type="float">
            <text:p>317</text:p>
          </table:table-cell>
          <table:table-cell table:content-validation-name="val2" table:formula="of:=VLOOKUP([.D3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8]+1" office:value-type="float" office:value="318" calcext:value-type="float">
            <text:p>318</text:p>
          </table:table-cell>
          <table:table-cell table:content-validation-name="val2" table:formula="of:=VLOOKUP([.D3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19]+1" office:value-type="float" office:value="319" calcext:value-type="float">
            <text:p>319</text:p>
          </table:table-cell>
          <table:table-cell table:content-validation-name="val2" table:formula="of:=VLOOKUP([.D3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0]+1" office:value-type="float" office:value="320" calcext:value-type="float">
            <text:p>320</text:p>
          </table:table-cell>
          <table:table-cell table:content-validation-name="val2" table:formula="of:=VLOOKUP([.D3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1]+1" office:value-type="float" office:value="321" calcext:value-type="float">
            <text:p>321</text:p>
          </table:table-cell>
          <table:table-cell table:content-validation-name="val2" table:formula="of:=VLOOKUP([.D3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2]+1" office:value-type="float" office:value="322" calcext:value-type="float">
            <text:p>322</text:p>
          </table:table-cell>
          <table:table-cell table:content-validation-name="val2" table:formula="of:=VLOOKUP([.D3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3]+1" office:value-type="float" office:value="323" calcext:value-type="float">
            <text:p>323</text:p>
          </table:table-cell>
          <table:table-cell table:content-validation-name="val2" table:formula="of:=VLOOKUP([.D3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4]+1" office:value-type="float" office:value="324" calcext:value-type="float">
            <text:p>324</text:p>
          </table:table-cell>
          <table:table-cell table:content-validation-name="val2" table:formula="of:=VLOOKUP([.D3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5]+1" office:value-type="float" office:value="325" calcext:value-type="float">
            <text:p>325</text:p>
          </table:table-cell>
          <table:table-cell table:content-validation-name="val2" table:formula="of:=VLOOKUP([.D3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6]+1" office:value-type="float" office:value="326" calcext:value-type="float">
            <text:p>326</text:p>
          </table:table-cell>
          <table:table-cell table:content-validation-name="val2" table:formula="of:=VLOOKUP([.D3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7]+1" office:value-type="float" office:value="327" calcext:value-type="float">
            <text:p>327</text:p>
          </table:table-cell>
          <table:table-cell table:content-validation-name="val2" table:formula="of:=VLOOKUP([.D3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8]+1" office:value-type="float" office:value="328" calcext:value-type="float">
            <text:p>328</text:p>
          </table:table-cell>
          <table:table-cell table:content-validation-name="val2" table:formula="of:=VLOOKUP([.D3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29]+1" office:value-type="float" office:value="329" calcext:value-type="float">
            <text:p>329</text:p>
          </table:table-cell>
          <table:table-cell table:content-validation-name="val2" table:formula="of:=VLOOKUP([.D3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0]+1" office:value-type="float" office:value="330" calcext:value-type="float">
            <text:p>330</text:p>
          </table:table-cell>
          <table:table-cell table:content-validation-name="val2" table:formula="of:=VLOOKUP([.D3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1]+1" office:value-type="float" office:value="331" calcext:value-type="float">
            <text:p>331</text:p>
          </table:table-cell>
          <table:table-cell table:content-validation-name="val2" table:formula="of:=VLOOKUP([.D3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2]+1" office:value-type="float" office:value="332" calcext:value-type="float">
            <text:p>332</text:p>
          </table:table-cell>
          <table:table-cell table:content-validation-name="val2" table:formula="of:=VLOOKUP([.D3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3]+1" office:value-type="float" office:value="333" calcext:value-type="float">
            <text:p>333</text:p>
          </table:table-cell>
          <table:table-cell table:content-validation-name="val2" table:formula="of:=VLOOKUP([.D3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4]+1" office:value-type="float" office:value="334" calcext:value-type="float">
            <text:p>334</text:p>
          </table:table-cell>
          <table:table-cell table:content-validation-name="val2" table:formula="of:=VLOOKUP([.D3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5]+1" office:value-type="float" office:value="335" calcext:value-type="float">
            <text:p>335</text:p>
          </table:table-cell>
          <table:table-cell table:content-validation-name="val2" table:formula="of:=VLOOKUP([.D3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6]+1" office:value-type="float" office:value="336" calcext:value-type="float">
            <text:p>336</text:p>
          </table:table-cell>
          <table:table-cell table:content-validation-name="val2" table:formula="of:=VLOOKUP([.D3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7]+1" office:value-type="float" office:value="337" calcext:value-type="float">
            <text:p>337</text:p>
          </table:table-cell>
          <table:table-cell table:content-validation-name="val2" table:formula="of:=VLOOKUP([.D3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8]+1" office:value-type="float" office:value="338" calcext:value-type="float">
            <text:p>338</text:p>
          </table:table-cell>
          <table:table-cell table:content-validation-name="val2" table:formula="of:=VLOOKUP([.D3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39]+1" office:value-type="float" office:value="339" calcext:value-type="float">
            <text:p>339</text:p>
          </table:table-cell>
          <table:table-cell table:content-validation-name="val2" table:formula="of:=VLOOKUP([.D3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0]+1" office:value-type="float" office:value="340" calcext:value-type="float">
            <text:p>340</text:p>
          </table:table-cell>
          <table:table-cell table:content-validation-name="val2" table:formula="of:=VLOOKUP([.D3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1]+1" office:value-type="float" office:value="341" calcext:value-type="float">
            <text:p>341</text:p>
          </table:table-cell>
          <table:table-cell table:content-validation-name="val2" table:formula="of:=VLOOKUP([.D3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2]+1" office:value-type="float" office:value="342" calcext:value-type="float">
            <text:p>342</text:p>
          </table:table-cell>
          <table:table-cell table:content-validation-name="val2" table:formula="of:=VLOOKUP([.D3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3]+1" office:value-type="float" office:value="343" calcext:value-type="float">
            <text:p>343</text:p>
          </table:table-cell>
          <table:table-cell table:content-validation-name="val2" table:formula="of:=VLOOKUP([.D3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4]+1" office:value-type="float" office:value="344" calcext:value-type="float">
            <text:p>344</text:p>
          </table:table-cell>
          <table:table-cell table:content-validation-name="val2" table:formula="of:=VLOOKUP([.D3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5]+1" office:value-type="float" office:value="345" calcext:value-type="float">
            <text:p>345</text:p>
          </table:table-cell>
          <table:table-cell table:content-validation-name="val2" table:formula="of:=VLOOKUP([.D3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6]+1" office:value-type="float" office:value="346" calcext:value-type="float">
            <text:p>346</text:p>
          </table:table-cell>
          <table:table-cell table:content-validation-name="val2" table:formula="of:=VLOOKUP([.D3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7]+1" office:value-type="float" office:value="347" calcext:value-type="float">
            <text:p>347</text:p>
          </table:table-cell>
          <table:table-cell table:content-validation-name="val2" table:formula="of:=VLOOKUP([.D3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8]+1" office:value-type="float" office:value="348" calcext:value-type="float">
            <text:p>348</text:p>
          </table:table-cell>
          <table:table-cell table:content-validation-name="val2" table:formula="of:=VLOOKUP([.D3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49]+1" office:value-type="float" office:value="349" calcext:value-type="float">
            <text:p>349</text:p>
          </table:table-cell>
          <table:table-cell table:content-validation-name="val2" table:formula="of:=VLOOKUP([.D3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0]+1" office:value-type="float" office:value="350" calcext:value-type="float">
            <text:p>350</text:p>
          </table:table-cell>
          <table:table-cell table:content-validation-name="val2" table:formula="of:=VLOOKUP([.D3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1]+1" office:value-type="float" office:value="351" calcext:value-type="float">
            <text:p>351</text:p>
          </table:table-cell>
          <table:table-cell table:content-validation-name="val2" table:formula="of:=VLOOKUP([.D3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2]+1" office:value-type="float" office:value="352" calcext:value-type="float">
            <text:p>352</text:p>
          </table:table-cell>
          <table:table-cell table:content-validation-name="val2" table:formula="of:=VLOOKUP([.D3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3]+1" office:value-type="float" office:value="353" calcext:value-type="float">
            <text:p>353</text:p>
          </table:table-cell>
          <table:table-cell table:content-validation-name="val2" table:formula="of:=VLOOKUP([.D3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4]+1" office:value-type="float" office:value="354" calcext:value-type="float">
            <text:p>354</text:p>
          </table:table-cell>
          <table:table-cell table:content-validation-name="val2" table:formula="of:=VLOOKUP([.D3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5]+1" office:value-type="float" office:value="355" calcext:value-type="float">
            <text:p>355</text:p>
          </table:table-cell>
          <table:table-cell table:content-validation-name="val2" table:formula="of:=VLOOKUP([.D3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6]+1" office:value-type="float" office:value="356" calcext:value-type="float">
            <text:p>356</text:p>
          </table:table-cell>
          <table:table-cell table:content-validation-name="val2" table:formula="of:=VLOOKUP([.D3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7]+1" office:value-type="float" office:value="357" calcext:value-type="float">
            <text:p>357</text:p>
          </table:table-cell>
          <table:table-cell table:content-validation-name="val2" table:formula="of:=VLOOKUP([.D3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8]+1" office:value-type="float" office:value="358" calcext:value-type="float">
            <text:p>358</text:p>
          </table:table-cell>
          <table:table-cell table:content-validation-name="val2" table:formula="of:=VLOOKUP([.D3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59]+1" office:value-type="float" office:value="359" calcext:value-type="float">
            <text:p>359</text:p>
          </table:table-cell>
          <table:table-cell table:content-validation-name="val2" table:formula="of:=VLOOKUP([.D3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0]+1" office:value-type="float" office:value="360" calcext:value-type="float">
            <text:p>360</text:p>
          </table:table-cell>
          <table:table-cell table:content-validation-name="val2" table:formula="of:=VLOOKUP([.D3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1]+1" office:value-type="float" office:value="361" calcext:value-type="float">
            <text:p>361</text:p>
          </table:table-cell>
          <table:table-cell table:content-validation-name="val2" table:formula="of:=VLOOKUP([.D3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2]+1" office:value-type="float" office:value="362" calcext:value-type="float">
            <text:p>362</text:p>
          </table:table-cell>
          <table:table-cell table:content-validation-name="val2" table:formula="of:=VLOOKUP([.D3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3]+1" office:value-type="float" office:value="363" calcext:value-type="float">
            <text:p>363</text:p>
          </table:table-cell>
          <table:table-cell table:content-validation-name="val2" table:formula="of:=VLOOKUP([.D3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4]+1" office:value-type="float" office:value="364" calcext:value-type="float">
            <text:p>364</text:p>
          </table:table-cell>
          <table:table-cell table:content-validation-name="val2" table:formula="of:=VLOOKUP([.D3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5]+1" office:value-type="float" office:value="365" calcext:value-type="float">
            <text:p>365</text:p>
          </table:table-cell>
          <table:table-cell table:content-validation-name="val2" table:formula="of:=VLOOKUP([.D3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6]+1" office:value-type="float" office:value="366" calcext:value-type="float">
            <text:p>366</text:p>
          </table:table-cell>
          <table:table-cell table:content-validation-name="val2" table:formula="of:=VLOOKUP([.D3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7]+1" office:value-type="float" office:value="367" calcext:value-type="float">
            <text:p>367</text:p>
          </table:table-cell>
          <table:table-cell table:content-validation-name="val2" table:formula="of:=VLOOKUP([.D3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8]+1" office:value-type="float" office:value="368" calcext:value-type="float">
            <text:p>368</text:p>
          </table:table-cell>
          <table:table-cell table:content-validation-name="val2" table:formula="of:=VLOOKUP([.D3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69]+1" office:value-type="float" office:value="369" calcext:value-type="float">
            <text:p>369</text:p>
          </table:table-cell>
          <table:table-cell table:content-validation-name="val2" table:formula="of:=VLOOKUP([.D3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0]+1" office:value-type="float" office:value="370" calcext:value-type="float">
            <text:p>370</text:p>
          </table:table-cell>
          <table:table-cell table:content-validation-name="val2" table:formula="of:=VLOOKUP([.D3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1]+1" office:value-type="float" office:value="371" calcext:value-type="float">
            <text:p>371</text:p>
          </table:table-cell>
          <table:table-cell table:content-validation-name="val2" table:formula="of:=VLOOKUP([.D3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2]+1" office:value-type="float" office:value="372" calcext:value-type="float">
            <text:p>372</text:p>
          </table:table-cell>
          <table:table-cell table:content-validation-name="val2" table:formula="of:=VLOOKUP([.D3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3]+1" office:value-type="float" office:value="373" calcext:value-type="float">
            <text:p>373</text:p>
          </table:table-cell>
          <table:table-cell table:content-validation-name="val2" table:formula="of:=VLOOKUP([.D3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4]+1" office:value-type="float" office:value="374" calcext:value-type="float">
            <text:p>374</text:p>
          </table:table-cell>
          <table:table-cell table:content-validation-name="val2" table:formula="of:=VLOOKUP([.D3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5]+1" office:value-type="float" office:value="375" calcext:value-type="float">
            <text:p>375</text:p>
          </table:table-cell>
          <table:table-cell table:content-validation-name="val2" table:formula="of:=VLOOKUP([.D3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6]+1" office:value-type="float" office:value="376" calcext:value-type="float">
            <text:p>376</text:p>
          </table:table-cell>
          <table:table-cell table:content-validation-name="val2" table:formula="of:=VLOOKUP([.D3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7]+1" office:value-type="float" office:value="377" calcext:value-type="float">
            <text:p>377</text:p>
          </table:table-cell>
          <table:table-cell table:content-validation-name="val2" table:formula="of:=VLOOKUP([.D3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8]+1" office:value-type="float" office:value="378" calcext:value-type="float">
            <text:p>378</text:p>
          </table:table-cell>
          <table:table-cell table:content-validation-name="val2" table:formula="of:=VLOOKUP([.D3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79]+1" office:value-type="float" office:value="379" calcext:value-type="float">
            <text:p>379</text:p>
          </table:table-cell>
          <table:table-cell table:content-validation-name="val2" table:formula="of:=VLOOKUP([.D3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0]+1" office:value-type="float" office:value="380" calcext:value-type="float">
            <text:p>380</text:p>
          </table:table-cell>
          <table:table-cell table:content-validation-name="val2" table:formula="of:=VLOOKUP([.D3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1]+1" office:value-type="float" office:value="381" calcext:value-type="float">
            <text:p>381</text:p>
          </table:table-cell>
          <table:table-cell table:content-validation-name="val2" table:formula="of:=VLOOKUP([.D3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2]+1" office:value-type="float" office:value="382" calcext:value-type="float">
            <text:p>382</text:p>
          </table:table-cell>
          <table:table-cell table:content-validation-name="val2" table:formula="of:=VLOOKUP([.D3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3]+1" office:value-type="float" office:value="383" calcext:value-type="float">
            <text:p>383</text:p>
          </table:table-cell>
          <table:table-cell table:content-validation-name="val2" table:formula="of:=VLOOKUP([.D3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4]+1" office:value-type="float" office:value="384" calcext:value-type="float">
            <text:p>384</text:p>
          </table:table-cell>
          <table:table-cell table:content-validation-name="val2" table:formula="of:=VLOOKUP([.D3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5]+1" office:value-type="float" office:value="385" calcext:value-type="float">
            <text:p>385</text:p>
          </table:table-cell>
          <table:table-cell table:content-validation-name="val2" table:formula="of:=VLOOKUP([.D3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6]+1" office:value-type="float" office:value="386" calcext:value-type="float">
            <text:p>386</text:p>
          </table:table-cell>
          <table:table-cell table:content-validation-name="val2" table:formula="of:=VLOOKUP([.D3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7]+1" office:value-type="float" office:value="387" calcext:value-type="float">
            <text:p>387</text:p>
          </table:table-cell>
          <table:table-cell table:content-validation-name="val2" table:formula="of:=VLOOKUP([.D3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8]+1" office:value-type="float" office:value="388" calcext:value-type="float">
            <text:p>388</text:p>
          </table:table-cell>
          <table:table-cell table:content-validation-name="val2" table:formula="of:=VLOOKUP([.D3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89]+1" office:value-type="float" office:value="389" calcext:value-type="float">
            <text:p>389</text:p>
          </table:table-cell>
          <table:table-cell table:content-validation-name="val2" table:formula="of:=VLOOKUP([.D3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0]+1" office:value-type="float" office:value="390" calcext:value-type="float">
            <text:p>390</text:p>
          </table:table-cell>
          <table:table-cell table:content-validation-name="val2" table:formula="of:=VLOOKUP([.D3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1]+1" office:value-type="float" office:value="391" calcext:value-type="float">
            <text:p>391</text:p>
          </table:table-cell>
          <table:table-cell table:content-validation-name="val2" table:formula="of:=VLOOKUP([.D3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2]+1" office:value-type="float" office:value="392" calcext:value-type="float">
            <text:p>392</text:p>
          </table:table-cell>
          <table:table-cell table:content-validation-name="val2" table:formula="of:=VLOOKUP([.D3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3]+1" office:value-type="float" office:value="393" calcext:value-type="float">
            <text:p>393</text:p>
          </table:table-cell>
          <table:table-cell table:content-validation-name="val2" table:formula="of:=VLOOKUP([.D3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4]+1" office:value-type="float" office:value="394" calcext:value-type="float">
            <text:p>394</text:p>
          </table:table-cell>
          <table:table-cell table:content-validation-name="val2" table:formula="of:=VLOOKUP([.D3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5]+1" office:value-type="float" office:value="395" calcext:value-type="float">
            <text:p>395</text:p>
          </table:table-cell>
          <table:table-cell table:content-validation-name="val2" table:formula="of:=VLOOKUP([.D3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6]+1" office:value-type="float" office:value="396" calcext:value-type="float">
            <text:p>396</text:p>
          </table:table-cell>
          <table:table-cell table:content-validation-name="val2" table:formula="of:=VLOOKUP([.D3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7]+1" office:value-type="float" office:value="397" calcext:value-type="float">
            <text:p>397</text:p>
          </table:table-cell>
          <table:table-cell table:content-validation-name="val2" table:formula="of:=VLOOKUP([.D3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8]+1" office:value-type="float" office:value="398" calcext:value-type="float">
            <text:p>398</text:p>
          </table:table-cell>
          <table:table-cell table:content-validation-name="val2" table:formula="of:=VLOOKUP([.D3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399]+1" office:value-type="float" office:value="399" calcext:value-type="float">
            <text:p>399</text:p>
          </table:table-cell>
          <table:table-cell table:content-validation-name="val2" table:formula="of:=VLOOKUP([.D4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0]+1" office:value-type="float" office:value="400" calcext:value-type="float">
            <text:p>400</text:p>
          </table:table-cell>
          <table:table-cell table:content-validation-name="val2" table:formula="of:=VLOOKUP([.D4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1]+1" office:value-type="float" office:value="401" calcext:value-type="float">
            <text:p>401</text:p>
          </table:table-cell>
          <table:table-cell table:content-validation-name="val2" table:formula="of:=VLOOKUP([.D4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2]+1" office:value-type="float" office:value="402" calcext:value-type="float">
            <text:p>402</text:p>
          </table:table-cell>
          <table:table-cell table:content-validation-name="val2" table:formula="of:=VLOOKUP([.D4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3]+1" office:value-type="float" office:value="403" calcext:value-type="float">
            <text:p>403</text:p>
          </table:table-cell>
          <table:table-cell table:content-validation-name="val2" table:formula="of:=VLOOKUP([.D4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4]+1" office:value-type="float" office:value="404" calcext:value-type="float">
            <text:p>404</text:p>
          </table:table-cell>
          <table:table-cell table:content-validation-name="val2" table:formula="of:=VLOOKUP([.D4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5]+1" office:value-type="float" office:value="405" calcext:value-type="float">
            <text:p>405</text:p>
          </table:table-cell>
          <table:table-cell table:content-validation-name="val2" table:formula="of:=VLOOKUP([.D4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6]+1" office:value-type="float" office:value="406" calcext:value-type="float">
            <text:p>406</text:p>
          </table:table-cell>
          <table:table-cell table:content-validation-name="val2" table:formula="of:=VLOOKUP([.D4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7]+1" office:value-type="float" office:value="407" calcext:value-type="float">
            <text:p>407</text:p>
          </table:table-cell>
          <table:table-cell table:content-validation-name="val2" table:formula="of:=VLOOKUP([.D4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8]+1" office:value-type="float" office:value="408" calcext:value-type="float">
            <text:p>408</text:p>
          </table:table-cell>
          <table:table-cell table:content-validation-name="val2" table:formula="of:=VLOOKUP([.D4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09]+1" office:value-type="float" office:value="409" calcext:value-type="float">
            <text:p>409</text:p>
          </table:table-cell>
          <table:table-cell table:content-validation-name="val2" table:formula="of:=VLOOKUP([.D4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0]+1" office:value-type="float" office:value="410" calcext:value-type="float">
            <text:p>410</text:p>
          </table:table-cell>
          <table:table-cell table:content-validation-name="val2" table:formula="of:=VLOOKUP([.D4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1]+1" office:value-type="float" office:value="411" calcext:value-type="float">
            <text:p>411</text:p>
          </table:table-cell>
          <table:table-cell table:content-validation-name="val2" table:formula="of:=VLOOKUP([.D4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2]+1" office:value-type="float" office:value="412" calcext:value-type="float">
            <text:p>412</text:p>
          </table:table-cell>
          <table:table-cell table:content-validation-name="val2" table:formula="of:=VLOOKUP([.D4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3]+1" office:value-type="float" office:value="413" calcext:value-type="float">
            <text:p>413</text:p>
          </table:table-cell>
          <table:table-cell table:content-validation-name="val2" table:formula="of:=VLOOKUP([.D4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4]+1" office:value-type="float" office:value="414" calcext:value-type="float">
            <text:p>414</text:p>
          </table:table-cell>
          <table:table-cell table:content-validation-name="val2" table:formula="of:=VLOOKUP([.D4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5]+1" office:value-type="float" office:value="415" calcext:value-type="float">
            <text:p>415</text:p>
          </table:table-cell>
          <table:table-cell table:content-validation-name="val2" table:formula="of:=VLOOKUP([.D4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6]+1" office:value-type="float" office:value="416" calcext:value-type="float">
            <text:p>416</text:p>
          </table:table-cell>
          <table:table-cell table:content-validation-name="val2" table:formula="of:=VLOOKUP([.D4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7]+1" office:value-type="float" office:value="417" calcext:value-type="float">
            <text:p>417</text:p>
          </table:table-cell>
          <table:table-cell table:content-validation-name="val2" table:formula="of:=VLOOKUP([.D4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8]+1" office:value-type="float" office:value="418" calcext:value-type="float">
            <text:p>418</text:p>
          </table:table-cell>
          <table:table-cell table:content-validation-name="val2" table:formula="of:=VLOOKUP([.D4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19]+1" office:value-type="float" office:value="419" calcext:value-type="float">
            <text:p>419</text:p>
          </table:table-cell>
          <table:table-cell table:content-validation-name="val2" table:formula="of:=VLOOKUP([.D4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0]+1" office:value-type="float" office:value="420" calcext:value-type="float">
            <text:p>420</text:p>
          </table:table-cell>
          <table:table-cell table:content-validation-name="val2" table:formula="of:=VLOOKUP([.D4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1]+1" office:value-type="float" office:value="421" calcext:value-type="float">
            <text:p>421</text:p>
          </table:table-cell>
          <table:table-cell table:content-validation-name="val2" table:formula="of:=VLOOKUP([.D4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2]+1" office:value-type="float" office:value="422" calcext:value-type="float">
            <text:p>422</text:p>
          </table:table-cell>
          <table:table-cell table:content-validation-name="val2" table:formula="of:=VLOOKUP([.D4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3]+1" office:value-type="float" office:value="423" calcext:value-type="float">
            <text:p>423</text:p>
          </table:table-cell>
          <table:table-cell table:content-validation-name="val2" table:formula="of:=VLOOKUP([.D4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4]+1" office:value-type="float" office:value="424" calcext:value-type="float">
            <text:p>424</text:p>
          </table:table-cell>
          <table:table-cell table:content-validation-name="val2" table:formula="of:=VLOOKUP([.D4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5]+1" office:value-type="float" office:value="425" calcext:value-type="float">
            <text:p>425</text:p>
          </table:table-cell>
          <table:table-cell table:content-validation-name="val2" table:formula="of:=VLOOKUP([.D4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6]+1" office:value-type="float" office:value="426" calcext:value-type="float">
            <text:p>426</text:p>
          </table:table-cell>
          <table:table-cell table:content-validation-name="val2" table:formula="of:=VLOOKUP([.D4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7]+1" office:value-type="float" office:value="427" calcext:value-type="float">
            <text:p>427</text:p>
          </table:table-cell>
          <table:table-cell table:content-validation-name="val2" table:formula="of:=VLOOKUP([.D4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8]+1" office:value-type="float" office:value="428" calcext:value-type="float">
            <text:p>428</text:p>
          </table:table-cell>
          <table:table-cell table:content-validation-name="val2" table:formula="of:=VLOOKUP([.D4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29]+1" office:value-type="float" office:value="429" calcext:value-type="float">
            <text:p>429</text:p>
          </table:table-cell>
          <table:table-cell table:content-validation-name="val2" table:formula="of:=VLOOKUP([.D4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0]+1" office:value-type="float" office:value="430" calcext:value-type="float">
            <text:p>430</text:p>
          </table:table-cell>
          <table:table-cell table:content-validation-name="val2" table:formula="of:=VLOOKUP([.D4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1]+1" office:value-type="float" office:value="431" calcext:value-type="float">
            <text:p>431</text:p>
          </table:table-cell>
          <table:table-cell table:content-validation-name="val2" table:formula="of:=VLOOKUP([.D4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2]+1" office:value-type="float" office:value="432" calcext:value-type="float">
            <text:p>432</text:p>
          </table:table-cell>
          <table:table-cell table:content-validation-name="val2" table:formula="of:=VLOOKUP([.D4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3]+1" office:value-type="float" office:value="433" calcext:value-type="float">
            <text:p>433</text:p>
          </table:table-cell>
          <table:table-cell table:content-validation-name="val2" table:formula="of:=VLOOKUP([.D4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4]+1" office:value-type="float" office:value="434" calcext:value-type="float">
            <text:p>434</text:p>
          </table:table-cell>
          <table:table-cell table:content-validation-name="val2" table:formula="of:=VLOOKUP([.D4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5]+1" office:value-type="float" office:value="435" calcext:value-type="float">
            <text:p>435</text:p>
          </table:table-cell>
          <table:table-cell table:content-validation-name="val2" table:formula="of:=VLOOKUP([.D4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6]+1" office:value-type="float" office:value="436" calcext:value-type="float">
            <text:p>436</text:p>
          </table:table-cell>
          <table:table-cell table:content-validation-name="val2" table:formula="of:=VLOOKUP([.D4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7]+1" office:value-type="float" office:value="437" calcext:value-type="float">
            <text:p>437</text:p>
          </table:table-cell>
          <table:table-cell table:content-validation-name="val2" table:formula="of:=VLOOKUP([.D4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8]+1" office:value-type="float" office:value="438" calcext:value-type="float">
            <text:p>438</text:p>
          </table:table-cell>
          <table:table-cell table:content-validation-name="val2" table:formula="of:=VLOOKUP([.D4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39]+1" office:value-type="float" office:value="439" calcext:value-type="float">
            <text:p>439</text:p>
          </table:table-cell>
          <table:table-cell table:content-validation-name="val2" table:formula="of:=VLOOKUP([.D4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0]+1" office:value-type="float" office:value="440" calcext:value-type="float">
            <text:p>440</text:p>
          </table:table-cell>
          <table:table-cell table:content-validation-name="val2" table:formula="of:=VLOOKUP([.D4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1]+1" office:value-type="float" office:value="441" calcext:value-type="float">
            <text:p>441</text:p>
          </table:table-cell>
          <table:table-cell table:content-validation-name="val2" table:formula="of:=VLOOKUP([.D4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2]+1" office:value-type="float" office:value="442" calcext:value-type="float">
            <text:p>442</text:p>
          </table:table-cell>
          <table:table-cell table:content-validation-name="val2" table:formula="of:=VLOOKUP([.D4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3]+1" office:value-type="float" office:value="443" calcext:value-type="float">
            <text:p>443</text:p>
          </table:table-cell>
          <table:table-cell table:content-validation-name="val2" table:formula="of:=VLOOKUP([.D4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4]+1" office:value-type="float" office:value="444" calcext:value-type="float">
            <text:p>444</text:p>
          </table:table-cell>
          <table:table-cell table:content-validation-name="val2" table:formula="of:=VLOOKUP([.D4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5]+1" office:value-type="float" office:value="445" calcext:value-type="float">
            <text:p>445</text:p>
          </table:table-cell>
          <table:table-cell table:content-validation-name="val2" table:formula="of:=VLOOKUP([.D4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6]+1" office:value-type="float" office:value="446" calcext:value-type="float">
            <text:p>446</text:p>
          </table:table-cell>
          <table:table-cell table:content-validation-name="val2" table:formula="of:=VLOOKUP([.D4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7]+1" office:value-type="float" office:value="447" calcext:value-type="float">
            <text:p>447</text:p>
          </table:table-cell>
          <table:table-cell table:content-validation-name="val2" table:formula="of:=VLOOKUP([.D4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8]+1" office:value-type="float" office:value="448" calcext:value-type="float">
            <text:p>448</text:p>
          </table:table-cell>
          <table:table-cell table:content-validation-name="val2" table:formula="of:=VLOOKUP([.D4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49]+1" office:value-type="float" office:value="449" calcext:value-type="float">
            <text:p>449</text:p>
          </table:table-cell>
          <table:table-cell table:content-validation-name="val2" table:formula="of:=VLOOKUP([.D4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0]+1" office:value-type="float" office:value="450" calcext:value-type="float">
            <text:p>450</text:p>
          </table:table-cell>
          <table:table-cell table:content-validation-name="val2" table:formula="of:=VLOOKUP([.D4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1]+1" office:value-type="float" office:value="451" calcext:value-type="float">
            <text:p>451</text:p>
          </table:table-cell>
          <table:table-cell table:content-validation-name="val2" table:formula="of:=VLOOKUP([.D4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2]+1" office:value-type="float" office:value="452" calcext:value-type="float">
            <text:p>452</text:p>
          </table:table-cell>
          <table:table-cell table:content-validation-name="val2" table:formula="of:=VLOOKUP([.D4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3]+1" office:value-type="float" office:value="453" calcext:value-type="float">
            <text:p>453</text:p>
          </table:table-cell>
          <table:table-cell table:content-validation-name="val2" table:formula="of:=VLOOKUP([.D4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4]+1" office:value-type="float" office:value="454" calcext:value-type="float">
            <text:p>454</text:p>
          </table:table-cell>
          <table:table-cell table:content-validation-name="val2" table:formula="of:=VLOOKUP([.D4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5]+1" office:value-type="float" office:value="455" calcext:value-type="float">
            <text:p>455</text:p>
          </table:table-cell>
          <table:table-cell table:content-validation-name="val2" table:formula="of:=VLOOKUP([.D4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6]+1" office:value-type="float" office:value="456" calcext:value-type="float">
            <text:p>456</text:p>
          </table:table-cell>
          <table:table-cell table:content-validation-name="val2" table:formula="of:=VLOOKUP([.D4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7]+1" office:value-type="float" office:value="457" calcext:value-type="float">
            <text:p>457</text:p>
          </table:table-cell>
          <table:table-cell table:content-validation-name="val2" table:formula="of:=VLOOKUP([.D4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8]+1" office:value-type="float" office:value="458" calcext:value-type="float">
            <text:p>458</text:p>
          </table:table-cell>
          <table:table-cell table:content-validation-name="val2" table:formula="of:=VLOOKUP([.D4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59]+1" office:value-type="float" office:value="459" calcext:value-type="float">
            <text:p>459</text:p>
          </table:table-cell>
          <table:table-cell table:content-validation-name="val2" table:formula="of:=VLOOKUP([.D4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0]+1" office:value-type="float" office:value="460" calcext:value-type="float">
            <text:p>460</text:p>
          </table:table-cell>
          <table:table-cell table:content-validation-name="val2" table:formula="of:=VLOOKUP([.D4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1]+1" office:value-type="float" office:value="461" calcext:value-type="float">
            <text:p>461</text:p>
          </table:table-cell>
          <table:table-cell table:content-validation-name="val2" table:formula="of:=VLOOKUP([.D4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2]+1" office:value-type="float" office:value="462" calcext:value-type="float">
            <text:p>462</text:p>
          </table:table-cell>
          <table:table-cell table:content-validation-name="val2" table:formula="of:=VLOOKUP([.D4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3]+1" office:value-type="float" office:value="463" calcext:value-type="float">
            <text:p>463</text:p>
          </table:table-cell>
          <table:table-cell table:content-validation-name="val2" table:formula="of:=VLOOKUP([.D4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4]+1" office:value-type="float" office:value="464" calcext:value-type="float">
            <text:p>464</text:p>
          </table:table-cell>
          <table:table-cell table:content-validation-name="val2" table:formula="of:=VLOOKUP([.D4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5]+1" office:value-type="float" office:value="465" calcext:value-type="float">
            <text:p>465</text:p>
          </table:table-cell>
          <table:table-cell table:content-validation-name="val2" table:formula="of:=VLOOKUP([.D4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6]+1" office:value-type="float" office:value="466" calcext:value-type="float">
            <text:p>466</text:p>
          </table:table-cell>
          <table:table-cell table:content-validation-name="val2" table:formula="of:=VLOOKUP([.D4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7]+1" office:value-type="float" office:value="467" calcext:value-type="float">
            <text:p>467</text:p>
          </table:table-cell>
          <table:table-cell table:content-validation-name="val2" table:formula="of:=VLOOKUP([.D4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8]+1" office:value-type="float" office:value="468" calcext:value-type="float">
            <text:p>468</text:p>
          </table:table-cell>
          <table:table-cell table:content-validation-name="val2" table:formula="of:=VLOOKUP([.D4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69]+1" office:value-type="float" office:value="469" calcext:value-type="float">
            <text:p>469</text:p>
          </table:table-cell>
          <table:table-cell table:content-validation-name="val2" table:formula="of:=VLOOKUP([.D4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0]+1" office:value-type="float" office:value="470" calcext:value-type="float">
            <text:p>470</text:p>
          </table:table-cell>
          <table:table-cell table:content-validation-name="val2" table:formula="of:=VLOOKUP([.D4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1]+1" office:value-type="float" office:value="471" calcext:value-type="float">
            <text:p>471</text:p>
          </table:table-cell>
          <table:table-cell table:content-validation-name="val2" table:formula="of:=VLOOKUP([.D4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2]+1" office:value-type="float" office:value="472" calcext:value-type="float">
            <text:p>472</text:p>
          </table:table-cell>
          <table:table-cell table:content-validation-name="val2" table:formula="of:=VLOOKUP([.D4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3]+1" office:value-type="float" office:value="473" calcext:value-type="float">
            <text:p>473</text:p>
          </table:table-cell>
          <table:table-cell table:content-validation-name="val2" table:formula="of:=VLOOKUP([.D4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4]+1" office:value-type="float" office:value="474" calcext:value-type="float">
            <text:p>474</text:p>
          </table:table-cell>
          <table:table-cell table:content-validation-name="val2" table:formula="of:=VLOOKUP([.D4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5]+1" office:value-type="float" office:value="475" calcext:value-type="float">
            <text:p>475</text:p>
          </table:table-cell>
          <table:table-cell table:content-validation-name="val2" table:formula="of:=VLOOKUP([.D4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6]+1" office:value-type="float" office:value="476" calcext:value-type="float">
            <text:p>476</text:p>
          </table:table-cell>
          <table:table-cell table:content-validation-name="val2" table:formula="of:=VLOOKUP([.D4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7]+1" office:value-type="float" office:value="477" calcext:value-type="float">
            <text:p>477</text:p>
          </table:table-cell>
          <table:table-cell table:content-validation-name="val2" table:formula="of:=VLOOKUP([.D4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8]+1" office:value-type="float" office:value="478" calcext:value-type="float">
            <text:p>478</text:p>
          </table:table-cell>
          <table:table-cell table:content-validation-name="val2" table:formula="of:=VLOOKUP([.D4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79]+1" office:value-type="float" office:value="479" calcext:value-type="float">
            <text:p>479</text:p>
          </table:table-cell>
          <table:table-cell table:content-validation-name="val2" table:formula="of:=VLOOKUP([.D4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0]+1" office:value-type="float" office:value="480" calcext:value-type="float">
            <text:p>480</text:p>
          </table:table-cell>
          <table:table-cell table:content-validation-name="val2" table:formula="of:=VLOOKUP([.D4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1]+1" office:value-type="float" office:value="481" calcext:value-type="float">
            <text:p>481</text:p>
          </table:table-cell>
          <table:table-cell table:content-validation-name="val2" table:formula="of:=VLOOKUP([.D4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2]+1" office:value-type="float" office:value="482" calcext:value-type="float">
            <text:p>482</text:p>
          </table:table-cell>
          <table:table-cell table:content-validation-name="val2" table:formula="of:=VLOOKUP([.D4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3]+1" office:value-type="float" office:value="483" calcext:value-type="float">
            <text:p>483</text:p>
          </table:table-cell>
          <table:table-cell table:content-validation-name="val2" table:formula="of:=VLOOKUP([.D4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4]+1" office:value-type="float" office:value="484" calcext:value-type="float">
            <text:p>484</text:p>
          </table:table-cell>
          <table:table-cell table:content-validation-name="val2" table:formula="of:=VLOOKUP([.D4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5]+1" office:value-type="float" office:value="485" calcext:value-type="float">
            <text:p>485</text:p>
          </table:table-cell>
          <table:table-cell table:content-validation-name="val2" table:formula="of:=VLOOKUP([.D4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6]+1" office:value-type="float" office:value="486" calcext:value-type="float">
            <text:p>486</text:p>
          </table:table-cell>
          <table:table-cell table:content-validation-name="val2" table:formula="of:=VLOOKUP([.D4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7]+1" office:value-type="float" office:value="487" calcext:value-type="float">
            <text:p>487</text:p>
          </table:table-cell>
          <table:table-cell table:content-validation-name="val2" table:formula="of:=VLOOKUP([.D4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8]+1" office:value-type="float" office:value="488" calcext:value-type="float">
            <text:p>488</text:p>
          </table:table-cell>
          <table:table-cell table:content-validation-name="val2" table:formula="of:=VLOOKUP([.D4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89]+1" office:value-type="float" office:value="489" calcext:value-type="float">
            <text:p>489</text:p>
          </table:table-cell>
          <table:table-cell table:content-validation-name="val2" table:formula="of:=VLOOKUP([.D4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0]+1" office:value-type="float" office:value="490" calcext:value-type="float">
            <text:p>490</text:p>
          </table:table-cell>
          <table:table-cell table:content-validation-name="val2" table:formula="of:=VLOOKUP([.D4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1]+1" office:value-type="float" office:value="491" calcext:value-type="float">
            <text:p>491</text:p>
          </table:table-cell>
          <table:table-cell table:content-validation-name="val2" table:formula="of:=VLOOKUP([.D4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2]+1" office:value-type="float" office:value="492" calcext:value-type="float">
            <text:p>492</text:p>
          </table:table-cell>
          <table:table-cell table:content-validation-name="val2" table:formula="of:=VLOOKUP([.D4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3]+1" office:value-type="float" office:value="493" calcext:value-type="float">
            <text:p>493</text:p>
          </table:table-cell>
          <table:table-cell table:content-validation-name="val2" table:formula="of:=VLOOKUP([.D4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4]+1" office:value-type="float" office:value="494" calcext:value-type="float">
            <text:p>494</text:p>
          </table:table-cell>
          <table:table-cell table:content-validation-name="val2" table:formula="of:=VLOOKUP([.D4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5]+1" office:value-type="float" office:value="495" calcext:value-type="float">
            <text:p>495</text:p>
          </table:table-cell>
          <table:table-cell table:content-validation-name="val2" table:formula="of:=VLOOKUP([.D4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6]+1" office:value-type="float" office:value="496" calcext:value-type="float">
            <text:p>496</text:p>
          </table:table-cell>
          <table:table-cell table:content-validation-name="val2" table:formula="of:=VLOOKUP([.D4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7]+1" office:value-type="float" office:value="497" calcext:value-type="float">
            <text:p>497</text:p>
          </table:table-cell>
          <table:table-cell table:content-validation-name="val2" table:formula="of:=VLOOKUP([.D4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8]+1" office:value-type="float" office:value="498" calcext:value-type="float">
            <text:p>498</text:p>
          </table:table-cell>
          <table:table-cell table:content-validation-name="val2" table:formula="of:=VLOOKUP([.D4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499]+1" office:value-type="float" office:value="499" calcext:value-type="float">
            <text:p>499</text:p>
          </table:table-cell>
          <table:table-cell table:content-validation-name="val2" table:formula="of:=VLOOKUP([.D5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0]+1" office:value-type="float" office:value="500" calcext:value-type="float">
            <text:p>500</text:p>
          </table:table-cell>
          <table:table-cell table:content-validation-name="val2" table:formula="of:=VLOOKUP([.D5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1]+1" office:value-type="float" office:value="501" calcext:value-type="float">
            <text:p>501</text:p>
          </table:table-cell>
          <table:table-cell table:content-validation-name="val2" table:formula="of:=VLOOKUP([.D5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2]+1" office:value-type="float" office:value="502" calcext:value-type="float">
            <text:p>502</text:p>
          </table:table-cell>
          <table:table-cell table:content-validation-name="val2" table:formula="of:=VLOOKUP([.D5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3]+1" office:value-type="float" office:value="503" calcext:value-type="float">
            <text:p>503</text:p>
          </table:table-cell>
          <table:table-cell table:content-validation-name="val2" table:formula="of:=VLOOKUP([.D5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4]+1" office:value-type="float" office:value="504" calcext:value-type="float">
            <text:p>504</text:p>
          </table:table-cell>
          <table:table-cell table:content-validation-name="val2" table:formula="of:=VLOOKUP([.D5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5]+1" office:value-type="float" office:value="505" calcext:value-type="float">
            <text:p>505</text:p>
          </table:table-cell>
          <table:table-cell table:content-validation-name="val2" table:formula="of:=VLOOKUP([.D5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6]+1" office:value-type="float" office:value="506" calcext:value-type="float">
            <text:p>506</text:p>
          </table:table-cell>
          <table:table-cell table:content-validation-name="val2" table:formula="of:=VLOOKUP([.D5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7]+1" office:value-type="float" office:value="507" calcext:value-type="float">
            <text:p>507</text:p>
          </table:table-cell>
          <table:table-cell table:content-validation-name="val2" table:formula="of:=VLOOKUP([.D5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8]+1" office:value-type="float" office:value="508" calcext:value-type="float">
            <text:p>508</text:p>
          </table:table-cell>
          <table:table-cell table:content-validation-name="val2" table:formula="of:=VLOOKUP([.D5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09]+1" office:value-type="float" office:value="509" calcext:value-type="float">
            <text:p>509</text:p>
          </table:table-cell>
          <table:table-cell table:content-validation-name="val2" table:formula="of:=VLOOKUP([.D5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0]+1" office:value-type="float" office:value="510" calcext:value-type="float">
            <text:p>510</text:p>
          </table:table-cell>
          <table:table-cell table:content-validation-name="val2" table:formula="of:=VLOOKUP([.D5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1]+1" office:value-type="float" office:value="511" calcext:value-type="float">
            <text:p>511</text:p>
          </table:table-cell>
          <table:table-cell table:content-validation-name="val2" table:formula="of:=VLOOKUP([.D5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2]+1" office:value-type="float" office:value="512" calcext:value-type="float">
            <text:p>512</text:p>
          </table:table-cell>
          <table:table-cell table:content-validation-name="val2" table:formula="of:=VLOOKUP([.D5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3]+1" office:value-type="float" office:value="513" calcext:value-type="float">
            <text:p>513</text:p>
          </table:table-cell>
          <table:table-cell table:content-validation-name="val2" table:formula="of:=VLOOKUP([.D5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4]+1" office:value-type="float" office:value="514" calcext:value-type="float">
            <text:p>514</text:p>
          </table:table-cell>
          <table:table-cell table:content-validation-name="val2" table:formula="of:=VLOOKUP([.D5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5]+1" office:value-type="float" office:value="515" calcext:value-type="float">
            <text:p>515</text:p>
          </table:table-cell>
          <table:table-cell table:content-validation-name="val2" table:formula="of:=VLOOKUP([.D5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6]+1" office:value-type="float" office:value="516" calcext:value-type="float">
            <text:p>516</text:p>
          </table:table-cell>
          <table:table-cell table:content-validation-name="val2" table:formula="of:=VLOOKUP([.D5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7]+1" office:value-type="float" office:value="517" calcext:value-type="float">
            <text:p>517</text:p>
          </table:table-cell>
          <table:table-cell table:content-validation-name="val2" table:formula="of:=VLOOKUP([.D5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8]+1" office:value-type="float" office:value="518" calcext:value-type="float">
            <text:p>518</text:p>
          </table:table-cell>
          <table:table-cell table:content-validation-name="val2" table:formula="of:=VLOOKUP([.D5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19]+1" office:value-type="float" office:value="519" calcext:value-type="float">
            <text:p>519</text:p>
          </table:table-cell>
          <table:table-cell table:content-validation-name="val2" table:formula="of:=VLOOKUP([.D5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0]+1" office:value-type="float" office:value="520" calcext:value-type="float">
            <text:p>520</text:p>
          </table:table-cell>
          <table:table-cell table:content-validation-name="val2" table:formula="of:=VLOOKUP([.D5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1]+1" office:value-type="float" office:value="521" calcext:value-type="float">
            <text:p>521</text:p>
          </table:table-cell>
          <table:table-cell table:content-validation-name="val2" table:formula="of:=VLOOKUP([.D5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2]+1" office:value-type="float" office:value="522" calcext:value-type="float">
            <text:p>522</text:p>
          </table:table-cell>
          <table:table-cell table:content-validation-name="val2" table:formula="of:=VLOOKUP([.D5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3]+1" office:value-type="float" office:value="523" calcext:value-type="float">
            <text:p>523</text:p>
          </table:table-cell>
          <table:table-cell table:content-validation-name="val2" table:formula="of:=VLOOKUP([.D5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4]+1" office:value-type="float" office:value="524" calcext:value-type="float">
            <text:p>524</text:p>
          </table:table-cell>
          <table:table-cell table:content-validation-name="val2" table:formula="of:=VLOOKUP([.D5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5]+1" office:value-type="float" office:value="525" calcext:value-type="float">
            <text:p>525</text:p>
          </table:table-cell>
          <table:table-cell table:content-validation-name="val2" table:formula="of:=VLOOKUP([.D5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6]+1" office:value-type="float" office:value="526" calcext:value-type="float">
            <text:p>526</text:p>
          </table:table-cell>
          <table:table-cell table:content-validation-name="val2" table:formula="of:=VLOOKUP([.D5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7]+1" office:value-type="float" office:value="527" calcext:value-type="float">
            <text:p>527</text:p>
          </table:table-cell>
          <table:table-cell table:content-validation-name="val2" table:formula="of:=VLOOKUP([.D5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8]+1" office:value-type="float" office:value="528" calcext:value-type="float">
            <text:p>528</text:p>
          </table:table-cell>
          <table:table-cell table:content-validation-name="val2" table:formula="of:=VLOOKUP([.D5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29]+1" office:value-type="float" office:value="529" calcext:value-type="float">
            <text:p>529</text:p>
          </table:table-cell>
          <table:table-cell table:content-validation-name="val2" table:formula="of:=VLOOKUP([.D5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0]+1" office:value-type="float" office:value="530" calcext:value-type="float">
            <text:p>530</text:p>
          </table:table-cell>
          <table:table-cell table:content-validation-name="val2" table:formula="of:=VLOOKUP([.D5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1]+1" office:value-type="float" office:value="531" calcext:value-type="float">
            <text:p>531</text:p>
          </table:table-cell>
          <table:table-cell table:content-validation-name="val2" table:formula="of:=VLOOKUP([.D5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2]+1" office:value-type="float" office:value="532" calcext:value-type="float">
            <text:p>532</text:p>
          </table:table-cell>
          <table:table-cell table:content-validation-name="val2" table:formula="of:=VLOOKUP([.D5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3]+1" office:value-type="float" office:value="533" calcext:value-type="float">
            <text:p>533</text:p>
          </table:table-cell>
          <table:table-cell table:content-validation-name="val2" table:formula="of:=VLOOKUP([.D5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4]+1" office:value-type="float" office:value="534" calcext:value-type="float">
            <text:p>534</text:p>
          </table:table-cell>
          <table:table-cell table:content-validation-name="val2" table:formula="of:=VLOOKUP([.D5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5]+1" office:value-type="float" office:value="535" calcext:value-type="float">
            <text:p>535</text:p>
          </table:table-cell>
          <table:table-cell table:content-validation-name="val2" table:formula="of:=VLOOKUP([.D5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6]+1" office:value-type="float" office:value="536" calcext:value-type="float">
            <text:p>536</text:p>
          </table:table-cell>
          <table:table-cell table:content-validation-name="val2" table:formula="of:=VLOOKUP([.D5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7]+1" office:value-type="float" office:value="537" calcext:value-type="float">
            <text:p>537</text:p>
          </table:table-cell>
          <table:table-cell table:content-validation-name="val2" table:formula="of:=VLOOKUP([.D5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8]+1" office:value-type="float" office:value="538" calcext:value-type="float">
            <text:p>538</text:p>
          </table:table-cell>
          <table:table-cell table:content-validation-name="val2" table:formula="of:=VLOOKUP([.D5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39]+1" office:value-type="float" office:value="539" calcext:value-type="float">
            <text:p>539</text:p>
          </table:table-cell>
          <table:table-cell table:content-validation-name="val2" table:formula="of:=VLOOKUP([.D5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0]+1" office:value-type="float" office:value="540" calcext:value-type="float">
            <text:p>540</text:p>
          </table:table-cell>
          <table:table-cell table:content-validation-name="val2" table:formula="of:=VLOOKUP([.D5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1]+1" office:value-type="float" office:value="541" calcext:value-type="float">
            <text:p>541</text:p>
          </table:table-cell>
          <table:table-cell table:content-validation-name="val2" table:formula="of:=VLOOKUP([.D5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2]+1" office:value-type="float" office:value="542" calcext:value-type="float">
            <text:p>542</text:p>
          </table:table-cell>
          <table:table-cell table:content-validation-name="val2" table:formula="of:=VLOOKUP([.D5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3]+1" office:value-type="float" office:value="543" calcext:value-type="float">
            <text:p>543</text:p>
          </table:table-cell>
          <table:table-cell table:content-validation-name="val2" table:formula="of:=VLOOKUP([.D5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4]+1" office:value-type="float" office:value="544" calcext:value-type="float">
            <text:p>544</text:p>
          </table:table-cell>
          <table:table-cell table:content-validation-name="val2" table:formula="of:=VLOOKUP([.D5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5]+1" office:value-type="float" office:value="545" calcext:value-type="float">
            <text:p>545</text:p>
          </table:table-cell>
          <table:table-cell table:content-validation-name="val2" table:formula="of:=VLOOKUP([.D5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6]+1" office:value-type="float" office:value="546" calcext:value-type="float">
            <text:p>546</text:p>
          </table:table-cell>
          <table:table-cell table:content-validation-name="val2" table:formula="of:=VLOOKUP([.D5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7]+1" office:value-type="float" office:value="547" calcext:value-type="float">
            <text:p>547</text:p>
          </table:table-cell>
          <table:table-cell table:content-validation-name="val2" table:formula="of:=VLOOKUP([.D5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8]+1" office:value-type="float" office:value="548" calcext:value-type="float">
            <text:p>548</text:p>
          </table:table-cell>
          <table:table-cell table:content-validation-name="val2" table:formula="of:=VLOOKUP([.D5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49]+1" office:value-type="float" office:value="549" calcext:value-type="float">
            <text:p>549</text:p>
          </table:table-cell>
          <table:table-cell table:content-validation-name="val2" table:formula="of:=VLOOKUP([.D5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0]+1" office:value-type="float" office:value="550" calcext:value-type="float">
            <text:p>550</text:p>
          </table:table-cell>
          <table:table-cell table:content-validation-name="val2" table:formula="of:=VLOOKUP([.D5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1]+1" office:value-type="float" office:value="551" calcext:value-type="float">
            <text:p>551</text:p>
          </table:table-cell>
          <table:table-cell table:content-validation-name="val2" table:formula="of:=VLOOKUP([.D5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2]+1" office:value-type="float" office:value="552" calcext:value-type="float">
            <text:p>552</text:p>
          </table:table-cell>
          <table:table-cell table:content-validation-name="val2" table:formula="of:=VLOOKUP([.D5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3]+1" office:value-type="float" office:value="553" calcext:value-type="float">
            <text:p>553</text:p>
          </table:table-cell>
          <table:table-cell table:content-validation-name="val2" table:formula="of:=VLOOKUP([.D5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4]+1" office:value-type="float" office:value="554" calcext:value-type="float">
            <text:p>554</text:p>
          </table:table-cell>
          <table:table-cell table:content-validation-name="val2" table:formula="of:=VLOOKUP([.D5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5]+1" office:value-type="float" office:value="555" calcext:value-type="float">
            <text:p>555</text:p>
          </table:table-cell>
          <table:table-cell table:content-validation-name="val2" table:formula="of:=VLOOKUP([.D5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6]+1" office:value-type="float" office:value="556" calcext:value-type="float">
            <text:p>556</text:p>
          </table:table-cell>
          <table:table-cell table:content-validation-name="val2" table:formula="of:=VLOOKUP([.D5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7]+1" office:value-type="float" office:value="557" calcext:value-type="float">
            <text:p>557</text:p>
          </table:table-cell>
          <table:table-cell table:content-validation-name="val2" table:formula="of:=VLOOKUP([.D5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8]+1" office:value-type="float" office:value="558" calcext:value-type="float">
            <text:p>558</text:p>
          </table:table-cell>
          <table:table-cell table:content-validation-name="val2" table:formula="of:=VLOOKUP([.D5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59]+1" office:value-type="float" office:value="559" calcext:value-type="float">
            <text:p>559</text:p>
          </table:table-cell>
          <table:table-cell table:content-validation-name="val2" table:formula="of:=VLOOKUP([.D5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0]+1" office:value-type="float" office:value="560" calcext:value-type="float">
            <text:p>560</text:p>
          </table:table-cell>
          <table:table-cell table:content-validation-name="val2" table:formula="of:=VLOOKUP([.D5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1]+1" office:value-type="float" office:value="561" calcext:value-type="float">
            <text:p>561</text:p>
          </table:table-cell>
          <table:table-cell table:content-validation-name="val2" table:formula="of:=VLOOKUP([.D5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2]+1" office:value-type="float" office:value="562" calcext:value-type="float">
            <text:p>562</text:p>
          </table:table-cell>
          <table:table-cell table:content-validation-name="val2" table:formula="of:=VLOOKUP([.D5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3]+1" office:value-type="float" office:value="563" calcext:value-type="float">
            <text:p>563</text:p>
          </table:table-cell>
          <table:table-cell table:content-validation-name="val2" table:formula="of:=VLOOKUP([.D5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4]+1" office:value-type="float" office:value="564" calcext:value-type="float">
            <text:p>564</text:p>
          </table:table-cell>
          <table:table-cell table:content-validation-name="val2" table:formula="of:=VLOOKUP([.D5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5]+1" office:value-type="float" office:value="565" calcext:value-type="float">
            <text:p>565</text:p>
          </table:table-cell>
          <table:table-cell table:content-validation-name="val2" table:formula="of:=VLOOKUP([.D5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6]+1" office:value-type="float" office:value="566" calcext:value-type="float">
            <text:p>566</text:p>
          </table:table-cell>
          <table:table-cell table:content-validation-name="val2" table:formula="of:=VLOOKUP([.D5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7]+1" office:value-type="float" office:value="567" calcext:value-type="float">
            <text:p>567</text:p>
          </table:table-cell>
          <table:table-cell table:content-validation-name="val2" table:formula="of:=VLOOKUP([.D5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8]+1" office:value-type="float" office:value="568" calcext:value-type="float">
            <text:p>568</text:p>
          </table:table-cell>
          <table:table-cell table:content-validation-name="val2" table:formula="of:=VLOOKUP([.D5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69]+1" office:value-type="float" office:value="569" calcext:value-type="float">
            <text:p>569</text:p>
          </table:table-cell>
          <table:table-cell table:content-validation-name="val2" table:formula="of:=VLOOKUP([.D5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0]+1" office:value-type="float" office:value="570" calcext:value-type="float">
            <text:p>570</text:p>
          </table:table-cell>
          <table:table-cell table:content-validation-name="val2" table:formula="of:=VLOOKUP([.D5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1]+1" office:value-type="float" office:value="571" calcext:value-type="float">
            <text:p>571</text:p>
          </table:table-cell>
          <table:table-cell table:content-validation-name="val2" table:formula="of:=VLOOKUP([.D5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2]+1" office:value-type="float" office:value="572" calcext:value-type="float">
            <text:p>572</text:p>
          </table:table-cell>
          <table:table-cell table:content-validation-name="val2" table:formula="of:=VLOOKUP([.D5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3]+1" office:value-type="float" office:value="573" calcext:value-type="float">
            <text:p>573</text:p>
          </table:table-cell>
          <table:table-cell table:content-validation-name="val2" table:formula="of:=VLOOKUP([.D5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4]+1" office:value-type="float" office:value="574" calcext:value-type="float">
            <text:p>574</text:p>
          </table:table-cell>
          <table:table-cell table:content-validation-name="val2" table:formula="of:=VLOOKUP([.D5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5]+1" office:value-type="float" office:value="575" calcext:value-type="float">
            <text:p>575</text:p>
          </table:table-cell>
          <table:table-cell table:content-validation-name="val2" table:formula="of:=VLOOKUP([.D5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6]+1" office:value-type="float" office:value="576" calcext:value-type="float">
            <text:p>576</text:p>
          </table:table-cell>
          <table:table-cell table:content-validation-name="val2" table:formula="of:=VLOOKUP([.D5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7]+1" office:value-type="float" office:value="577" calcext:value-type="float">
            <text:p>577</text:p>
          </table:table-cell>
          <table:table-cell table:content-validation-name="val2" table:formula="of:=VLOOKUP([.D5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8]+1" office:value-type="float" office:value="578" calcext:value-type="float">
            <text:p>578</text:p>
          </table:table-cell>
          <table:table-cell table:content-validation-name="val2" table:formula="of:=VLOOKUP([.D5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79]+1" office:value-type="float" office:value="579" calcext:value-type="float">
            <text:p>579</text:p>
          </table:table-cell>
          <table:table-cell table:content-validation-name="val2" table:formula="of:=VLOOKUP([.D5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0]+1" office:value-type="float" office:value="580" calcext:value-type="float">
            <text:p>580</text:p>
          </table:table-cell>
          <table:table-cell table:content-validation-name="val2" table:formula="of:=VLOOKUP([.D5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1]+1" office:value-type="float" office:value="581" calcext:value-type="float">
            <text:p>581</text:p>
          </table:table-cell>
          <table:table-cell table:content-validation-name="val2" table:formula="of:=VLOOKUP([.D5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2]+1" office:value-type="float" office:value="582" calcext:value-type="float">
            <text:p>582</text:p>
          </table:table-cell>
          <table:table-cell table:content-validation-name="val2" table:formula="of:=VLOOKUP([.D5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3]+1" office:value-type="float" office:value="583" calcext:value-type="float">
            <text:p>583</text:p>
          </table:table-cell>
          <table:table-cell table:content-validation-name="val2" table:formula="of:=VLOOKUP([.D5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4]+1" office:value-type="float" office:value="584" calcext:value-type="float">
            <text:p>584</text:p>
          </table:table-cell>
          <table:table-cell table:content-validation-name="val2" table:formula="of:=VLOOKUP([.D5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5]+1" office:value-type="float" office:value="585" calcext:value-type="float">
            <text:p>585</text:p>
          </table:table-cell>
          <table:table-cell table:content-validation-name="val2" table:formula="of:=VLOOKUP([.D5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6]+1" office:value-type="float" office:value="586" calcext:value-type="float">
            <text:p>586</text:p>
          </table:table-cell>
          <table:table-cell table:content-validation-name="val2" table:formula="of:=VLOOKUP([.D5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7]+1" office:value-type="float" office:value="587" calcext:value-type="float">
            <text:p>587</text:p>
          </table:table-cell>
          <table:table-cell table:content-validation-name="val2" table:formula="of:=VLOOKUP([.D5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8]+1" office:value-type="float" office:value="588" calcext:value-type="float">
            <text:p>588</text:p>
          </table:table-cell>
          <table:table-cell table:content-validation-name="val2" table:formula="of:=VLOOKUP([.D5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89]+1" office:value-type="float" office:value="589" calcext:value-type="float">
            <text:p>589</text:p>
          </table:table-cell>
          <table:table-cell table:content-validation-name="val2" table:formula="of:=VLOOKUP([.D5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0]+1" office:value-type="float" office:value="590" calcext:value-type="float">
            <text:p>590</text:p>
          </table:table-cell>
          <table:table-cell table:content-validation-name="val2" table:formula="of:=VLOOKUP([.D5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1]+1" office:value-type="float" office:value="591" calcext:value-type="float">
            <text:p>591</text:p>
          </table:table-cell>
          <table:table-cell table:content-validation-name="val2" table:formula="of:=VLOOKUP([.D5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2]+1" office:value-type="float" office:value="592" calcext:value-type="float">
            <text:p>592</text:p>
          </table:table-cell>
          <table:table-cell table:content-validation-name="val2" table:formula="of:=VLOOKUP([.D5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3]+1" office:value-type="float" office:value="593" calcext:value-type="float">
            <text:p>593</text:p>
          </table:table-cell>
          <table:table-cell table:content-validation-name="val2" table:formula="of:=VLOOKUP([.D5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4]+1" office:value-type="float" office:value="594" calcext:value-type="float">
            <text:p>594</text:p>
          </table:table-cell>
          <table:table-cell table:content-validation-name="val2" table:formula="of:=VLOOKUP([.D5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5]+1" office:value-type="float" office:value="595" calcext:value-type="float">
            <text:p>595</text:p>
          </table:table-cell>
          <table:table-cell table:content-validation-name="val2" table:formula="of:=VLOOKUP([.D5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6]+1" office:value-type="float" office:value="596" calcext:value-type="float">
            <text:p>596</text:p>
          </table:table-cell>
          <table:table-cell table:content-validation-name="val2" table:formula="of:=VLOOKUP([.D5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7]+1" office:value-type="float" office:value="597" calcext:value-type="float">
            <text:p>597</text:p>
          </table:table-cell>
          <table:table-cell table:content-validation-name="val2" table:formula="of:=VLOOKUP([.D5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8]+1" office:value-type="float" office:value="598" calcext:value-type="float">
            <text:p>598</text:p>
          </table:table-cell>
          <table:table-cell table:content-validation-name="val2" table:formula="of:=VLOOKUP([.D5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599]+1" office:value-type="float" office:value="599" calcext:value-type="float">
            <text:p>599</text:p>
          </table:table-cell>
          <table:table-cell table:content-validation-name="val2" table:formula="of:=VLOOKUP([.D6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0]+1" office:value-type="float" office:value="600" calcext:value-type="float">
            <text:p>600</text:p>
          </table:table-cell>
          <table:table-cell table:content-validation-name="val2" table:formula="of:=VLOOKUP([.D6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1]+1" office:value-type="float" office:value="601" calcext:value-type="float">
            <text:p>601</text:p>
          </table:table-cell>
          <table:table-cell table:content-validation-name="val2" table:formula="of:=VLOOKUP([.D6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2]+1" office:value-type="float" office:value="602" calcext:value-type="float">
            <text:p>602</text:p>
          </table:table-cell>
          <table:table-cell table:content-validation-name="val2" table:formula="of:=VLOOKUP([.D6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3]+1" office:value-type="float" office:value="603" calcext:value-type="float">
            <text:p>603</text:p>
          </table:table-cell>
          <table:table-cell table:content-validation-name="val2" table:formula="of:=VLOOKUP([.D6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4]+1" office:value-type="float" office:value="604" calcext:value-type="float">
            <text:p>604</text:p>
          </table:table-cell>
          <table:table-cell table:content-validation-name="val2" table:formula="of:=VLOOKUP([.D6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5]+1" office:value-type="float" office:value="605" calcext:value-type="float">
            <text:p>605</text:p>
          </table:table-cell>
          <table:table-cell table:content-validation-name="val2" table:formula="of:=VLOOKUP([.D6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6]+1" office:value-type="float" office:value="606" calcext:value-type="float">
            <text:p>606</text:p>
          </table:table-cell>
          <table:table-cell table:content-validation-name="val2" table:formula="of:=VLOOKUP([.D6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7]+1" office:value-type="float" office:value="607" calcext:value-type="float">
            <text:p>607</text:p>
          </table:table-cell>
          <table:table-cell table:content-validation-name="val2" table:formula="of:=VLOOKUP([.D6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8]+1" office:value-type="float" office:value="608" calcext:value-type="float">
            <text:p>608</text:p>
          </table:table-cell>
          <table:table-cell table:content-validation-name="val2" table:formula="of:=VLOOKUP([.D6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09]+1" office:value-type="float" office:value="609" calcext:value-type="float">
            <text:p>609</text:p>
          </table:table-cell>
          <table:table-cell table:content-validation-name="val2" table:formula="of:=VLOOKUP([.D6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0]+1" office:value-type="float" office:value="610" calcext:value-type="float">
            <text:p>610</text:p>
          </table:table-cell>
          <table:table-cell table:content-validation-name="val2" table:formula="of:=VLOOKUP([.D6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1]+1" office:value-type="float" office:value="611" calcext:value-type="float">
            <text:p>611</text:p>
          </table:table-cell>
          <table:table-cell table:content-validation-name="val2" table:formula="of:=VLOOKUP([.D6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2]+1" office:value-type="float" office:value="612" calcext:value-type="float">
            <text:p>612</text:p>
          </table:table-cell>
          <table:table-cell table:content-validation-name="val2" table:formula="of:=VLOOKUP([.D6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3]+1" office:value-type="float" office:value="613" calcext:value-type="float">
            <text:p>613</text:p>
          </table:table-cell>
          <table:table-cell table:content-validation-name="val2" table:formula="of:=VLOOKUP([.D6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4]+1" office:value-type="float" office:value="614" calcext:value-type="float">
            <text:p>614</text:p>
          </table:table-cell>
          <table:table-cell table:content-validation-name="val2" table:formula="of:=VLOOKUP([.D6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5]+1" office:value-type="float" office:value="615" calcext:value-type="float">
            <text:p>615</text:p>
          </table:table-cell>
          <table:table-cell table:content-validation-name="val2" table:formula="of:=VLOOKUP([.D6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6]+1" office:value-type="float" office:value="616" calcext:value-type="float">
            <text:p>616</text:p>
          </table:table-cell>
          <table:table-cell table:content-validation-name="val2" table:formula="of:=VLOOKUP([.D6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7]+1" office:value-type="float" office:value="617" calcext:value-type="float">
            <text:p>617</text:p>
          </table:table-cell>
          <table:table-cell table:content-validation-name="val2" table:formula="of:=VLOOKUP([.D6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8]+1" office:value-type="float" office:value="618" calcext:value-type="float">
            <text:p>618</text:p>
          </table:table-cell>
          <table:table-cell table:content-validation-name="val2" table:formula="of:=VLOOKUP([.D6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19]+1" office:value-type="float" office:value="619" calcext:value-type="float">
            <text:p>619</text:p>
          </table:table-cell>
          <table:table-cell table:content-validation-name="val2" table:formula="of:=VLOOKUP([.D6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0]+1" office:value-type="float" office:value="620" calcext:value-type="float">
            <text:p>620</text:p>
          </table:table-cell>
          <table:table-cell table:content-validation-name="val2" table:formula="of:=VLOOKUP([.D6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1]+1" office:value-type="float" office:value="621" calcext:value-type="float">
            <text:p>621</text:p>
          </table:table-cell>
          <table:table-cell table:content-validation-name="val2" table:formula="of:=VLOOKUP([.D6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2]+1" office:value-type="float" office:value="622" calcext:value-type="float">
            <text:p>622</text:p>
          </table:table-cell>
          <table:table-cell table:content-validation-name="val2" table:formula="of:=VLOOKUP([.D6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3]+1" office:value-type="float" office:value="623" calcext:value-type="float">
            <text:p>623</text:p>
          </table:table-cell>
          <table:table-cell table:content-validation-name="val2" table:formula="of:=VLOOKUP([.D6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4]+1" office:value-type="float" office:value="624" calcext:value-type="float">
            <text:p>624</text:p>
          </table:table-cell>
          <table:table-cell table:content-validation-name="val2" table:formula="of:=VLOOKUP([.D6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5]+1" office:value-type="float" office:value="625" calcext:value-type="float">
            <text:p>625</text:p>
          </table:table-cell>
          <table:table-cell table:content-validation-name="val2" table:formula="of:=VLOOKUP([.D6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6]+1" office:value-type="float" office:value="626" calcext:value-type="float">
            <text:p>626</text:p>
          </table:table-cell>
          <table:table-cell table:content-validation-name="val2" table:formula="of:=VLOOKUP([.D6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7]+1" office:value-type="float" office:value="627" calcext:value-type="float">
            <text:p>627</text:p>
          </table:table-cell>
          <table:table-cell table:content-validation-name="val2" table:formula="of:=VLOOKUP([.D6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8]+1" office:value-type="float" office:value="628" calcext:value-type="float">
            <text:p>628</text:p>
          </table:table-cell>
          <table:table-cell table:content-validation-name="val2" table:formula="of:=VLOOKUP([.D6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29]+1" office:value-type="float" office:value="629" calcext:value-type="float">
            <text:p>629</text:p>
          </table:table-cell>
          <table:table-cell table:content-validation-name="val2" table:formula="of:=VLOOKUP([.D6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0]+1" office:value-type="float" office:value="630" calcext:value-type="float">
            <text:p>630</text:p>
          </table:table-cell>
          <table:table-cell table:content-validation-name="val2" table:formula="of:=VLOOKUP([.D6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1]+1" office:value-type="float" office:value="631" calcext:value-type="float">
            <text:p>631</text:p>
          </table:table-cell>
          <table:table-cell table:content-validation-name="val2" table:formula="of:=VLOOKUP([.D6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2]+1" office:value-type="float" office:value="632" calcext:value-type="float">
            <text:p>632</text:p>
          </table:table-cell>
          <table:table-cell table:content-validation-name="val2" table:formula="of:=VLOOKUP([.D6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3]+1" office:value-type="float" office:value="633" calcext:value-type="float">
            <text:p>633</text:p>
          </table:table-cell>
          <table:table-cell table:content-validation-name="val2" table:formula="of:=VLOOKUP([.D6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4]+1" office:value-type="float" office:value="634" calcext:value-type="float">
            <text:p>634</text:p>
          </table:table-cell>
          <table:table-cell table:content-validation-name="val2" table:formula="of:=VLOOKUP([.D6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5]+1" office:value-type="float" office:value="635" calcext:value-type="float">
            <text:p>635</text:p>
          </table:table-cell>
          <table:table-cell table:content-validation-name="val2" table:formula="of:=VLOOKUP([.D6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6]+1" office:value-type="float" office:value="636" calcext:value-type="float">
            <text:p>636</text:p>
          </table:table-cell>
          <table:table-cell table:content-validation-name="val2" table:formula="of:=VLOOKUP([.D6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7]+1" office:value-type="float" office:value="637" calcext:value-type="float">
            <text:p>637</text:p>
          </table:table-cell>
          <table:table-cell table:content-validation-name="val2" table:formula="of:=VLOOKUP([.D6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8]+1" office:value-type="float" office:value="638" calcext:value-type="float">
            <text:p>638</text:p>
          </table:table-cell>
          <table:table-cell table:content-validation-name="val2" table:formula="of:=VLOOKUP([.D6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39]+1" office:value-type="float" office:value="639" calcext:value-type="float">
            <text:p>639</text:p>
          </table:table-cell>
          <table:table-cell table:content-validation-name="val2" table:formula="of:=VLOOKUP([.D6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0]+1" office:value-type="float" office:value="640" calcext:value-type="float">
            <text:p>640</text:p>
          </table:table-cell>
          <table:table-cell table:content-validation-name="val2" table:formula="of:=VLOOKUP([.D6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1]+1" office:value-type="float" office:value="641" calcext:value-type="float">
            <text:p>641</text:p>
          </table:table-cell>
          <table:table-cell table:content-validation-name="val2" table:formula="of:=VLOOKUP([.D6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2]+1" office:value-type="float" office:value="642" calcext:value-type="float">
            <text:p>642</text:p>
          </table:table-cell>
          <table:table-cell table:content-validation-name="val2" table:formula="of:=VLOOKUP([.D6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3]+1" office:value-type="float" office:value="643" calcext:value-type="float">
            <text:p>643</text:p>
          </table:table-cell>
          <table:table-cell table:content-validation-name="val2" table:formula="of:=VLOOKUP([.D6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4]+1" office:value-type="float" office:value="644" calcext:value-type="float">
            <text:p>644</text:p>
          </table:table-cell>
          <table:table-cell table:content-validation-name="val2" table:formula="of:=VLOOKUP([.D6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5]+1" office:value-type="float" office:value="645" calcext:value-type="float">
            <text:p>645</text:p>
          </table:table-cell>
          <table:table-cell table:content-validation-name="val2" table:formula="of:=VLOOKUP([.D6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6]+1" office:value-type="float" office:value="646" calcext:value-type="float">
            <text:p>646</text:p>
          </table:table-cell>
          <table:table-cell table:content-validation-name="val2" table:formula="of:=VLOOKUP([.D6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7]+1" office:value-type="float" office:value="647" calcext:value-type="float">
            <text:p>647</text:p>
          </table:table-cell>
          <table:table-cell table:content-validation-name="val2" table:formula="of:=VLOOKUP([.D6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8]+1" office:value-type="float" office:value="648" calcext:value-type="float">
            <text:p>648</text:p>
          </table:table-cell>
          <table:table-cell table:content-validation-name="val2" table:formula="of:=VLOOKUP([.D6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49]+1" office:value-type="float" office:value="649" calcext:value-type="float">
            <text:p>649</text:p>
          </table:table-cell>
          <table:table-cell table:content-validation-name="val2" table:formula="of:=VLOOKUP([.D6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0]+1" office:value-type="float" office:value="650" calcext:value-type="float">
            <text:p>650</text:p>
          </table:table-cell>
          <table:table-cell table:content-validation-name="val2" table:formula="of:=VLOOKUP([.D6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1]+1" office:value-type="float" office:value="651" calcext:value-type="float">
            <text:p>651</text:p>
          </table:table-cell>
          <table:table-cell table:content-validation-name="val2" table:formula="of:=VLOOKUP([.D6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2]+1" office:value-type="float" office:value="652" calcext:value-type="float">
            <text:p>652</text:p>
          </table:table-cell>
          <table:table-cell table:content-validation-name="val2" table:formula="of:=VLOOKUP([.D6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3]+1" office:value-type="float" office:value="653" calcext:value-type="float">
            <text:p>653</text:p>
          </table:table-cell>
          <table:table-cell table:content-validation-name="val2" table:formula="of:=VLOOKUP([.D6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4]+1" office:value-type="float" office:value="654" calcext:value-type="float">
            <text:p>654</text:p>
          </table:table-cell>
          <table:table-cell table:content-validation-name="val2" table:formula="of:=VLOOKUP([.D6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5]+1" office:value-type="float" office:value="655" calcext:value-type="float">
            <text:p>655</text:p>
          </table:table-cell>
          <table:table-cell table:content-validation-name="val2" table:formula="of:=VLOOKUP([.D6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6]+1" office:value-type="float" office:value="656" calcext:value-type="float">
            <text:p>656</text:p>
          </table:table-cell>
          <table:table-cell table:content-validation-name="val2" table:formula="of:=VLOOKUP([.D6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7]+1" office:value-type="float" office:value="657" calcext:value-type="float">
            <text:p>657</text:p>
          </table:table-cell>
          <table:table-cell table:content-validation-name="val2" table:formula="of:=VLOOKUP([.D6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8]+1" office:value-type="float" office:value="658" calcext:value-type="float">
            <text:p>658</text:p>
          </table:table-cell>
          <table:table-cell table:content-validation-name="val2" table:formula="of:=VLOOKUP([.D6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59]+1" office:value-type="float" office:value="659" calcext:value-type="float">
            <text:p>659</text:p>
          </table:table-cell>
          <table:table-cell table:content-validation-name="val2" table:formula="of:=VLOOKUP([.D6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0]+1" office:value-type="float" office:value="660" calcext:value-type="float">
            <text:p>660</text:p>
          </table:table-cell>
          <table:table-cell table:content-validation-name="val2" table:formula="of:=VLOOKUP([.D6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1]+1" office:value-type="float" office:value="661" calcext:value-type="float">
            <text:p>661</text:p>
          </table:table-cell>
          <table:table-cell table:content-validation-name="val2" table:formula="of:=VLOOKUP([.D6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2]+1" office:value-type="float" office:value="662" calcext:value-type="float">
            <text:p>662</text:p>
          </table:table-cell>
          <table:table-cell table:content-validation-name="val2" table:formula="of:=VLOOKUP([.D6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3]+1" office:value-type="float" office:value="663" calcext:value-type="float">
            <text:p>663</text:p>
          </table:table-cell>
          <table:table-cell table:content-validation-name="val2" table:formula="of:=VLOOKUP([.D6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4]+1" office:value-type="float" office:value="664" calcext:value-type="float">
            <text:p>664</text:p>
          </table:table-cell>
          <table:table-cell table:content-validation-name="val2" table:formula="of:=VLOOKUP([.D6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5]+1" office:value-type="float" office:value="665" calcext:value-type="float">
            <text:p>665</text:p>
          </table:table-cell>
          <table:table-cell table:content-validation-name="val2" table:formula="of:=VLOOKUP([.D6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6]+1" office:value-type="float" office:value="666" calcext:value-type="float">
            <text:p>666</text:p>
          </table:table-cell>
          <table:table-cell table:content-validation-name="val2" table:formula="of:=VLOOKUP([.D6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7]+1" office:value-type="float" office:value="667" calcext:value-type="float">
            <text:p>667</text:p>
          </table:table-cell>
          <table:table-cell table:content-validation-name="val2" table:formula="of:=VLOOKUP([.D6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8]+1" office:value-type="float" office:value="668" calcext:value-type="float">
            <text:p>668</text:p>
          </table:table-cell>
          <table:table-cell table:content-validation-name="val2" table:formula="of:=VLOOKUP([.D6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69]+1" office:value-type="float" office:value="669" calcext:value-type="float">
            <text:p>669</text:p>
          </table:table-cell>
          <table:table-cell table:content-validation-name="val2" table:formula="of:=VLOOKUP([.D6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0]+1" office:value-type="float" office:value="670" calcext:value-type="float">
            <text:p>670</text:p>
          </table:table-cell>
          <table:table-cell table:content-validation-name="val2" table:formula="of:=VLOOKUP([.D6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1]+1" office:value-type="float" office:value="671" calcext:value-type="float">
            <text:p>671</text:p>
          </table:table-cell>
          <table:table-cell table:content-validation-name="val2" table:formula="of:=VLOOKUP([.D6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2]+1" office:value-type="float" office:value="672" calcext:value-type="float">
            <text:p>672</text:p>
          </table:table-cell>
          <table:table-cell table:content-validation-name="val2" table:formula="of:=VLOOKUP([.D6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3]+1" office:value-type="float" office:value="673" calcext:value-type="float">
            <text:p>673</text:p>
          </table:table-cell>
          <table:table-cell table:content-validation-name="val2" table:formula="of:=VLOOKUP([.D6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4]+1" office:value-type="float" office:value="674" calcext:value-type="float">
            <text:p>674</text:p>
          </table:table-cell>
          <table:table-cell table:content-validation-name="val2" table:formula="of:=VLOOKUP([.D6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5]+1" office:value-type="float" office:value="675" calcext:value-type="float">
            <text:p>675</text:p>
          </table:table-cell>
          <table:table-cell table:content-validation-name="val2" table:formula="of:=VLOOKUP([.D6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6]+1" office:value-type="float" office:value="676" calcext:value-type="float">
            <text:p>676</text:p>
          </table:table-cell>
          <table:table-cell table:content-validation-name="val2" table:formula="of:=VLOOKUP([.D6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7]+1" office:value-type="float" office:value="677" calcext:value-type="float">
            <text:p>677</text:p>
          </table:table-cell>
          <table:table-cell table:content-validation-name="val2" table:formula="of:=VLOOKUP([.D6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8]+1" office:value-type="float" office:value="678" calcext:value-type="float">
            <text:p>678</text:p>
          </table:table-cell>
          <table:table-cell table:content-validation-name="val2" table:formula="of:=VLOOKUP([.D6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79]+1" office:value-type="float" office:value="679" calcext:value-type="float">
            <text:p>679</text:p>
          </table:table-cell>
          <table:table-cell table:content-validation-name="val2" table:formula="of:=VLOOKUP([.D6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0]+1" office:value-type="float" office:value="680" calcext:value-type="float">
            <text:p>680</text:p>
          </table:table-cell>
          <table:table-cell table:content-validation-name="val2" table:formula="of:=VLOOKUP([.D6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1]+1" office:value-type="float" office:value="681" calcext:value-type="float">
            <text:p>681</text:p>
          </table:table-cell>
          <table:table-cell table:content-validation-name="val2" table:formula="of:=VLOOKUP([.D6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2]+1" office:value-type="float" office:value="682" calcext:value-type="float">
            <text:p>682</text:p>
          </table:table-cell>
          <table:table-cell table:content-validation-name="val2" table:formula="of:=VLOOKUP([.D6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3]+1" office:value-type="float" office:value="683" calcext:value-type="float">
            <text:p>683</text:p>
          </table:table-cell>
          <table:table-cell table:content-validation-name="val2" table:formula="of:=VLOOKUP([.D6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4]+1" office:value-type="float" office:value="684" calcext:value-type="float">
            <text:p>684</text:p>
          </table:table-cell>
          <table:table-cell table:content-validation-name="val2" table:formula="of:=VLOOKUP([.D6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5]+1" office:value-type="float" office:value="685" calcext:value-type="float">
            <text:p>685</text:p>
          </table:table-cell>
          <table:table-cell table:content-validation-name="val2" table:formula="of:=VLOOKUP([.D6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6]+1" office:value-type="float" office:value="686" calcext:value-type="float">
            <text:p>686</text:p>
          </table:table-cell>
          <table:table-cell table:content-validation-name="val2" table:formula="of:=VLOOKUP([.D6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7]+1" office:value-type="float" office:value="687" calcext:value-type="float">
            <text:p>687</text:p>
          </table:table-cell>
          <table:table-cell table:content-validation-name="val2" table:formula="of:=VLOOKUP([.D6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8]+1" office:value-type="float" office:value="688" calcext:value-type="float">
            <text:p>688</text:p>
          </table:table-cell>
          <table:table-cell table:content-validation-name="val2" table:formula="of:=VLOOKUP([.D6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89]+1" office:value-type="float" office:value="689" calcext:value-type="float">
            <text:p>689</text:p>
          </table:table-cell>
          <table:table-cell table:content-validation-name="val2" table:formula="of:=VLOOKUP([.D6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0]+1" office:value-type="float" office:value="690" calcext:value-type="float">
            <text:p>690</text:p>
          </table:table-cell>
          <table:table-cell table:content-validation-name="val2" table:formula="of:=VLOOKUP([.D6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1]+1" office:value-type="float" office:value="691" calcext:value-type="float">
            <text:p>691</text:p>
          </table:table-cell>
          <table:table-cell table:content-validation-name="val2" table:formula="of:=VLOOKUP([.D6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2]+1" office:value-type="float" office:value="692" calcext:value-type="float">
            <text:p>692</text:p>
          </table:table-cell>
          <table:table-cell table:content-validation-name="val2" table:formula="of:=VLOOKUP([.D6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3]+1" office:value-type="float" office:value="693" calcext:value-type="float">
            <text:p>693</text:p>
          </table:table-cell>
          <table:table-cell table:content-validation-name="val2" table:formula="of:=VLOOKUP([.D6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4]+1" office:value-type="float" office:value="694" calcext:value-type="float">
            <text:p>694</text:p>
          </table:table-cell>
          <table:table-cell table:content-validation-name="val2" table:formula="of:=VLOOKUP([.D6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5]+1" office:value-type="float" office:value="695" calcext:value-type="float">
            <text:p>695</text:p>
          </table:table-cell>
          <table:table-cell table:content-validation-name="val2" table:formula="of:=VLOOKUP([.D6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6]+1" office:value-type="float" office:value="696" calcext:value-type="float">
            <text:p>696</text:p>
          </table:table-cell>
          <table:table-cell table:content-validation-name="val2" table:formula="of:=VLOOKUP([.D6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7]+1" office:value-type="float" office:value="697" calcext:value-type="float">
            <text:p>697</text:p>
          </table:table-cell>
          <table:table-cell table:content-validation-name="val2" table:formula="of:=VLOOKUP([.D6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8]+1" office:value-type="float" office:value="698" calcext:value-type="float">
            <text:p>698</text:p>
          </table:table-cell>
          <table:table-cell table:content-validation-name="val2" table:formula="of:=VLOOKUP([.D6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699]+1" office:value-type="float" office:value="699" calcext:value-type="float">
            <text:p>699</text:p>
          </table:table-cell>
          <table:table-cell table:content-validation-name="val2" table:formula="of:=VLOOKUP([.D7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0]+1" office:value-type="float" office:value="700" calcext:value-type="float">
            <text:p>700</text:p>
          </table:table-cell>
          <table:table-cell table:content-validation-name="val2" table:formula="of:=VLOOKUP([.D7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1]+1" office:value-type="float" office:value="701" calcext:value-type="float">
            <text:p>701</text:p>
          </table:table-cell>
          <table:table-cell table:content-validation-name="val2" table:formula="of:=VLOOKUP([.D7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2]+1" office:value-type="float" office:value="702" calcext:value-type="float">
            <text:p>702</text:p>
          </table:table-cell>
          <table:table-cell table:content-validation-name="val2" table:formula="of:=VLOOKUP([.D7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3]+1" office:value-type="float" office:value="703" calcext:value-type="float">
            <text:p>703</text:p>
          </table:table-cell>
          <table:table-cell table:content-validation-name="val2" table:formula="of:=VLOOKUP([.D7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4]+1" office:value-type="float" office:value="704" calcext:value-type="float">
            <text:p>704</text:p>
          </table:table-cell>
          <table:table-cell table:content-validation-name="val2" table:formula="of:=VLOOKUP([.D7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5]+1" office:value-type="float" office:value="705" calcext:value-type="float">
            <text:p>705</text:p>
          </table:table-cell>
          <table:table-cell table:content-validation-name="val2" table:formula="of:=VLOOKUP([.D7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6]+1" office:value-type="float" office:value="706" calcext:value-type="float">
            <text:p>706</text:p>
          </table:table-cell>
          <table:table-cell table:content-validation-name="val2" table:formula="of:=VLOOKUP([.D7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7]+1" office:value-type="float" office:value="707" calcext:value-type="float">
            <text:p>707</text:p>
          </table:table-cell>
          <table:table-cell table:content-validation-name="val2" table:formula="of:=VLOOKUP([.D7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8]+1" office:value-type="float" office:value="708" calcext:value-type="float">
            <text:p>708</text:p>
          </table:table-cell>
          <table:table-cell table:content-validation-name="val2" table:formula="of:=VLOOKUP([.D7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09]+1" office:value-type="float" office:value="709" calcext:value-type="float">
            <text:p>709</text:p>
          </table:table-cell>
          <table:table-cell table:content-validation-name="val2" table:formula="of:=VLOOKUP([.D7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0]+1" office:value-type="float" office:value="710" calcext:value-type="float">
            <text:p>710</text:p>
          </table:table-cell>
          <table:table-cell table:content-validation-name="val2" table:formula="of:=VLOOKUP([.D7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1]+1" office:value-type="float" office:value="711" calcext:value-type="float">
            <text:p>711</text:p>
          </table:table-cell>
          <table:table-cell table:content-validation-name="val2" table:formula="of:=VLOOKUP([.D7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2]+1" office:value-type="float" office:value="712" calcext:value-type="float">
            <text:p>712</text:p>
          </table:table-cell>
          <table:table-cell table:content-validation-name="val2" table:formula="of:=VLOOKUP([.D7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3]+1" office:value-type="float" office:value="713" calcext:value-type="float">
            <text:p>713</text:p>
          </table:table-cell>
          <table:table-cell table:content-validation-name="val2" table:formula="of:=VLOOKUP([.D7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4]+1" office:value-type="float" office:value="714" calcext:value-type="float">
            <text:p>714</text:p>
          </table:table-cell>
          <table:table-cell table:content-validation-name="val2" table:formula="of:=VLOOKUP([.D7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5]+1" office:value-type="float" office:value="715" calcext:value-type="float">
            <text:p>715</text:p>
          </table:table-cell>
          <table:table-cell table:content-validation-name="val2" table:formula="of:=VLOOKUP([.D7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6]+1" office:value-type="float" office:value="716" calcext:value-type="float">
            <text:p>716</text:p>
          </table:table-cell>
          <table:table-cell table:content-validation-name="val2" table:formula="of:=VLOOKUP([.D7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7]+1" office:value-type="float" office:value="717" calcext:value-type="float">
            <text:p>717</text:p>
          </table:table-cell>
          <table:table-cell table:content-validation-name="val2" table:formula="of:=VLOOKUP([.D7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8]+1" office:value-type="float" office:value="718" calcext:value-type="float">
            <text:p>718</text:p>
          </table:table-cell>
          <table:table-cell table:content-validation-name="val2" table:formula="of:=VLOOKUP([.D7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19]+1" office:value-type="float" office:value="719" calcext:value-type="float">
            <text:p>719</text:p>
          </table:table-cell>
          <table:table-cell table:content-validation-name="val2" table:formula="of:=VLOOKUP([.D7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0]+1" office:value-type="float" office:value="720" calcext:value-type="float">
            <text:p>720</text:p>
          </table:table-cell>
          <table:table-cell table:content-validation-name="val2" table:formula="of:=VLOOKUP([.D7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1]+1" office:value-type="float" office:value="721" calcext:value-type="float">
            <text:p>721</text:p>
          </table:table-cell>
          <table:table-cell table:content-validation-name="val2" table:formula="of:=VLOOKUP([.D7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2]+1" office:value-type="float" office:value="722" calcext:value-type="float">
            <text:p>722</text:p>
          </table:table-cell>
          <table:table-cell table:content-validation-name="val2" table:formula="of:=VLOOKUP([.D7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3]+1" office:value-type="float" office:value="723" calcext:value-type="float">
            <text:p>723</text:p>
          </table:table-cell>
          <table:table-cell table:content-validation-name="val2" table:formula="of:=VLOOKUP([.D7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4]+1" office:value-type="float" office:value="724" calcext:value-type="float">
            <text:p>724</text:p>
          </table:table-cell>
          <table:table-cell table:content-validation-name="val2" table:formula="of:=VLOOKUP([.D7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5]+1" office:value-type="float" office:value="725" calcext:value-type="float">
            <text:p>725</text:p>
          </table:table-cell>
          <table:table-cell table:content-validation-name="val2" table:formula="of:=VLOOKUP([.D7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6]+1" office:value-type="float" office:value="726" calcext:value-type="float">
            <text:p>726</text:p>
          </table:table-cell>
          <table:table-cell table:content-validation-name="val2" table:formula="of:=VLOOKUP([.D7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7]+1" office:value-type="float" office:value="727" calcext:value-type="float">
            <text:p>727</text:p>
          </table:table-cell>
          <table:table-cell table:content-validation-name="val2" table:formula="of:=VLOOKUP([.D7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8]+1" office:value-type="float" office:value="728" calcext:value-type="float">
            <text:p>728</text:p>
          </table:table-cell>
          <table:table-cell table:content-validation-name="val2" table:formula="of:=VLOOKUP([.D7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29]+1" office:value-type="float" office:value="729" calcext:value-type="float">
            <text:p>729</text:p>
          </table:table-cell>
          <table:table-cell table:content-validation-name="val2" table:formula="of:=VLOOKUP([.D7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0]+1" office:value-type="float" office:value="730" calcext:value-type="float">
            <text:p>730</text:p>
          </table:table-cell>
          <table:table-cell table:content-validation-name="val2" table:formula="of:=VLOOKUP([.D7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1]+1" office:value-type="float" office:value="731" calcext:value-type="float">
            <text:p>731</text:p>
          </table:table-cell>
          <table:table-cell table:content-validation-name="val2" table:formula="of:=VLOOKUP([.D7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2]+1" office:value-type="float" office:value="732" calcext:value-type="float">
            <text:p>732</text:p>
          </table:table-cell>
          <table:table-cell table:content-validation-name="val2" table:formula="of:=VLOOKUP([.D7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3]+1" office:value-type="float" office:value="733" calcext:value-type="float">
            <text:p>733</text:p>
          </table:table-cell>
          <table:table-cell table:content-validation-name="val2" table:formula="of:=VLOOKUP([.D7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4]+1" office:value-type="float" office:value="734" calcext:value-type="float">
            <text:p>734</text:p>
          </table:table-cell>
          <table:table-cell table:content-validation-name="val2" table:formula="of:=VLOOKUP([.D7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5]+1" office:value-type="float" office:value="735" calcext:value-type="float">
            <text:p>735</text:p>
          </table:table-cell>
          <table:table-cell table:content-validation-name="val2" table:formula="of:=VLOOKUP([.D7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6]+1" office:value-type="float" office:value="736" calcext:value-type="float">
            <text:p>736</text:p>
          </table:table-cell>
          <table:table-cell table:content-validation-name="val2" table:formula="of:=VLOOKUP([.D7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7]+1" office:value-type="float" office:value="737" calcext:value-type="float">
            <text:p>737</text:p>
          </table:table-cell>
          <table:table-cell table:content-validation-name="val2" table:formula="of:=VLOOKUP([.D7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8]+1" office:value-type="float" office:value="738" calcext:value-type="float">
            <text:p>738</text:p>
          </table:table-cell>
          <table:table-cell table:content-validation-name="val2" table:formula="of:=VLOOKUP([.D7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39]+1" office:value-type="float" office:value="739" calcext:value-type="float">
            <text:p>739</text:p>
          </table:table-cell>
          <table:table-cell table:content-validation-name="val2" table:formula="of:=VLOOKUP([.D7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0]+1" office:value-type="float" office:value="740" calcext:value-type="float">
            <text:p>740</text:p>
          </table:table-cell>
          <table:table-cell table:content-validation-name="val2" table:formula="of:=VLOOKUP([.D7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1]+1" office:value-type="float" office:value="741" calcext:value-type="float">
            <text:p>741</text:p>
          </table:table-cell>
          <table:table-cell table:content-validation-name="val2" table:formula="of:=VLOOKUP([.D7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2]+1" office:value-type="float" office:value="742" calcext:value-type="float">
            <text:p>742</text:p>
          </table:table-cell>
          <table:table-cell table:content-validation-name="val2" table:formula="of:=VLOOKUP([.D7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3]+1" office:value-type="float" office:value="743" calcext:value-type="float">
            <text:p>743</text:p>
          </table:table-cell>
          <table:table-cell table:content-validation-name="val2" table:formula="of:=VLOOKUP([.D7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4]+1" office:value-type="float" office:value="744" calcext:value-type="float">
            <text:p>744</text:p>
          </table:table-cell>
          <table:table-cell table:content-validation-name="val2" table:formula="of:=VLOOKUP([.D7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5]+1" office:value-type="float" office:value="745" calcext:value-type="float">
            <text:p>745</text:p>
          </table:table-cell>
          <table:table-cell table:content-validation-name="val2" table:formula="of:=VLOOKUP([.D7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6]+1" office:value-type="float" office:value="746" calcext:value-type="float">
            <text:p>746</text:p>
          </table:table-cell>
          <table:table-cell table:content-validation-name="val2" table:formula="of:=VLOOKUP([.D7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7]+1" office:value-type="float" office:value="747" calcext:value-type="float">
            <text:p>747</text:p>
          </table:table-cell>
          <table:table-cell table:content-validation-name="val2" table:formula="of:=VLOOKUP([.D7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8]+1" office:value-type="float" office:value="748" calcext:value-type="float">
            <text:p>748</text:p>
          </table:table-cell>
          <table:table-cell table:content-validation-name="val2" table:formula="of:=VLOOKUP([.D7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49]+1" office:value-type="float" office:value="749" calcext:value-type="float">
            <text:p>749</text:p>
          </table:table-cell>
          <table:table-cell table:content-validation-name="val2" table:formula="of:=VLOOKUP([.D7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0]+1" office:value-type="float" office:value="750" calcext:value-type="float">
            <text:p>750</text:p>
          </table:table-cell>
          <table:table-cell table:content-validation-name="val2" table:formula="of:=VLOOKUP([.D7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1]+1" office:value-type="float" office:value="751" calcext:value-type="float">
            <text:p>751</text:p>
          </table:table-cell>
          <table:table-cell table:content-validation-name="val2" table:formula="of:=VLOOKUP([.D7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2]+1" office:value-type="float" office:value="752" calcext:value-type="float">
            <text:p>752</text:p>
          </table:table-cell>
          <table:table-cell table:content-validation-name="val2" table:formula="of:=VLOOKUP([.D7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3]+1" office:value-type="float" office:value="753" calcext:value-type="float">
            <text:p>753</text:p>
          </table:table-cell>
          <table:table-cell table:content-validation-name="val2" table:formula="of:=VLOOKUP([.D7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4]+1" office:value-type="float" office:value="754" calcext:value-type="float">
            <text:p>754</text:p>
          </table:table-cell>
          <table:table-cell table:content-validation-name="val2" table:formula="of:=VLOOKUP([.D7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5]+1" office:value-type="float" office:value="755" calcext:value-type="float">
            <text:p>755</text:p>
          </table:table-cell>
          <table:table-cell table:content-validation-name="val2" table:formula="of:=VLOOKUP([.D7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6]+1" office:value-type="float" office:value="756" calcext:value-type="float">
            <text:p>756</text:p>
          </table:table-cell>
          <table:table-cell table:content-validation-name="val2" table:formula="of:=VLOOKUP([.D7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7]+1" office:value-type="float" office:value="757" calcext:value-type="float">
            <text:p>757</text:p>
          </table:table-cell>
          <table:table-cell table:content-validation-name="val2" table:formula="of:=VLOOKUP([.D7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8]+1" office:value-type="float" office:value="758" calcext:value-type="float">
            <text:p>758</text:p>
          </table:table-cell>
          <table:table-cell table:content-validation-name="val2" table:formula="of:=VLOOKUP([.D7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59]+1" office:value-type="float" office:value="759" calcext:value-type="float">
            <text:p>759</text:p>
          </table:table-cell>
          <table:table-cell table:content-validation-name="val2" table:formula="of:=VLOOKUP([.D7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0]+1" office:value-type="float" office:value="760" calcext:value-type="float">
            <text:p>760</text:p>
          </table:table-cell>
          <table:table-cell table:content-validation-name="val2" table:formula="of:=VLOOKUP([.D7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1]+1" office:value-type="float" office:value="761" calcext:value-type="float">
            <text:p>761</text:p>
          </table:table-cell>
          <table:table-cell table:content-validation-name="val2" table:formula="of:=VLOOKUP([.D7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2]+1" office:value-type="float" office:value="762" calcext:value-type="float">
            <text:p>762</text:p>
          </table:table-cell>
          <table:table-cell table:content-validation-name="val2" table:formula="of:=VLOOKUP([.D7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3]+1" office:value-type="float" office:value="763" calcext:value-type="float">
            <text:p>763</text:p>
          </table:table-cell>
          <table:table-cell table:content-validation-name="val2" table:formula="of:=VLOOKUP([.D7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4]+1" office:value-type="float" office:value="764" calcext:value-type="float">
            <text:p>764</text:p>
          </table:table-cell>
          <table:table-cell table:content-validation-name="val2" table:formula="of:=VLOOKUP([.D7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5]+1" office:value-type="float" office:value="765" calcext:value-type="float">
            <text:p>765</text:p>
          </table:table-cell>
          <table:table-cell table:content-validation-name="val2" table:formula="of:=VLOOKUP([.D7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6]+1" office:value-type="float" office:value="766" calcext:value-type="float">
            <text:p>766</text:p>
          </table:table-cell>
          <table:table-cell table:content-validation-name="val2" table:formula="of:=VLOOKUP([.D7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7]+1" office:value-type="float" office:value="767" calcext:value-type="float">
            <text:p>767</text:p>
          </table:table-cell>
          <table:table-cell table:content-validation-name="val2" table:formula="of:=VLOOKUP([.D7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8]+1" office:value-type="float" office:value="768" calcext:value-type="float">
            <text:p>768</text:p>
          </table:table-cell>
          <table:table-cell table:content-validation-name="val2" table:formula="of:=VLOOKUP([.D7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69]+1" office:value-type="float" office:value="769" calcext:value-type="float">
            <text:p>769</text:p>
          </table:table-cell>
          <table:table-cell table:content-validation-name="val2" table:formula="of:=VLOOKUP([.D7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0]+1" office:value-type="float" office:value="770" calcext:value-type="float">
            <text:p>770</text:p>
          </table:table-cell>
          <table:table-cell table:content-validation-name="val2" table:formula="of:=VLOOKUP([.D7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1]+1" office:value-type="float" office:value="771" calcext:value-type="float">
            <text:p>771</text:p>
          </table:table-cell>
          <table:table-cell table:content-validation-name="val2" table:formula="of:=VLOOKUP([.D7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2]+1" office:value-type="float" office:value="772" calcext:value-type="float">
            <text:p>772</text:p>
          </table:table-cell>
          <table:table-cell table:content-validation-name="val2" table:formula="of:=VLOOKUP([.D7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3]+1" office:value-type="float" office:value="773" calcext:value-type="float">
            <text:p>773</text:p>
          </table:table-cell>
          <table:table-cell table:content-validation-name="val2" table:formula="of:=VLOOKUP([.D7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4]+1" office:value-type="float" office:value="774" calcext:value-type="float">
            <text:p>774</text:p>
          </table:table-cell>
          <table:table-cell table:content-validation-name="val2" table:formula="of:=VLOOKUP([.D7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5]+1" office:value-type="float" office:value="775" calcext:value-type="float">
            <text:p>775</text:p>
          </table:table-cell>
          <table:table-cell table:content-validation-name="val2" table:formula="of:=VLOOKUP([.D7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6]+1" office:value-type="float" office:value="776" calcext:value-type="float">
            <text:p>776</text:p>
          </table:table-cell>
          <table:table-cell table:content-validation-name="val2" table:formula="of:=VLOOKUP([.D7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7]+1" office:value-type="float" office:value="777" calcext:value-type="float">
            <text:p>777</text:p>
          </table:table-cell>
          <table:table-cell table:content-validation-name="val2" table:formula="of:=VLOOKUP([.D7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8]+1" office:value-type="float" office:value="778" calcext:value-type="float">
            <text:p>778</text:p>
          </table:table-cell>
          <table:table-cell table:content-validation-name="val2" table:formula="of:=VLOOKUP([.D7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79]+1" office:value-type="float" office:value="779" calcext:value-type="float">
            <text:p>779</text:p>
          </table:table-cell>
          <table:table-cell table:content-validation-name="val2" table:formula="of:=VLOOKUP([.D7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0]+1" office:value-type="float" office:value="780" calcext:value-type="float">
            <text:p>780</text:p>
          </table:table-cell>
          <table:table-cell table:content-validation-name="val2" table:formula="of:=VLOOKUP([.D7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1]+1" office:value-type="float" office:value="781" calcext:value-type="float">
            <text:p>781</text:p>
          </table:table-cell>
          <table:table-cell table:content-validation-name="val2" table:formula="of:=VLOOKUP([.D7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2]+1" office:value-type="float" office:value="782" calcext:value-type="float">
            <text:p>782</text:p>
          </table:table-cell>
          <table:table-cell table:content-validation-name="val2" table:formula="of:=VLOOKUP([.D7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3]+1" office:value-type="float" office:value="783" calcext:value-type="float">
            <text:p>783</text:p>
          </table:table-cell>
          <table:table-cell table:content-validation-name="val2" table:formula="of:=VLOOKUP([.D7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4]+1" office:value-type="float" office:value="784" calcext:value-type="float">
            <text:p>784</text:p>
          </table:table-cell>
          <table:table-cell table:content-validation-name="val2" table:formula="of:=VLOOKUP([.D7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5]+1" office:value-type="float" office:value="785" calcext:value-type="float">
            <text:p>785</text:p>
          </table:table-cell>
          <table:table-cell table:content-validation-name="val2" table:formula="of:=VLOOKUP([.D7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6]+1" office:value-type="float" office:value="786" calcext:value-type="float">
            <text:p>786</text:p>
          </table:table-cell>
          <table:table-cell table:content-validation-name="val2" table:formula="of:=VLOOKUP([.D7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7]+1" office:value-type="float" office:value="787" calcext:value-type="float">
            <text:p>787</text:p>
          </table:table-cell>
          <table:table-cell table:content-validation-name="val2" table:formula="of:=VLOOKUP([.D7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8]+1" office:value-type="float" office:value="788" calcext:value-type="float">
            <text:p>788</text:p>
          </table:table-cell>
          <table:table-cell table:content-validation-name="val2" table:formula="of:=VLOOKUP([.D7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89]+1" office:value-type="float" office:value="789" calcext:value-type="float">
            <text:p>789</text:p>
          </table:table-cell>
          <table:table-cell table:content-validation-name="val2" table:formula="of:=VLOOKUP([.D7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0]+1" office:value-type="float" office:value="790" calcext:value-type="float">
            <text:p>790</text:p>
          </table:table-cell>
          <table:table-cell table:content-validation-name="val2" table:formula="of:=VLOOKUP([.D7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1]+1" office:value-type="float" office:value="791" calcext:value-type="float">
            <text:p>791</text:p>
          </table:table-cell>
          <table:table-cell table:content-validation-name="val2" table:formula="of:=VLOOKUP([.D7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2]+1" office:value-type="float" office:value="792" calcext:value-type="float">
            <text:p>792</text:p>
          </table:table-cell>
          <table:table-cell table:content-validation-name="val2" table:formula="of:=VLOOKUP([.D7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3]+1" office:value-type="float" office:value="793" calcext:value-type="float">
            <text:p>793</text:p>
          </table:table-cell>
          <table:table-cell table:content-validation-name="val2" table:formula="of:=VLOOKUP([.D7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4]+1" office:value-type="float" office:value="794" calcext:value-type="float">
            <text:p>794</text:p>
          </table:table-cell>
          <table:table-cell table:content-validation-name="val2" table:formula="of:=VLOOKUP([.D7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5]+1" office:value-type="float" office:value="795" calcext:value-type="float">
            <text:p>795</text:p>
          </table:table-cell>
          <table:table-cell table:content-validation-name="val2" table:formula="of:=VLOOKUP([.D7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6]+1" office:value-type="float" office:value="796" calcext:value-type="float">
            <text:p>796</text:p>
          </table:table-cell>
          <table:table-cell table:content-validation-name="val2" table:formula="of:=VLOOKUP([.D7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7]+1" office:value-type="float" office:value="797" calcext:value-type="float">
            <text:p>797</text:p>
          </table:table-cell>
          <table:table-cell table:content-validation-name="val2" table:formula="of:=VLOOKUP([.D7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8]+1" office:value-type="float" office:value="798" calcext:value-type="float">
            <text:p>798</text:p>
          </table:table-cell>
          <table:table-cell table:content-validation-name="val2" table:formula="of:=VLOOKUP([.D7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799]+1" office:value-type="float" office:value="799" calcext:value-type="float">
            <text:p>799</text:p>
          </table:table-cell>
          <table:table-cell table:content-validation-name="val2" table:formula="of:=VLOOKUP([.D8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0]+1" office:value-type="float" office:value="800" calcext:value-type="float">
            <text:p>800</text:p>
          </table:table-cell>
          <table:table-cell table:content-validation-name="val2" table:formula="of:=VLOOKUP([.D8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1]+1" office:value-type="float" office:value="801" calcext:value-type="float">
            <text:p>801</text:p>
          </table:table-cell>
          <table:table-cell table:content-validation-name="val2" table:formula="of:=VLOOKUP([.D8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2]+1" office:value-type="float" office:value="802" calcext:value-type="float">
            <text:p>802</text:p>
          </table:table-cell>
          <table:table-cell table:content-validation-name="val2" table:formula="of:=VLOOKUP([.D8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3]+1" office:value-type="float" office:value="803" calcext:value-type="float">
            <text:p>803</text:p>
          </table:table-cell>
          <table:table-cell table:content-validation-name="val2" table:formula="of:=VLOOKUP([.D8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4]+1" office:value-type="float" office:value="804" calcext:value-type="float">
            <text:p>804</text:p>
          </table:table-cell>
          <table:table-cell table:content-validation-name="val2" table:formula="of:=VLOOKUP([.D8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5]+1" office:value-type="float" office:value="805" calcext:value-type="float">
            <text:p>805</text:p>
          </table:table-cell>
          <table:table-cell table:content-validation-name="val2" table:formula="of:=VLOOKUP([.D8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6]+1" office:value-type="float" office:value="806" calcext:value-type="float">
            <text:p>806</text:p>
          </table:table-cell>
          <table:table-cell table:content-validation-name="val2" table:formula="of:=VLOOKUP([.D8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7]+1" office:value-type="float" office:value="807" calcext:value-type="float">
            <text:p>807</text:p>
          </table:table-cell>
          <table:table-cell table:content-validation-name="val2" table:formula="of:=VLOOKUP([.D8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8]+1" office:value-type="float" office:value="808" calcext:value-type="float">
            <text:p>808</text:p>
          </table:table-cell>
          <table:table-cell table:content-validation-name="val2" table:formula="of:=VLOOKUP([.D8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09]+1" office:value-type="float" office:value="809" calcext:value-type="float">
            <text:p>809</text:p>
          </table:table-cell>
          <table:table-cell table:content-validation-name="val2" table:formula="of:=VLOOKUP([.D8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0]+1" office:value-type="float" office:value="810" calcext:value-type="float">
            <text:p>810</text:p>
          </table:table-cell>
          <table:table-cell table:content-validation-name="val2" table:formula="of:=VLOOKUP([.D8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1]+1" office:value-type="float" office:value="811" calcext:value-type="float">
            <text:p>811</text:p>
          </table:table-cell>
          <table:table-cell table:content-validation-name="val2" table:formula="of:=VLOOKUP([.D8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2]+1" office:value-type="float" office:value="812" calcext:value-type="float">
            <text:p>812</text:p>
          </table:table-cell>
          <table:table-cell table:content-validation-name="val2" table:formula="of:=VLOOKUP([.D8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3]+1" office:value-type="float" office:value="813" calcext:value-type="float">
            <text:p>813</text:p>
          </table:table-cell>
          <table:table-cell table:content-validation-name="val2" table:formula="of:=VLOOKUP([.D8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4]+1" office:value-type="float" office:value="814" calcext:value-type="float">
            <text:p>814</text:p>
          </table:table-cell>
          <table:table-cell table:content-validation-name="val2" table:formula="of:=VLOOKUP([.D8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5]+1" office:value-type="float" office:value="815" calcext:value-type="float">
            <text:p>815</text:p>
          </table:table-cell>
          <table:table-cell table:content-validation-name="val2" table:formula="of:=VLOOKUP([.D8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6]+1" office:value-type="float" office:value="816" calcext:value-type="float">
            <text:p>816</text:p>
          </table:table-cell>
          <table:table-cell table:content-validation-name="val2" table:formula="of:=VLOOKUP([.D8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7]+1" office:value-type="float" office:value="817" calcext:value-type="float">
            <text:p>817</text:p>
          </table:table-cell>
          <table:table-cell table:content-validation-name="val2" table:formula="of:=VLOOKUP([.D8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8]+1" office:value-type="float" office:value="818" calcext:value-type="float">
            <text:p>818</text:p>
          </table:table-cell>
          <table:table-cell table:content-validation-name="val2" table:formula="of:=VLOOKUP([.D8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19]+1" office:value-type="float" office:value="819" calcext:value-type="float">
            <text:p>819</text:p>
          </table:table-cell>
          <table:table-cell table:content-validation-name="val2" table:formula="of:=VLOOKUP([.D8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0]+1" office:value-type="float" office:value="820" calcext:value-type="float">
            <text:p>820</text:p>
          </table:table-cell>
          <table:table-cell table:content-validation-name="val2" table:formula="of:=VLOOKUP([.D8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1]+1" office:value-type="float" office:value="821" calcext:value-type="float">
            <text:p>821</text:p>
          </table:table-cell>
          <table:table-cell table:content-validation-name="val2" table:formula="of:=VLOOKUP([.D8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2]+1" office:value-type="float" office:value="822" calcext:value-type="float">
            <text:p>822</text:p>
          </table:table-cell>
          <table:table-cell table:content-validation-name="val2" table:formula="of:=VLOOKUP([.D8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3]+1" office:value-type="float" office:value="823" calcext:value-type="float">
            <text:p>823</text:p>
          </table:table-cell>
          <table:table-cell table:content-validation-name="val2" table:formula="of:=VLOOKUP([.D8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4]+1" office:value-type="float" office:value="824" calcext:value-type="float">
            <text:p>824</text:p>
          </table:table-cell>
          <table:table-cell table:content-validation-name="val2" table:formula="of:=VLOOKUP([.D8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5]+1" office:value-type="float" office:value="825" calcext:value-type="float">
            <text:p>825</text:p>
          </table:table-cell>
          <table:table-cell table:content-validation-name="val2" table:formula="of:=VLOOKUP([.D8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6]+1" office:value-type="float" office:value="826" calcext:value-type="float">
            <text:p>826</text:p>
          </table:table-cell>
          <table:table-cell table:content-validation-name="val2" table:formula="of:=VLOOKUP([.D8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7]+1" office:value-type="float" office:value="827" calcext:value-type="float">
            <text:p>827</text:p>
          </table:table-cell>
          <table:table-cell table:content-validation-name="val2" table:formula="of:=VLOOKUP([.D8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8]+1" office:value-type="float" office:value="828" calcext:value-type="float">
            <text:p>828</text:p>
          </table:table-cell>
          <table:table-cell table:content-validation-name="val2" table:formula="of:=VLOOKUP([.D8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29]+1" office:value-type="float" office:value="829" calcext:value-type="float">
            <text:p>829</text:p>
          </table:table-cell>
          <table:table-cell table:content-validation-name="val2" table:formula="of:=VLOOKUP([.D8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0]+1" office:value-type="float" office:value="830" calcext:value-type="float">
            <text:p>830</text:p>
          </table:table-cell>
          <table:table-cell table:content-validation-name="val2" table:formula="of:=VLOOKUP([.D8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1]+1" office:value-type="float" office:value="831" calcext:value-type="float">
            <text:p>831</text:p>
          </table:table-cell>
          <table:table-cell table:content-validation-name="val2" table:formula="of:=VLOOKUP([.D8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2]+1" office:value-type="float" office:value="832" calcext:value-type="float">
            <text:p>832</text:p>
          </table:table-cell>
          <table:table-cell table:content-validation-name="val2" table:formula="of:=VLOOKUP([.D8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3]+1" office:value-type="float" office:value="833" calcext:value-type="float">
            <text:p>833</text:p>
          </table:table-cell>
          <table:table-cell table:content-validation-name="val2" table:formula="of:=VLOOKUP([.D8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4]+1" office:value-type="float" office:value="834" calcext:value-type="float">
            <text:p>834</text:p>
          </table:table-cell>
          <table:table-cell table:content-validation-name="val2" table:formula="of:=VLOOKUP([.D8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5]+1" office:value-type="float" office:value="835" calcext:value-type="float">
            <text:p>835</text:p>
          </table:table-cell>
          <table:table-cell table:content-validation-name="val2" table:formula="of:=VLOOKUP([.D8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6]+1" office:value-type="float" office:value="836" calcext:value-type="float">
            <text:p>836</text:p>
          </table:table-cell>
          <table:table-cell table:content-validation-name="val2" table:formula="of:=VLOOKUP([.D8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7]+1" office:value-type="float" office:value="837" calcext:value-type="float">
            <text:p>837</text:p>
          </table:table-cell>
          <table:table-cell table:content-validation-name="val2" table:formula="of:=VLOOKUP([.D8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8]+1" office:value-type="float" office:value="838" calcext:value-type="float">
            <text:p>838</text:p>
          </table:table-cell>
          <table:table-cell table:content-validation-name="val2" table:formula="of:=VLOOKUP([.D8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39]+1" office:value-type="float" office:value="839" calcext:value-type="float">
            <text:p>839</text:p>
          </table:table-cell>
          <table:table-cell table:content-validation-name="val2" table:formula="of:=VLOOKUP([.D8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0]+1" office:value-type="float" office:value="840" calcext:value-type="float">
            <text:p>840</text:p>
          </table:table-cell>
          <table:table-cell table:content-validation-name="val2" table:formula="of:=VLOOKUP([.D8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1]+1" office:value-type="float" office:value="841" calcext:value-type="float">
            <text:p>841</text:p>
          </table:table-cell>
          <table:table-cell table:content-validation-name="val2" table:formula="of:=VLOOKUP([.D8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2]+1" office:value-type="float" office:value="842" calcext:value-type="float">
            <text:p>842</text:p>
          </table:table-cell>
          <table:table-cell table:content-validation-name="val2" table:formula="of:=VLOOKUP([.D8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3]+1" office:value-type="float" office:value="843" calcext:value-type="float">
            <text:p>843</text:p>
          </table:table-cell>
          <table:table-cell table:content-validation-name="val2" table:formula="of:=VLOOKUP([.D8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4]+1" office:value-type="float" office:value="844" calcext:value-type="float">
            <text:p>844</text:p>
          </table:table-cell>
          <table:table-cell table:content-validation-name="val2" table:formula="of:=VLOOKUP([.D8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5]+1" office:value-type="float" office:value="845" calcext:value-type="float">
            <text:p>845</text:p>
          </table:table-cell>
          <table:table-cell table:content-validation-name="val2" table:formula="of:=VLOOKUP([.D8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6]+1" office:value-type="float" office:value="846" calcext:value-type="float">
            <text:p>846</text:p>
          </table:table-cell>
          <table:table-cell table:content-validation-name="val2" table:formula="of:=VLOOKUP([.D8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7]+1" office:value-type="float" office:value="847" calcext:value-type="float">
            <text:p>847</text:p>
          </table:table-cell>
          <table:table-cell table:content-validation-name="val2" table:formula="of:=VLOOKUP([.D8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8]+1" office:value-type="float" office:value="848" calcext:value-type="float">
            <text:p>848</text:p>
          </table:table-cell>
          <table:table-cell table:content-validation-name="val2" table:formula="of:=VLOOKUP([.D8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49]+1" office:value-type="float" office:value="849" calcext:value-type="float">
            <text:p>849</text:p>
          </table:table-cell>
          <table:table-cell table:content-validation-name="val2" table:formula="of:=VLOOKUP([.D8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0]+1" office:value-type="float" office:value="850" calcext:value-type="float">
            <text:p>850</text:p>
          </table:table-cell>
          <table:table-cell table:content-validation-name="val2" table:formula="of:=VLOOKUP([.D8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1]+1" office:value-type="float" office:value="851" calcext:value-type="float">
            <text:p>851</text:p>
          </table:table-cell>
          <table:table-cell table:content-validation-name="val2" table:formula="of:=VLOOKUP([.D8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2]+1" office:value-type="float" office:value="852" calcext:value-type="float">
            <text:p>852</text:p>
          </table:table-cell>
          <table:table-cell table:content-validation-name="val2" table:formula="of:=VLOOKUP([.D8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3]+1" office:value-type="float" office:value="853" calcext:value-type="float">
            <text:p>853</text:p>
          </table:table-cell>
          <table:table-cell table:content-validation-name="val2" table:formula="of:=VLOOKUP([.D8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4]+1" office:value-type="float" office:value="854" calcext:value-type="float">
            <text:p>854</text:p>
          </table:table-cell>
          <table:table-cell table:content-validation-name="val2" table:formula="of:=VLOOKUP([.D8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5]+1" office:value-type="float" office:value="855" calcext:value-type="float">
            <text:p>855</text:p>
          </table:table-cell>
          <table:table-cell table:content-validation-name="val2" table:formula="of:=VLOOKUP([.D8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6]+1" office:value-type="float" office:value="856" calcext:value-type="float">
            <text:p>856</text:p>
          </table:table-cell>
          <table:table-cell table:content-validation-name="val2" table:formula="of:=VLOOKUP([.D8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7]+1" office:value-type="float" office:value="857" calcext:value-type="float">
            <text:p>857</text:p>
          </table:table-cell>
          <table:table-cell table:content-validation-name="val2" table:formula="of:=VLOOKUP([.D8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8]+1" office:value-type="float" office:value="858" calcext:value-type="float">
            <text:p>858</text:p>
          </table:table-cell>
          <table:table-cell table:content-validation-name="val2" table:formula="of:=VLOOKUP([.D8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59]+1" office:value-type="float" office:value="859" calcext:value-type="float">
            <text:p>859</text:p>
          </table:table-cell>
          <table:table-cell table:content-validation-name="val2" table:formula="of:=VLOOKUP([.D8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0]+1" office:value-type="float" office:value="860" calcext:value-type="float">
            <text:p>860</text:p>
          </table:table-cell>
          <table:table-cell table:content-validation-name="val2" table:formula="of:=VLOOKUP([.D8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1]+1" office:value-type="float" office:value="861" calcext:value-type="float">
            <text:p>861</text:p>
          </table:table-cell>
          <table:table-cell table:content-validation-name="val2" table:formula="of:=VLOOKUP([.D8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2]+1" office:value-type="float" office:value="862" calcext:value-type="float">
            <text:p>862</text:p>
          </table:table-cell>
          <table:table-cell table:content-validation-name="val2" table:formula="of:=VLOOKUP([.D8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3]+1" office:value-type="float" office:value="863" calcext:value-type="float">
            <text:p>863</text:p>
          </table:table-cell>
          <table:table-cell table:content-validation-name="val2" table:formula="of:=VLOOKUP([.D8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4]+1" office:value-type="float" office:value="864" calcext:value-type="float">
            <text:p>864</text:p>
          </table:table-cell>
          <table:table-cell table:content-validation-name="val2" table:formula="of:=VLOOKUP([.D8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5]+1" office:value-type="float" office:value="865" calcext:value-type="float">
            <text:p>865</text:p>
          </table:table-cell>
          <table:table-cell table:content-validation-name="val2" table:formula="of:=VLOOKUP([.D8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6]+1" office:value-type="float" office:value="866" calcext:value-type="float">
            <text:p>866</text:p>
          </table:table-cell>
          <table:table-cell table:content-validation-name="val2" table:formula="of:=VLOOKUP([.D8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7]+1" office:value-type="float" office:value="867" calcext:value-type="float">
            <text:p>867</text:p>
          </table:table-cell>
          <table:table-cell table:content-validation-name="val2" table:formula="of:=VLOOKUP([.D8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8]+1" office:value-type="float" office:value="868" calcext:value-type="float">
            <text:p>868</text:p>
          </table:table-cell>
          <table:table-cell table:content-validation-name="val2" table:formula="of:=VLOOKUP([.D8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69]+1" office:value-type="float" office:value="869" calcext:value-type="float">
            <text:p>869</text:p>
          </table:table-cell>
          <table:table-cell table:content-validation-name="val2" table:formula="of:=VLOOKUP([.D8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0]+1" office:value-type="float" office:value="870" calcext:value-type="float">
            <text:p>870</text:p>
          </table:table-cell>
          <table:table-cell table:content-validation-name="val2" table:formula="of:=VLOOKUP([.D8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1]+1" office:value-type="float" office:value="871" calcext:value-type="float">
            <text:p>871</text:p>
          </table:table-cell>
          <table:table-cell table:content-validation-name="val2" table:formula="of:=VLOOKUP([.D8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2]+1" office:value-type="float" office:value="872" calcext:value-type="float">
            <text:p>872</text:p>
          </table:table-cell>
          <table:table-cell table:content-validation-name="val2" table:formula="of:=VLOOKUP([.D8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3]+1" office:value-type="float" office:value="873" calcext:value-type="float">
            <text:p>873</text:p>
          </table:table-cell>
          <table:table-cell table:content-validation-name="val2" table:formula="of:=VLOOKUP([.D8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4]+1" office:value-type="float" office:value="874" calcext:value-type="float">
            <text:p>874</text:p>
          </table:table-cell>
          <table:table-cell table:content-validation-name="val2" table:formula="of:=VLOOKUP([.D8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5]+1" office:value-type="float" office:value="875" calcext:value-type="float">
            <text:p>875</text:p>
          </table:table-cell>
          <table:table-cell table:content-validation-name="val2" table:formula="of:=VLOOKUP([.D8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6]+1" office:value-type="float" office:value="876" calcext:value-type="float">
            <text:p>876</text:p>
          </table:table-cell>
          <table:table-cell table:content-validation-name="val2" table:formula="of:=VLOOKUP([.D8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7]+1" office:value-type="float" office:value="877" calcext:value-type="float">
            <text:p>877</text:p>
          </table:table-cell>
          <table:table-cell table:content-validation-name="val2" table:formula="of:=VLOOKUP([.D8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8]+1" office:value-type="float" office:value="878" calcext:value-type="float">
            <text:p>878</text:p>
          </table:table-cell>
          <table:table-cell table:content-validation-name="val2" table:formula="of:=VLOOKUP([.D8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79]+1" office:value-type="float" office:value="879" calcext:value-type="float">
            <text:p>879</text:p>
          </table:table-cell>
          <table:table-cell table:content-validation-name="val2" table:formula="of:=VLOOKUP([.D8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0]+1" office:value-type="float" office:value="880" calcext:value-type="float">
            <text:p>880</text:p>
          </table:table-cell>
          <table:table-cell table:content-validation-name="val2" table:formula="of:=VLOOKUP([.D8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1]+1" office:value-type="float" office:value="881" calcext:value-type="float">
            <text:p>881</text:p>
          </table:table-cell>
          <table:table-cell table:content-validation-name="val2" table:formula="of:=VLOOKUP([.D8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2]+1" office:value-type="float" office:value="882" calcext:value-type="float">
            <text:p>882</text:p>
          </table:table-cell>
          <table:table-cell table:content-validation-name="val2" table:formula="of:=VLOOKUP([.D8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3]+1" office:value-type="float" office:value="883" calcext:value-type="float">
            <text:p>883</text:p>
          </table:table-cell>
          <table:table-cell table:content-validation-name="val2" table:formula="of:=VLOOKUP([.D8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4]+1" office:value-type="float" office:value="884" calcext:value-type="float">
            <text:p>884</text:p>
          </table:table-cell>
          <table:table-cell table:content-validation-name="val2" table:formula="of:=VLOOKUP([.D8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5]+1" office:value-type="float" office:value="885" calcext:value-type="float">
            <text:p>885</text:p>
          </table:table-cell>
          <table:table-cell table:content-validation-name="val2" table:formula="of:=VLOOKUP([.D8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6]+1" office:value-type="float" office:value="886" calcext:value-type="float">
            <text:p>886</text:p>
          </table:table-cell>
          <table:table-cell table:content-validation-name="val2" table:formula="of:=VLOOKUP([.D8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7]+1" office:value-type="float" office:value="887" calcext:value-type="float">
            <text:p>887</text:p>
          </table:table-cell>
          <table:table-cell table:content-validation-name="val2" table:formula="of:=VLOOKUP([.D8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8]+1" office:value-type="float" office:value="888" calcext:value-type="float">
            <text:p>888</text:p>
          </table:table-cell>
          <table:table-cell table:content-validation-name="val2" table:formula="of:=VLOOKUP([.D8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89]+1" office:value-type="float" office:value="889" calcext:value-type="float">
            <text:p>889</text:p>
          </table:table-cell>
          <table:table-cell table:content-validation-name="val2" table:formula="of:=VLOOKUP([.D8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0]+1" office:value-type="float" office:value="890" calcext:value-type="float">
            <text:p>890</text:p>
          </table:table-cell>
          <table:table-cell table:content-validation-name="val2" table:formula="of:=VLOOKUP([.D8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1]+1" office:value-type="float" office:value="891" calcext:value-type="float">
            <text:p>891</text:p>
          </table:table-cell>
          <table:table-cell table:content-validation-name="val2" table:formula="of:=VLOOKUP([.D8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2]+1" office:value-type="float" office:value="892" calcext:value-type="float">
            <text:p>892</text:p>
          </table:table-cell>
          <table:table-cell table:content-validation-name="val2" table:formula="of:=VLOOKUP([.D8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3]+1" office:value-type="float" office:value="893" calcext:value-type="float">
            <text:p>893</text:p>
          </table:table-cell>
          <table:table-cell table:content-validation-name="val2" table:formula="of:=VLOOKUP([.D8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4]+1" office:value-type="float" office:value="894" calcext:value-type="float">
            <text:p>894</text:p>
          </table:table-cell>
          <table:table-cell table:content-validation-name="val2" table:formula="of:=VLOOKUP([.D8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5]+1" office:value-type="float" office:value="895" calcext:value-type="float">
            <text:p>895</text:p>
          </table:table-cell>
          <table:table-cell table:content-validation-name="val2" table:formula="of:=VLOOKUP([.D8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6]+1" office:value-type="float" office:value="896" calcext:value-type="float">
            <text:p>896</text:p>
          </table:table-cell>
          <table:table-cell table:content-validation-name="val2" table:formula="of:=VLOOKUP([.D8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7]+1" office:value-type="float" office:value="897" calcext:value-type="float">
            <text:p>897</text:p>
          </table:table-cell>
          <table:table-cell table:content-validation-name="val2" table:formula="of:=VLOOKUP([.D8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8]+1" office:value-type="float" office:value="898" calcext:value-type="float">
            <text:p>898</text:p>
          </table:table-cell>
          <table:table-cell table:content-validation-name="val2" table:formula="of:=VLOOKUP([.D8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899]+1" office:value-type="float" office:value="899" calcext:value-type="float">
            <text:p>899</text:p>
          </table:table-cell>
          <table:table-cell table:content-validation-name="val2" table:formula="of:=VLOOKUP([.D9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0]+1" office:value-type="float" office:value="900" calcext:value-type="float">
            <text:p>900</text:p>
          </table:table-cell>
          <table:table-cell table:content-validation-name="val2" table:formula="of:=VLOOKUP([.D9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1]+1" office:value-type="float" office:value="901" calcext:value-type="float">
            <text:p>901</text:p>
          </table:table-cell>
          <table:table-cell table:content-validation-name="val2" table:formula="of:=VLOOKUP([.D90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2]+1" office:value-type="float" office:value="902" calcext:value-type="float">
            <text:p>902</text:p>
          </table:table-cell>
          <table:table-cell table:content-validation-name="val2" table:formula="of:=VLOOKUP([.D90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3]+1" office:value-type="float" office:value="903" calcext:value-type="float">
            <text:p>903</text:p>
          </table:table-cell>
          <table:table-cell table:content-validation-name="val2" table:formula="of:=VLOOKUP([.D90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4]+1" office:value-type="float" office:value="904" calcext:value-type="float">
            <text:p>904</text:p>
          </table:table-cell>
          <table:table-cell table:content-validation-name="val2" table:formula="of:=VLOOKUP([.D90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5]+1" office:value-type="float" office:value="905" calcext:value-type="float">
            <text:p>905</text:p>
          </table:table-cell>
          <table:table-cell table:content-validation-name="val2" table:formula="of:=VLOOKUP([.D90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6]+1" office:value-type="float" office:value="906" calcext:value-type="float">
            <text:p>906</text:p>
          </table:table-cell>
          <table:table-cell table:content-validation-name="val2" table:formula="of:=VLOOKUP([.D90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7]+1" office:value-type="float" office:value="907" calcext:value-type="float">
            <text:p>907</text:p>
          </table:table-cell>
          <table:table-cell table:content-validation-name="val2" table:formula="of:=VLOOKUP([.D90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8]+1" office:value-type="float" office:value="908" calcext:value-type="float">
            <text:p>908</text:p>
          </table:table-cell>
          <table:table-cell table:content-validation-name="val2" table:formula="of:=VLOOKUP([.D90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09]+1" office:value-type="float" office:value="909" calcext:value-type="float">
            <text:p>909</text:p>
          </table:table-cell>
          <table:table-cell table:content-validation-name="val2" table:formula="of:=VLOOKUP([.D91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0]+1" office:value-type="float" office:value="910" calcext:value-type="float">
            <text:p>910</text:p>
          </table:table-cell>
          <table:table-cell table:content-validation-name="val2" table:formula="of:=VLOOKUP([.D91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1]+1" office:value-type="float" office:value="911" calcext:value-type="float">
            <text:p>911</text:p>
          </table:table-cell>
          <table:table-cell table:content-validation-name="val2" table:formula="of:=VLOOKUP([.D91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2]+1" office:value-type="float" office:value="912" calcext:value-type="float">
            <text:p>912</text:p>
          </table:table-cell>
          <table:table-cell table:content-validation-name="val2" table:formula="of:=VLOOKUP([.D91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3]+1" office:value-type="float" office:value="913" calcext:value-type="float">
            <text:p>913</text:p>
          </table:table-cell>
          <table:table-cell table:content-validation-name="val2" table:formula="of:=VLOOKUP([.D91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4]+1" office:value-type="float" office:value="914" calcext:value-type="float">
            <text:p>914</text:p>
          </table:table-cell>
          <table:table-cell table:content-validation-name="val2" table:formula="of:=VLOOKUP([.D91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5]+1" office:value-type="float" office:value="915" calcext:value-type="float">
            <text:p>915</text:p>
          </table:table-cell>
          <table:table-cell table:content-validation-name="val2" table:formula="of:=VLOOKUP([.D91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6]+1" office:value-type="float" office:value="916" calcext:value-type="float">
            <text:p>916</text:p>
          </table:table-cell>
          <table:table-cell table:content-validation-name="val2" table:formula="of:=VLOOKUP([.D91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7]+1" office:value-type="float" office:value="917" calcext:value-type="float">
            <text:p>917</text:p>
          </table:table-cell>
          <table:table-cell table:content-validation-name="val2" table:formula="of:=VLOOKUP([.D91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8]+1" office:value-type="float" office:value="918" calcext:value-type="float">
            <text:p>918</text:p>
          </table:table-cell>
          <table:table-cell table:content-validation-name="val2" table:formula="of:=VLOOKUP([.D91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19]+1" office:value-type="float" office:value="919" calcext:value-type="float">
            <text:p>919</text:p>
          </table:table-cell>
          <table:table-cell table:content-validation-name="val2" table:formula="of:=VLOOKUP([.D92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0]+1" office:value-type="float" office:value="920" calcext:value-type="float">
            <text:p>920</text:p>
          </table:table-cell>
          <table:table-cell table:content-validation-name="val2" table:formula="of:=VLOOKUP([.D92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1]+1" office:value-type="float" office:value="921" calcext:value-type="float">
            <text:p>921</text:p>
          </table:table-cell>
          <table:table-cell table:content-validation-name="val2" table:formula="of:=VLOOKUP([.D92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2]+1" office:value-type="float" office:value="922" calcext:value-type="float">
            <text:p>922</text:p>
          </table:table-cell>
          <table:table-cell table:content-validation-name="val2" table:formula="of:=VLOOKUP([.D92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3]+1" office:value-type="float" office:value="923" calcext:value-type="float">
            <text:p>923</text:p>
          </table:table-cell>
          <table:table-cell table:content-validation-name="val2" table:formula="of:=VLOOKUP([.D92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4]+1" office:value-type="float" office:value="924" calcext:value-type="float">
            <text:p>924</text:p>
          </table:table-cell>
          <table:table-cell table:content-validation-name="val2" table:formula="of:=VLOOKUP([.D92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5]+1" office:value-type="float" office:value="925" calcext:value-type="float">
            <text:p>925</text:p>
          </table:table-cell>
          <table:table-cell table:content-validation-name="val2" table:formula="of:=VLOOKUP([.D92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6]+1" office:value-type="float" office:value="926" calcext:value-type="float">
            <text:p>926</text:p>
          </table:table-cell>
          <table:table-cell table:content-validation-name="val2" table:formula="of:=VLOOKUP([.D92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7]+1" office:value-type="float" office:value="927" calcext:value-type="float">
            <text:p>927</text:p>
          </table:table-cell>
          <table:table-cell table:content-validation-name="val2" table:formula="of:=VLOOKUP([.D92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8]+1" office:value-type="float" office:value="928" calcext:value-type="float">
            <text:p>928</text:p>
          </table:table-cell>
          <table:table-cell table:content-validation-name="val2" table:formula="of:=VLOOKUP([.D92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29]+1" office:value-type="float" office:value="929" calcext:value-type="float">
            <text:p>929</text:p>
          </table:table-cell>
          <table:table-cell table:content-validation-name="val2" table:formula="of:=VLOOKUP([.D93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0]+1" office:value-type="float" office:value="930" calcext:value-type="float">
            <text:p>930</text:p>
          </table:table-cell>
          <table:table-cell table:content-validation-name="val2" table:formula="of:=VLOOKUP([.D93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1]+1" office:value-type="float" office:value="931" calcext:value-type="float">
            <text:p>931</text:p>
          </table:table-cell>
          <table:table-cell table:content-validation-name="val2" table:formula="of:=VLOOKUP([.D93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2]+1" office:value-type="float" office:value="932" calcext:value-type="float">
            <text:p>932</text:p>
          </table:table-cell>
          <table:table-cell table:content-validation-name="val2" table:formula="of:=VLOOKUP([.D93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3]+1" office:value-type="float" office:value="933" calcext:value-type="float">
            <text:p>933</text:p>
          </table:table-cell>
          <table:table-cell table:content-validation-name="val2" table:formula="of:=VLOOKUP([.D93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4]+1" office:value-type="float" office:value="934" calcext:value-type="float">
            <text:p>934</text:p>
          </table:table-cell>
          <table:table-cell table:content-validation-name="val2" table:formula="of:=VLOOKUP([.D93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5]+1" office:value-type="float" office:value="935" calcext:value-type="float">
            <text:p>935</text:p>
          </table:table-cell>
          <table:table-cell table:content-validation-name="val2" table:formula="of:=VLOOKUP([.D93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6]+1" office:value-type="float" office:value="936" calcext:value-type="float">
            <text:p>936</text:p>
          </table:table-cell>
          <table:table-cell table:content-validation-name="val2" table:formula="of:=VLOOKUP([.D93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7]+1" office:value-type="float" office:value="937" calcext:value-type="float">
            <text:p>937</text:p>
          </table:table-cell>
          <table:table-cell table:content-validation-name="val2" table:formula="of:=VLOOKUP([.D93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8]+1" office:value-type="float" office:value="938" calcext:value-type="float">
            <text:p>938</text:p>
          </table:table-cell>
          <table:table-cell table:content-validation-name="val2" table:formula="of:=VLOOKUP([.D93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39]+1" office:value-type="float" office:value="939" calcext:value-type="float">
            <text:p>939</text:p>
          </table:table-cell>
          <table:table-cell table:content-validation-name="val2" table:formula="of:=VLOOKUP([.D94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0]+1" office:value-type="float" office:value="940" calcext:value-type="float">
            <text:p>940</text:p>
          </table:table-cell>
          <table:table-cell table:content-validation-name="val2" table:formula="of:=VLOOKUP([.D94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1]+1" office:value-type="float" office:value="941" calcext:value-type="float">
            <text:p>941</text:p>
          </table:table-cell>
          <table:table-cell table:content-validation-name="val2" table:formula="of:=VLOOKUP([.D94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2]+1" office:value-type="float" office:value="942" calcext:value-type="float">
            <text:p>942</text:p>
          </table:table-cell>
          <table:table-cell table:content-validation-name="val2" table:formula="of:=VLOOKUP([.D94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3]+1" office:value-type="float" office:value="943" calcext:value-type="float">
            <text:p>943</text:p>
          </table:table-cell>
          <table:table-cell table:content-validation-name="val2" table:formula="of:=VLOOKUP([.D94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4]+1" office:value-type="float" office:value="944" calcext:value-type="float">
            <text:p>944</text:p>
          </table:table-cell>
          <table:table-cell table:content-validation-name="val2" table:formula="of:=VLOOKUP([.D94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5]+1" office:value-type="float" office:value="945" calcext:value-type="float">
            <text:p>945</text:p>
          </table:table-cell>
          <table:table-cell table:content-validation-name="val2" table:formula="of:=VLOOKUP([.D94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6]+1" office:value-type="float" office:value="946" calcext:value-type="float">
            <text:p>946</text:p>
          </table:table-cell>
          <table:table-cell table:content-validation-name="val2" table:formula="of:=VLOOKUP([.D94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7]+1" office:value-type="float" office:value="947" calcext:value-type="float">
            <text:p>947</text:p>
          </table:table-cell>
          <table:table-cell table:content-validation-name="val2" table:formula="of:=VLOOKUP([.D94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8]+1" office:value-type="float" office:value="948" calcext:value-type="float">
            <text:p>948</text:p>
          </table:table-cell>
          <table:table-cell table:content-validation-name="val2" table:formula="of:=VLOOKUP([.D94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49]+1" office:value-type="float" office:value="949" calcext:value-type="float">
            <text:p>949</text:p>
          </table:table-cell>
          <table:table-cell table:content-validation-name="val2" table:formula="of:=VLOOKUP([.D95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0]+1" office:value-type="float" office:value="950" calcext:value-type="float">
            <text:p>950</text:p>
          </table:table-cell>
          <table:table-cell table:content-validation-name="val2" table:formula="of:=VLOOKUP([.D95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1]+1" office:value-type="float" office:value="951" calcext:value-type="float">
            <text:p>951</text:p>
          </table:table-cell>
          <table:table-cell table:content-validation-name="val2" table:formula="of:=VLOOKUP([.D95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2]+1" office:value-type="float" office:value="952" calcext:value-type="float">
            <text:p>952</text:p>
          </table:table-cell>
          <table:table-cell table:content-validation-name="val2" table:formula="of:=VLOOKUP([.D95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3]+1" office:value-type="float" office:value="953" calcext:value-type="float">
            <text:p>953</text:p>
          </table:table-cell>
          <table:table-cell table:content-validation-name="val2" table:formula="of:=VLOOKUP([.D95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4]+1" office:value-type="float" office:value="954" calcext:value-type="float">
            <text:p>954</text:p>
          </table:table-cell>
          <table:table-cell table:content-validation-name="val2" table:formula="of:=VLOOKUP([.D95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5]+1" office:value-type="float" office:value="955" calcext:value-type="float">
            <text:p>955</text:p>
          </table:table-cell>
          <table:table-cell table:content-validation-name="val2" table:formula="of:=VLOOKUP([.D95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6]+1" office:value-type="float" office:value="956" calcext:value-type="float">
            <text:p>956</text:p>
          </table:table-cell>
          <table:table-cell table:content-validation-name="val2" table:formula="of:=VLOOKUP([.D95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7]+1" office:value-type="float" office:value="957" calcext:value-type="float">
            <text:p>957</text:p>
          </table:table-cell>
          <table:table-cell table:content-validation-name="val2" table:formula="of:=VLOOKUP([.D95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8]+1" office:value-type="float" office:value="958" calcext:value-type="float">
            <text:p>958</text:p>
          </table:table-cell>
          <table:table-cell table:content-validation-name="val2" table:formula="of:=VLOOKUP([.D95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59]+1" office:value-type="float" office:value="959" calcext:value-type="float">
            <text:p>959</text:p>
          </table:table-cell>
          <table:table-cell table:content-validation-name="val2" table:formula="of:=VLOOKUP([.D96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0]+1" office:value-type="float" office:value="960" calcext:value-type="float">
            <text:p>960</text:p>
          </table:table-cell>
          <table:table-cell table:content-validation-name="val2" table:formula="of:=VLOOKUP([.D96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1]+1" office:value-type="float" office:value="961" calcext:value-type="float">
            <text:p>961</text:p>
          </table:table-cell>
          <table:table-cell table:content-validation-name="val2" table:formula="of:=VLOOKUP([.D96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2]+1" office:value-type="float" office:value="962" calcext:value-type="float">
            <text:p>962</text:p>
          </table:table-cell>
          <table:table-cell table:content-validation-name="val2" table:formula="of:=VLOOKUP([.D96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3]+1" office:value-type="float" office:value="963" calcext:value-type="float">
            <text:p>963</text:p>
          </table:table-cell>
          <table:table-cell table:content-validation-name="val2" table:formula="of:=VLOOKUP([.D96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4]+1" office:value-type="float" office:value="964" calcext:value-type="float">
            <text:p>964</text:p>
          </table:table-cell>
          <table:table-cell table:content-validation-name="val2" table:formula="of:=VLOOKUP([.D96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5]+1" office:value-type="float" office:value="965" calcext:value-type="float">
            <text:p>965</text:p>
          </table:table-cell>
          <table:table-cell table:content-validation-name="val2" table:formula="of:=VLOOKUP([.D96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6]+1" office:value-type="float" office:value="966" calcext:value-type="float">
            <text:p>966</text:p>
          </table:table-cell>
          <table:table-cell table:content-validation-name="val2" table:formula="of:=VLOOKUP([.D96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7]+1" office:value-type="float" office:value="967" calcext:value-type="float">
            <text:p>967</text:p>
          </table:table-cell>
          <table:table-cell table:content-validation-name="val2" table:formula="of:=VLOOKUP([.D96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8]+1" office:value-type="float" office:value="968" calcext:value-type="float">
            <text:p>968</text:p>
          </table:table-cell>
          <table:table-cell table:content-validation-name="val2" table:formula="of:=VLOOKUP([.D96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69]+1" office:value-type="float" office:value="969" calcext:value-type="float">
            <text:p>969</text:p>
          </table:table-cell>
          <table:table-cell table:content-validation-name="val2" table:formula="of:=VLOOKUP([.D97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0]+1" office:value-type="float" office:value="970" calcext:value-type="float">
            <text:p>970</text:p>
          </table:table-cell>
          <table:table-cell table:content-validation-name="val2" table:formula="of:=VLOOKUP([.D97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1]+1" office:value-type="float" office:value="971" calcext:value-type="float">
            <text:p>971</text:p>
          </table:table-cell>
          <table:table-cell table:content-validation-name="val2" table:formula="of:=VLOOKUP([.D97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2]+1" office:value-type="float" office:value="972" calcext:value-type="float">
            <text:p>972</text:p>
          </table:table-cell>
          <table:table-cell table:content-validation-name="val2" table:formula="of:=VLOOKUP([.D97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3]+1" office:value-type="float" office:value="973" calcext:value-type="float">
            <text:p>973</text:p>
          </table:table-cell>
          <table:table-cell table:content-validation-name="val2" table:formula="of:=VLOOKUP([.D97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4]+1" office:value-type="float" office:value="974" calcext:value-type="float">
            <text:p>974</text:p>
          </table:table-cell>
          <table:table-cell table:content-validation-name="val2" table:formula="of:=VLOOKUP([.D97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5]+1" office:value-type="float" office:value="975" calcext:value-type="float">
            <text:p>975</text:p>
          </table:table-cell>
          <table:table-cell table:content-validation-name="val2" table:formula="of:=VLOOKUP([.D97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6]+1" office:value-type="float" office:value="976" calcext:value-type="float">
            <text:p>976</text:p>
          </table:table-cell>
          <table:table-cell table:content-validation-name="val2" table:formula="of:=VLOOKUP([.D97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7]+1" office:value-type="float" office:value="977" calcext:value-type="float">
            <text:p>977</text:p>
          </table:table-cell>
          <table:table-cell table:content-validation-name="val2" table:formula="of:=VLOOKUP([.D97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8]+1" office:value-type="float" office:value="978" calcext:value-type="float">
            <text:p>978</text:p>
          </table:table-cell>
          <table:table-cell table:content-validation-name="val2" table:formula="of:=VLOOKUP([.D97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79]+1" office:value-type="float" office:value="979" calcext:value-type="float">
            <text:p>979</text:p>
          </table:table-cell>
          <table:table-cell table:content-validation-name="val2" table:formula="of:=VLOOKUP([.D98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0]+1" office:value-type="float" office:value="980" calcext:value-type="float">
            <text:p>980</text:p>
          </table:table-cell>
          <table:table-cell table:content-validation-name="val2" table:formula="of:=VLOOKUP([.D98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1]+1" office:value-type="float" office:value="981" calcext:value-type="float">
            <text:p>981</text:p>
          </table:table-cell>
          <table:table-cell table:content-validation-name="val2" table:formula="of:=VLOOKUP([.D98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2]+1" office:value-type="float" office:value="982" calcext:value-type="float">
            <text:p>982</text:p>
          </table:table-cell>
          <table:table-cell table:content-validation-name="val2" table:formula="of:=VLOOKUP([.D98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3]+1" office:value-type="float" office:value="983" calcext:value-type="float">
            <text:p>983</text:p>
          </table:table-cell>
          <table:table-cell table:content-validation-name="val2" table:formula="of:=VLOOKUP([.D98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4]+1" office:value-type="float" office:value="984" calcext:value-type="float">
            <text:p>984</text:p>
          </table:table-cell>
          <table:table-cell table:content-validation-name="val2" table:formula="of:=VLOOKUP([.D98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5]+1" office:value-type="float" office:value="985" calcext:value-type="float">
            <text:p>985</text:p>
          </table:table-cell>
          <table:table-cell table:content-validation-name="val2" table:formula="of:=VLOOKUP([.D98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6]+1" office:value-type="float" office:value="986" calcext:value-type="float">
            <text:p>986</text:p>
          </table:table-cell>
          <table:table-cell table:content-validation-name="val2" table:formula="of:=VLOOKUP([.D98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7]+1" office:value-type="float" office:value="987" calcext:value-type="float">
            <text:p>987</text:p>
          </table:table-cell>
          <table:table-cell table:content-validation-name="val2" table:formula="of:=VLOOKUP([.D98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8]+1" office:value-type="float" office:value="988" calcext:value-type="float">
            <text:p>988</text:p>
          </table:table-cell>
          <table:table-cell table:content-validation-name="val2" table:formula="of:=VLOOKUP([.D98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89]+1" office:value-type="float" office:value="989" calcext:value-type="float">
            <text:p>989</text:p>
          </table:table-cell>
          <table:table-cell table:content-validation-name="val2" table:formula="of:=VLOOKUP([.D99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0]+1" office:value-type="float" office:value="990" calcext:value-type="float">
            <text:p>990</text:p>
          </table:table-cell>
          <table:table-cell table:content-validation-name="val2" table:formula="of:=VLOOKUP([.D99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1]+1" office:value-type="float" office:value="991" calcext:value-type="float">
            <text:p>991</text:p>
          </table:table-cell>
          <table:table-cell table:content-validation-name="val2" table:formula="of:=VLOOKUP([.D992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2]+1" office:value-type="float" office:value="992" calcext:value-type="float">
            <text:p>992</text:p>
          </table:table-cell>
          <table:table-cell table:content-validation-name="val2" table:formula="of:=VLOOKUP([.D993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3]+1" office:value-type="float" office:value="993" calcext:value-type="float">
            <text:p>993</text:p>
          </table:table-cell>
          <table:table-cell table:content-validation-name="val2" table:formula="of:=VLOOKUP([.D994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4]+1" office:value-type="float" office:value="994" calcext:value-type="float">
            <text:p>994</text:p>
          </table:table-cell>
          <table:table-cell table:content-validation-name="val2" table:formula="of:=VLOOKUP([.D995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5]+1" office:value-type="float" office:value="995" calcext:value-type="float">
            <text:p>995</text:p>
          </table:table-cell>
          <table:table-cell table:content-validation-name="val2" table:formula="of:=VLOOKUP([.D996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6]+1" office:value-type="float" office:value="996" calcext:value-type="float">
            <text:p>996</text:p>
          </table:table-cell>
          <table:table-cell table:content-validation-name="val2" table:formula="of:=VLOOKUP([.D997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7]+1" office:value-type="float" office:value="997" calcext:value-type="float">
            <text:p>997</text:p>
          </table:table-cell>
          <table:table-cell table:content-validation-name="val2" table:formula="of:=VLOOKUP([.D998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8]+1" office:value-type="float" office:value="998" calcext:value-type="float">
            <text:p>998</text:p>
          </table:table-cell>
          <table:table-cell table:content-validation-name="val2" table:formula="of:=VLOOKUP([.D999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999]+1" office:value-type="float" office:value="999" calcext:value-type="float">
            <text:p>999</text:p>
          </table:table-cell>
          <table:table-cell table:content-validation-name="val2" table:formula="of:=VLOOKUP([.D1000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>
          <table:table-cell table:style-name="ce21"/>
          <table:table-cell table:style-name="ce4" table:content-validation-name="val1" table:formula="of:=[.B1000]+1" office:value-type="float" office:value="1000" calcext:value-type="float">
            <text:p>1000</text:p>
          </table:table-cell>
          <table:table-cell table:content-validation-name="val2" table:formula="of:=VLOOKUP([.D1001];[$cat_context_class.$A$2:.$B$1001];2;0)" office:value-type="string" office:string-value="" calcext:value-type="error">
            <text:p>#N/A</text:p>
          </table:table-cell>
          <table:table-cell table:style-name="ce9" table:content-validation-name="val3"/>
          <table:table-cell table:number-columns-repeated="16380"/>
        </table:table-row>
        <table:table-row table:style-name="ro1" table:visibility="collapse" table:number-rows-repeated="1000">
          <table:table-cell table:number-columns-repeated="2"/>
          <table:table-cell table:content-validation-name="val2"/>
          <table:table-cell table:number-columns-repeated="16381"/>
        </table:table-row>
        <table:table-row table:style-name="ro1" table:visibility="collapse" table:number-rows-repeated="1046574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cat_context.A1:cat_context.B1">
            <calcext:condition calcext:apply-style-name="ConditionalStyle_1" calcext:value="formula-is(VLOOKUP([.A1];[$Cat_Validation.$A$2:.$C$9];3;0)&lt;&gt;VLOOKUP([.A1];[$Cat_Validation.$A$2:.$C$9];2;0))" calcext:base-cell-address="cat_context.A1"/>
          </calcext:conditional-format>
        </calcext:conditional-formats>
      </table:table>
      <table:table table:name="cat_object" table:style-name="ta6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4" table:default-cell-style-name="ce12"/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12"/>
        <table:table-column table:style-name="co14" table:default-cell-style-name="ce12"/>
        <table:table-column table:style-name="co14" table:default-cell-style-name="ce22"/>
        <table:table-column table:style-name="co3" table:number-columns-repeated="16374" table:default-cell-style-name="ce22"/>
        <table:table-row table:style-name="ro2">
          <table:table-cell table:style-name="ce36" office:value-type="string" calcext:value-type="string">
            <text:p>object_code</text:p>
          </table:table-cell>
          <table:table-cell table:style-name="ce36" office:value-type="string" calcext:value-type="string">
            <text:p>object_id</text:p>
          </table:table-cell>
          <table:table-cell table:style-name="ce33" office:value-type="string" calcext:value-type="string">
            <text:p>object_label_en</text:p>
          </table:table-cell>
          <table:table-cell table:style-name="ce33" office:value-type="string" calcext:value-type="string">
            <text:p>object_label_es</text:p>
          </table:table-cell>
          <table:table-cell table:style-name="ce13" office:value-type="string" calcext:value-type="string">
            <text:p>object_title_en</text:p>
          </table:table-cell>
          <table:table-cell table:style-name="ce13" office:value-type="string" calcext:value-type="string">
            <text:p>object_title_es</text:p>
          </table:table-cell>
          <table:table-cell table:style-name="ce33" office:value-type="string" calcext:value-type="string">
            <text:p>object_desc_en</text:p>
          </table:table-cell>
          <table:table-cell table:style-name="ce33" office:value-type="string" calcext:value-type="string">
            <text:p>object_desc_es</text:p>
          </table:table-cell>
          <table:table-cell table:style-name="ce33" office:value-type="string" calcext:value-type="string">
            <text:p>reference</text:p>
          </table:table-cell>
          <table:table-cell table:style-name="ce33" office:value-type="string" calcext:value-type="string">
            <text:p>year</text:p>
          </table:table-cell>
          <table:table-cell table:number-columns-repeated="16374"/>
        </table:table-row>
        <table:table-row table:style-name="ro3">
          <table:table-cell table:style-name="ce21" office:value-type="string" calcext:value-type="string">
            <text:p>Mer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11" office:value-type="string" calcext:value-type="string">
            <text:p>Mercury</text:p>
          </table:table-cell>
          <table:table-cell table:style-name="ce11" office:value-type="string" calcext:value-type="string">
            <text:p>Mercurio</text:p>
          </table:table-cell>
          <table:table-cell table:style-name="ce11" office:value-type="string" calcext:value-type="string">
            <text:p>Mercury</text:p>
          </table:table-cell>
          <table:table-cell table:style-name="ce11" office:value-type="string" calcext:value-type="string">
            <text:p>Mercurio</text:p>
          </table:table-cell>
          <table:table-cell table:style-name="ce14" office:value-type="string" calcext:value-type="string">
            <text:p>Small, rocky, and closest to the Sun</text:p>
          </table:table-cell>
          <table:table-cell table:style-name="ce15" office:value-type="string" calcext:value-type="string">
            <text:p>Pequeño, rocoso y el más cercano al Sol.</text:p>
          </table:table-cell>
          <table:table-cell table:style-name="ce11"/>
          <table:table-cell table:style-name="ce21"/>
          <table:table-cell table:number-columns-repeated="16374"/>
        </table:table-row>
        <table:table-row table:style-name="ro4">
          <table:table-cell table:style-name="ce21" office:value-type="string" calcext:value-type="string">
            <text:p>Ven</text:p>
          </table:table-cell>
          <table:table-cell table:style-name="ce4" table:content-validation-name="val1" table:formula="of:=[.B2]+1" office:value-type="float" office:value="2" calcext:value-type="float">
            <text:p>2</text:p>
          </table:table-cell>
          <table:table-cell table:number-columns-repeated="4" table:style-name="ce11" office:value-type="string" calcext:value-type="string">
            <text:p>Venus</text:p>
          </table:table-cell>
          <table:table-cell table:style-name="ce14" office:value-type="string" calcext:value-type="string">
            <text:p>Hot, with thick clouds and extreme greenhouse effect.</text:p>
          </table:table-cell>
          <table:table-cell table:style-name="ce15" office:value-type="string" calcext:value-type="string">
            <text:p>Caluroso, con nubes espesas y un efecto invernadero extremo.</text:p>
          </table:table-cell>
          <table:table-cell table:style-name="ce11"/>
          <table:table-cell table:style-name="ce21"/>
          <table:table-cell table:number-columns-repeated="16374"/>
        </table:table-row>
        <table:table-row table:style-name="ro5">
          <table:table-cell table:style-name="ce21" office:value-type="string" calcext:value-type="string">
            <text:p>Earth</text:p>
          </table:table-cell>
          <table:table-cell table:style-name="ce4" table:content-validation-name="val1" table:formula="of:=[.B3]+1" office:value-type="float" office:value="3" calcext:value-type="float">
            <text:p>3</text:p>
          </table:table-cell>
          <table:table-cell table:style-name="ce11" office:value-type="string" calcext:value-type="string">
            <text:p>Earth</text:p>
          </table:table-cell>
          <table:table-cell table:style-name="ce11" office:value-type="string" calcext:value-type="string">
            <text:p>Tierra</text:p>
          </table:table-cell>
          <table:table-cell table:style-name="ce11" office:value-type="string" calcext:value-type="string">
            <text:p>Earth</text:p>
          </table:table-cell>
          <table:table-cell table:style-name="ce11" office:value-type="string" calcext:value-type="string">
            <text:p>Tierra</text:p>
          </table:table-cell>
          <table:table-cell table:style-name="ce14" office:value-type="string" calcext:value-type="string">
            <text:p>The only planet known to support life, with oceans and land.</text:p>
          </table:table-cell>
          <table:table-cell table:style-name="ce15" office:value-type="string" calcext:value-type="string">
            <text:p>El único planeta conocido que alberga vida, con océanos y tierra.</text:p>
          </table:table-cell>
          <table:table-cell table:style-name="ce11" office:value-type="string" calcext:value-type="string">
            <text:p>De Revolutionibus Orbium Coelestium, Nicolás Copérnico</text:p>
          </table:table-cell>
          <table:table-cell table:style-name="ce43" office:value-type="float" office:value="1543" calcext:value-type="float">
            <text:p>1543</text:p>
          </table:table-cell>
          <table:table-cell table:number-columns-repeated="16374"/>
        </table:table-row>
        <table:table-row table:style-name="ro6">
          <table:table-cell table:style-name="ce21" office:value-type="string" calcext:value-type="string">
            <text:p>Mars</text:p>
          </table:table-cell>
          <table:table-cell table:style-name="ce4" table:content-validation-name="val1" table:formula="of:=[.B4]+1" office:value-type="float" office:value="4" calcext:value-type="float">
            <text:p>4</text:p>
          </table:table-cell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Marte</text:p>
          </table:table-cell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Marte</text:p>
          </table:table-cell>
          <table:table-cell table:style-name="ce14" office:value-type="string" calcext:value-type="string">
            <text:p>Red, dusty, and potentially home to ancient water.</text:p>
          </table:table-cell>
          <table:table-cell table:style-name="ce15" office:value-type="string" calcext:value-type="string">
            <text:p>Rojo, polvoriento y potencialmente hogar de agua antigua.</text:p>
          </table:table-cell>
          <table:table-cell table:style-name="ce11"/>
          <table:table-cell table:style-name="ce21"/>
          <table:table-cell table:number-columns-repeated="16374"/>
        </table:table-row>
        <table:table-row table:style-name="ro7">
          <table:table-cell table:style-name="ce21" office:value-type="string" calcext:value-type="string">
            <text:p>Jup</text:p>
          </table:table-cell>
          <table:table-cell table:style-name="ce4" table:content-validation-name="val1" table:formula="of:=[.B5]+1" office:value-type="float" office:value="5" calcext:value-type="float">
            <text:p>5</text:p>
          </table:table-cell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Júpiter</text:p>
          </table:table-cell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Júpiter</text:p>
          </table:table-cell>
          <table:table-cell table:style-name="ce14" office:value-type="string" calcext:value-type="string">
            <text:p>Massive gas giant with a Great Red Spot storm.</text:p>
          </table:table-cell>
          <table:table-cell table:style-name="ce15" office:value-type="string" calcext:value-type="string">
            <text:p>Gigante gaseoso masivo con una tormenta llamada Gran Mancha Roja.</text:p>
          </table:table-cell>
          <table:table-cell table:style-name="ce11"/>
          <table:table-cell table:style-name="ce21"/>
          <table:table-cell table:number-columns-repeated="16374"/>
        </table:table-row>
        <table:table-row table:style-name="ro8">
          <table:table-cell table:style-name="ce21" office:value-type="string" calcext:value-type="string">
            <text:p>Sat</text:p>
          </table:table-cell>
          <table:table-cell table:style-name="ce4" table:content-validation-name="val1" table:formula="of:=[.B6]+1" office:value-type="float" office:value="6" calcext:value-type="float">
            <text:p>6</text:p>
          </table:table-cell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Saturno</text:p>
          </table:table-cell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Saturno</text:p>
          </table:table-cell>
          <table:table-cell table:style-name="ce14" office:value-type="string" calcext:value-type="string">
            <text:p>Gas giant with prominent, beautiful rings.</text:p>
          </table:table-cell>
          <table:table-cell table:style-name="ce15" office:value-type="string" calcext:value-type="string">
            <text:p>Gigante gaseoso con anillos prominentes y hermosos.</text:p>
          </table:table-cell>
          <table:table-cell table:style-name="ce11"/>
          <table:table-cell table:style-name="ce21"/>
          <table:table-cell table:number-columns-repeated="16374"/>
        </table:table-row>
        <table:table-row table:style-name="ro9">
          <table:table-cell table:style-name="ce21" office:value-type="string" calcext:value-type="string">
            <text:p>Uran</text:p>
          </table:table-cell>
          <table:table-cell table:style-name="ce4" table:content-validation-name="val1" table:formula="of:=[.B7]+1" office:value-type="float" office:value="7" calcext:value-type="float">
            <text:p>7</text:p>
          </table:table-cell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Urano</text:p>
          </table:table-cell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Urano</text:p>
          </table:table-cell>
          <table:table-cell table:style-name="ce14" office:value-type="string" calcext:value-type="string">
            <text:p>Ice giant tilted on its side, with faint rings.</text:p>
          </table:table-cell>
          <table:table-cell table:style-name="ce15" office:value-type="string" calcext:value-type="string">
            <text:p>Gigante de hielo inclinado de lado, con anillos tenues.</text:p>
          </table:table-cell>
          <table:table-cell table:style-name="ce11" office:value-type="string" calcext:value-type="string">
            <text:p>Herschel, William; «Account of a Comet. By Mr. Herschel, F. R. S.; communicated by Dr. Watson, Jun. of Bath, F. R. S.» Philosophical Transactions of the Royal Society of London, Vol. 71, pp. 492-501.</text:p>
          </table:table-cell>
          <table:table-cell table:style-name="ce43" office:value-type="float" office:value="1781" calcext:value-type="float">
            <text:p>1781</text:p>
          </table:table-cell>
          <table:table-cell table:number-columns-repeated="16374"/>
        </table:table-row>
        <table:table-row table:style-name="ro10">
          <table:table-cell table:style-name="ce21" office:value-type="string" calcext:value-type="string">
            <text:p>Nep</text:p>
          </table:table-cell>
          <table:table-cell table:style-name="ce4" table:content-validation-name="val1" table:formula="of:=[.B8]+1" office:value-type="float" office:value="8" calcext:value-type="float">
            <text:p>8</text:p>
          </table:table-cell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Neptuno</text:p>
          </table:table-cell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Neptuno</text:p>
          </table:table-cell>
          <table:table-cell table:style-name="ce14" office:value-type="string" calcext:value-type="string">
            <text:p>Cold, blue ice giant with strong winds.</text:p>
          </table:table-cell>
          <table:table-cell table:style-name="ce15" office:value-type="string" calcext:value-type="string">
            <text:p>Gigante de hielo azul y frío con fuertes vientos.</text:p>
          </table:table-cell>
          <table:table-cell table:style-name="ce11" office:value-type="string" calcext:value-type="string">
            <text:p>Urbain LeVerrier, “Account of the Discovery of the Planet of Le Verrier at Berlin”, <text:span text:style-name="T1">Monthly Notices of the Royal Astronomical Society,</text:span> Vol. 7, No. 9, pp. 153–157.</text:p>
          </table:table-cell>
          <table:table-cell table:style-name="ce21" office:value-type="float" office:value="1846" calcext:value-type="float">
            <text:p>1846</text:p>
          </table:table-cell>
          <table:table-cell table:number-columns-repeated="16374"/>
        </table:table-row>
        <table:table-row table:style-name="ro11">
          <table:table-cell table:style-name="ce21" office:value-type="string" calcext:value-type="string">
            <text:p>Pluto</text:p>
          </table:table-cell>
          <table:table-cell table:style-name="ce4" table:content-validation-name="val1" table:formula="of:=[.B9]+1" office:value-type="float" office:value="9" calcext:value-type="float">
            <text:p>9</text:p>
          </table:table-cell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Pluton</text:p>
          </table:table-cell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Pluton</text:p>
          </table:table-cell>
          <table:table-cell table:style-name="ce14" office:value-type="string" calcext:value-type="string">
            <text:p>A small, icy dwarf planet in the Kuiper Belt, with a highly elliptical orbit.</text:p>
          </table:table-cell>
          <table:table-cell table:style-name="ce15" office:value-type="string" calcext:value-type="string">
            <text:p>Un pequeño planeta enano helado en el Cinturón de Kuiper, con una órbita altamente elíptica.</text:p>
          </table:table-cell>
          <table:table-cell table:style-name="ce11" office:value-type="string" calcext:value-type="string">
            <text:p>Tombaugh, Clyde W.; «The Search for the Ninth Planet, Pluto.» Astronomical Society of the Pacific Leaflets, Vol. 5, No. 209 , pp. 73-80.</text:p>
          </table:table-cell>
          <table:table-cell table:style-name="ce21" office:value-type="float" office:value="1930" calcext:value-type="float">
            <text:p>1930</text:p>
          </table:table-cell>
          <table:table-cell table:number-columns-repeated="16374"/>
        </table:table-row>
        <table:table-row table:style-name="ro12">
          <table:table-cell table:style-name="ce21" office:value-type="string" calcext:value-type="string">
            <text:p>Ceres</text:p>
          </table:table-cell>
          <table:table-cell table:style-name="ce4" table:content-validation-name="val1" table:formula="of:=[.B10]+1" office:value-type="float" office:value="10" calcext:value-type="float">
            <text:p>10</text:p>
          </table:table-cell>
          <table:table-cell table:number-columns-repeated="4" table:style-name="ce11" office:value-type="string" calcext:value-type="string">
            <text:p>Ceres</text:p>
          </table:table-cell>
          <table:table-cell table:style-name="ce15" office:value-type="string" calcext:value-type="string">
            <text:p>The largest object in the asteroid belt, a dwarf planet with a rocky surface and possible water-ice beneath.</text:p>
          </table:table-cell>
          <table:table-cell table:style-name="ce15" office:value-type="string" calcext:value-type="string">
            <text:p>El objeto más grande del cinturón de asteroides, un planeta enano con una superficie rocosa y posible hielo de agua debajo.</text:p>
          </table:table-cell>
          <table:table-cell table:style-name="ce11" office:value-type="string" calcext:value-type="string">
            <text:p>Giuseppe Piazzi</text:p>
          </table:table-cell>
          <table:table-cell table:style-name="ce21" office:value-type="float" office:value="1801" calcext:value-type="float">
            <text:p>1801</text:p>
          </table:table-cell>
          <table:table-cell table:number-columns-repeated="16374"/>
        </table:table-row>
        <table:table-row table:style-name="ro3">
          <table:table-cell table:style-name="ce21" office:value-type="string" calcext:value-type="string">
            <text:p>Planet</text:p>
          </table:table-cell>
          <table:table-cell table:style-name="ce4" table:content-validation-name="val1" table:formula="of:=[.B11]+1" office:value-type="float" office:value="11" calcext:value-type="float">
            <text:p>11</text:p>
          </table:table-cell>
          <table:table-cell table:style-name="ce11" office:value-type="string" calcext:value-type="string">
            <text:p>Planet</text:p>
          </table:table-cell>
          <table:table-cell table:style-name="ce11" office:value-type="string" calcext:value-type="string">
            <text:p>Planeta</text:p>
          </table:table-cell>
          <table:table-cell table:style-name="ce11" office:value-type="string" calcext:value-type="string">
            <text:p>Planet</text:p>
          </table:table-cell>
          <table:table-cell table:style-name="ce11" office:value-type="string" calcext:value-type="string">
            <text:p>Planeta</text:p>
          </table:table-cell>
          <table:table-cell table:style-name="ce15" office:value-type="string" calcext:value-type="string">
            <text:p>Model of planet according to the IAU</text:p>
          </table:table-cell>
          <table:table-cell table:style-name="ce14" office:value-type="string" calcext:value-type="string">
            <text:p>Modelo de planeta de acuerdo a la IAU.</text:p>
          </table:table-cell>
          <table:table-cell table:style-name="ce11" office:value-type="string" calcext:value-type="string">
            <text:p>IAU</text:p>
          </table:table-cell>
          <table:table-cell table:style-name="ce21" office:value-type="float" office:value="2006" calcext:value-type="float">
            <text:p>2006</text:p>
          </table:table-cell>
          <table:table-cell table:number-columns-repeated="16374"/>
        </table:table-row>
        <table:table-row table:style-name="ro13">
          <table:table-cell table:style-name="ce21" office:value-type="string" calcext:value-type="string">
            <text:p>Kepler</text:p>
          </table:table-cell>
          <table:table-cell table:style-name="ce4" table:content-validation-name="val1" table:formula="of:=[.B12]+1" office:value-type="float" office:value="12" calcext:value-type="float">
            <text:p>12</text:p>
          </table:table-cell>
          <table:table-cell table:number-columns-repeated="4" table:style-name="ce11" office:value-type="string" calcext:value-type="string">
            <text:p>Kepler-186f</text:p>
          </table:table-cell>
          <table:table-cell table:style-name="ce15" office:value-type="string" calcext:value-type="string">
            <text:p>An Earth-sized planet in the habitable zone of its star Kepler 186.</text:p>
          </table:table-cell>
          <table:table-cell table:style-name="ce15" office:value-type="string" calcext:value-type="string">
            <text:p>Un exoplaneta del tamaño de la Tierra en la zona habitable de la estrella Kepler 186.</text:p>
          </table:table-cell>
          <table:table-cell table:style-name="ce11" office:value-type="string" calcext:value-type="string">
            <text:p>NASA-Kepler Telescope</text:p>
          </table:table-cell>
          <table:table-cell table:style-name="ce21" office:value-type="float" office:value="2014" calcext:value-type="float">
            <text:p>2014</text:p>
          </table:table-cell>
          <table:table-cell table:number-columns-repeated="16374"/>
        </table:table-row>
        <table:table-row table:style-name="ro14">
          <table:table-cell table:style-name="ce21" office:value-type="string" calcext:value-type="string">
            <text:p>Sun</text:p>
          </table:table-cell>
          <table:table-cell table:style-name="ce4" table:content-validation-name="val1" table:formula="of:=[.B13]+1" office:value-type="float" office:value="13" calcext:value-type="float">
            <text:p>13</text:p>
          </table:table-cell>
          <table:table-cell table:style-name="ce11" office:value-type="string" calcext:value-type="string">
            <text:p>Sun</text:p>
          </table:table-cell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Sun</text:p>
          </table:table-cell>
          <table:table-cell table:style-name="ce11" office:value-type="string" calcext:value-type="string">
            <text:p>Sol</text:p>
          </table:table-cell>
          <table:table-cell table:style-name="ce15" office:value-type="string" calcext:value-type="string">
            <text:p>A massive, glowing ball of hot plasma, the central star of our solar system, providing heat and light to support life on Earth through nuclear fusion at its core.</text:p>
          </table:table-cell>
          <table:table-cell table:style-name="ce15" office:value-type="string" calcext:value-type="string">
            <text:p>Una enorme y brillante bola de plasma caliente, la estrella central de nuestro Sistema Solar, que proporciona calor y luz para sustentar la vida en la Tierra a través de la fusión nuclear en su núcleo.</text:p>
          </table:table-cell>
          <table:table-cell table:style-name="ce11"/>
          <table:table-cell table:style-name="ce21"/>
          <table:table-cell table:number-columns-repeated="1637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at_object.A1:cat_object.B1">
            <calcext:condition calcext:apply-style-name="ConditionalStyle_1" calcext:value="formula-is(VLOOKUP([.A1];[$Cat_Validation.$A$2:.$C$9];3;0)&lt;&gt;VLOOKUP([.A1];[$Cat_Validation.$A$2:.$C$9];2;0))" calcext:base-cell-address="cat_object.A1"/>
          </calcext:conditional-format>
        </calcext:conditional-formats>
      </table:table>
      <table:table table:name="cat_attr_class" table:style-name="ta9">
        <office:forms form:automatic-focus="false" form:apply-design-mode="false"/>
        <table:table-column table:style-name="co13" table:default-cell-style-name="ce34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3" table:number-columns-repeated="16380" table:default-cell-style-name="ce22"/>
        <table:table-row table:style-name="ro1">
          <table:table-cell table:style-name="ce38" office:value-type="string" calcext:value-type="string">
            <text:p>attr_class_code</text:p>
          </table:table-cell>
          <table:table-cell table:style-name="ce45" office:value-type="string" calcext:value-type="string">
            <text:p>attr_class_id</text:p>
          </table:table-cell>
          <table:table-cell table:style-name="ce33" office:value-type="string" calcext:value-type="string">
            <text:p>attr_class_title_en</text:p>
          </table:table-cell>
          <table:table-cell table:style-name="ce33" office:value-type="string" calcext:value-type="string">
            <text:p>attr_class_title_es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size</text:p>
          </table:table-cell>
          <table:table-cell table:style-name="ce4" table:content-validation-name="val1" office:value-type="float" office:value="1000" calcext:value-type="float">
            <text:p>1000</text:p>
          </table:table-cell>
          <table:table-cell table:style-name="ce21" office:value-type="string" calcext:value-type="string">
            <text:p>Size</text:p>
          </table:table-cell>
          <table:table-cell table:style-name="ce21" office:value-type="string" calcext:value-type="string">
            <text:p>Tamaño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distance</text:p>
          </table:table-cell>
          <table:table-cell table:style-name="ce4" table:content-validation-name="val1" table:formula="of:=[.B2]+1" office:value-type="float" office:value="1001" calcext:value-type="float">
            <text:p>1001</text:p>
          </table:table-cell>
          <table:table-cell table:style-name="ce21" office:value-type="string" calcext:value-type="string">
            <text:p>Distance</text:p>
          </table:table-cell>
          <table:table-cell table:style-name="ce21" office:value-type="string" calcext:value-type="string">
            <text:p>Distancia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satellites</text:p>
          </table:table-cell>
          <table:table-cell table:style-name="ce4" table:content-validation-name="val1" table:formula="of:=[.B3]+1" office:value-type="float" office:value="1002" calcext:value-type="float">
            <text:p>1002</text:p>
          </table:table-cell>
          <table:table-cell table:style-name="ce21" office:value-type="string" calcext:value-type="string">
            <text:p>Has satellites</text:p>
          </table:table-cell>
          <table:table-cell table:style-name="ce21" office:value-type="string" calcext:value-type="string">
            <text:p>Tiene satélites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orbit</text:p>
          </table:table-cell>
          <table:table-cell table:style-name="ce4" table:content-validation-name="val1" table:formula="of:=[.B4]+1" office:value-type="float" office:value="1003" calcext:value-type="float">
            <text:p>1003</text:p>
          </table:table-cell>
          <table:table-cell table:style-name="ce21" office:value-type="string" calcext:value-type="string">
            <text:p>Orbit</text:p>
          </table:table-cell>
          <table:table-cell table:style-name="ce21" office:value-type="string" calcext:value-type="string">
            <text:p>Órbita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spherical</text:p>
          </table:table-cell>
          <table:table-cell table:style-name="ce4" table:content-validation-name="val1" table:formula="of:=[.B5]+1" office:value-type="float" office:value="1004" calcext:value-type="float">
            <text:p>1004</text:p>
          </table:table-cell>
          <table:table-cell table:style-name="ce21" office:value-type="string" calcext:value-type="string">
            <text:p>Spherical</text:p>
          </table:table-cell>
          <table:table-cell table:style-name="ce21" office:value-type="string" calcext:value-type="string">
            <text:p>Esférico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fusion</text:p>
          </table:table-cell>
          <table:table-cell table:style-name="ce4" table:content-validation-name="val1" table:formula="of:=[.B6]+1" office:value-type="float" office:value="1005" calcext:value-type="float">
            <text:p>1005</text:p>
          </table:table-cell>
          <table:table-cell table:style-name="ce21" office:value-type="string" calcext:value-type="string">
            <text:p>Fusion</text:p>
          </table:table-cell>
          <table:table-cell table:style-name="ce21" office:value-type="string" calcext:value-type="string">
            <text:p>Fusión</text:p>
          </table:table-cell>
          <table:table-cell table:number-columns-repeated="16380"/>
        </table:table-row>
        <table:table-row table:style-name="ro1" table:visibility="collapse" table:number-rows-repeated="1047575">
          <table:table-cell table:number-columns-repeated="16384"/>
        </table:table-row>
        <table:table-row table:style-name="ro2" table:number-rows-repeated="99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at_attr_class.A1:cat_attr_class.B1">
            <calcext:condition calcext:apply-style-name="ConditionalStyle_1" calcext:value="formula-is(VLOOKUP([.A1];[$Cat_Validation.$A$2:.$C$9];3;0)&lt;&gt;VLOOKUP([.A1];[$Cat_Validation.$A$2:.$C$9];2;0))" calcext:base-cell-address="cat_attr_class.A1"/>
          </calcext:conditional-format>
        </calcext:conditional-formats>
      </table:table>
      <table:table table:name="cat_attribute" table:style-name="ta10">
        <table:table-column table:style-name="co15" table:default-cell-style-name="ce22"/>
        <table:table-column table:style-name="co21" table:default-cell-style-name="ce22"/>
        <table:table-column table:style-name="co22" table:default-cell-style-name="ce22"/>
        <table:table-column table:style-name="co9" table:number-columns-repeated="3" table:default-cell-style-name="ce22"/>
        <table:table-column table:style-name="co10" table:default-cell-style-name="ce19"/>
        <table:table-column table:style-name="co23" table:default-cell-style-name="ce12"/>
        <table:table-column table:style-name="co24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20" table:default-cell-style-name="ce12"/>
        <table:table-column table:style-name="co3" table:number-columns-repeated="2" table:default-cell-style-name="Default"/>
        <table:table-column table:style-name="co3" table:number-columns-repeated="16367" table:default-cell-style-name="ce22"/>
        <table:table-column table:style-name="co30" table:number-columns-repeated="2" table:default-cell-style-name="ce22"/>
        <table:table-row table:style-name="ro1">
          <table:table-cell table:style-name="ce46" office:value-type="string" calcext:value-type="string">
            <text:p>attribute_label_en</text:p>
          </table:table-cell>
          <table:table-cell table:style-name="ce46" office:value-type="string" calcext:value-type="string">
            <text:p>attribute_id</text:p>
          </table:table-cell>
          <table:table-cell table:style-name="ce33" office:value-type="string" calcext:value-type="string">
            <text:p>attribute_label_es</text:p>
          </table:table-cell>
          <table:table-cell table:style-name="ce18" office:value-type="string" calcext:value-type="string">
            <text:p>attribute_context_class_id</text:p>
          </table:table-cell>
          <table:table-cell table:style-name="ce33" office:value-type="string" calcext:value-type="string">
            <text:p>attribute_context_class_code</text:p>
          </table:table-cell>
          <table:table-cell table:style-name="ce33" office:value-type="string" calcext:value-type="string">
            <text:p>attribute_attr_class_id</text:p>
          </table:table-cell>
          <table:table-cell table:style-name="ce33" office:value-type="string" calcext:value-type="string">
            <text:p>attribute_attr_class_code</text:p>
          </table:table-cell>
          <table:table-cell table:style-name="ce33" office:value-type="string" calcext:value-type="string">
            <text:p>attribute_title_en</text:p>
          </table:table-cell>
          <table:table-cell table:style-name="ce33" office:value-type="string" calcext:value-type="string">
            <text:p>attribute_title_es</text:p>
          </table:table-cell>
          <table:table-cell table:style-name="ce33" office:value-type="string" calcext:value-type="string">
            <text:p>attribute_formula</text:p>
          </table:table-cell>
          <table:table-cell table:style-name="ce33" office:value-type="string" calcext:value-type="string">
            <text:p>attribute_explanation_en</text:p>
          </table:table-cell>
          <table:table-cell table:style-name="ce33" office:value-type="string" calcext:value-type="string">
            <text:p>attribute_explanation_es</text:p>
          </table:table-cell>
          <table:table-cell table:style-name="ce33" office:value-type="string" calcext:value-type="string">
            <text:p>attribute_reference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Near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Cerca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2];[$cat_attr_class.$A$2:.$B$7];2;0)" office:value-type="float" office:value="1001" calcext:value-type="float">
            <text:p>1001</text:p>
          </table:table-cell>
          <table:table-cell table:style-name="ce9" table:content-validation-name="val4" office:value-type="string" calcext:value-type="string">
            <text:p>distance</text:p>
          </table:table-cell>
          <table:table-cell table:style-name="ce21" office:value-type="string" calcext:value-type="string">
            <text:p>Near</text:p>
          </table:table-cell>
          <table:table-cell table:style-name="ce21" office:value-type="string" calcext:value-type="string">
            <text:p>Cerca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The object is near the Sun, that is, inside the asteroid belt.</text:p>
          </table:table-cell>
          <table:table-cell table:style-name="ce11" office:value-type="string" calcext:value-type="string">
            <text:p>El objeto está cerca del Sol, es decir, dentro del cinturón de asteroides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Far</text:p>
          </table:table-cell>
          <table:table-cell table:style-name="ce4" table:content-validation-name="val1" table:formula="of:=[.B2]+1" office:value-type="float" office:value="2" calcext:value-type="float">
            <text:p>2</text:p>
          </table:table-cell>
          <table:table-cell table:style-name="ce21" office:value-type="string" calcext:value-type="string">
            <text:p>Lejo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3];[$cat_attr_class.$A$2:.$B$7];2;0)" office:value-type="float" office:value="1001" calcext:value-type="float">
            <text:p>1001</text:p>
          </table:table-cell>
          <table:table-cell table:style-name="ce9" table:content-validation-name="val4" office:value-type="string" calcext:value-type="string">
            <text:p>distance</text:p>
          </table:table-cell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Lejos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is far from the Sun, that is, outside the asteroid belt.</text:p>
          </table:table-cell>
          <table:table-cell office:value-type="string" calcext:value-type="string">
            <text:p>El objeto está lejos del Sol, es decir, fuera del cinturón de asteroides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Small</text:p>
          </table:table-cell>
          <table:table-cell table:style-name="ce4" table:content-validation-name="val1" table:formula="of:=[.B3]+1" office:value-type="float" office:value="3" calcext:value-type="float">
            <text:p>3</text:p>
          </table:table-cell>
          <table:table-cell table:style-name="ce21" office:value-type="string" calcext:value-type="string">
            <text:p>Chico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4];[$cat_attr_class.$A$2:.$B$7];2;0)" office:value-type="float" office:value="1000" calcext:value-type="float">
            <text:p>1000</text:p>
          </table:table-cell>
          <table:table-cell table:style-name="ce9" table:content-validation-name="val4" office:value-type="string" calcext:value-type="string">
            <text:p>size</text:p>
          </table:table-cell>
          <table:table-cell table:style-name="ce21" office:value-type="string" calcext:value-type="string">
            <text:p>Small</text:p>
          </table:table-cell>
          <table:table-cell table:style-name="ce21" office:value-type="string" calcext:value-type="string">
            <text:p>Chico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is small in size.</text:p>
          </table:table-cell>
          <table:table-cell office:value-type="string" calcext:value-type="string">
            <text:p>El objeto es de tamaño pequeño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Medium</text:p>
          </table:table-cell>
          <table:table-cell table:style-name="ce4" table:content-validation-name="val1" table:formula="of:=[.B4]+1" office:value-type="float" office:value="4" calcext:value-type="float">
            <text:p>4</text:p>
          </table:table-cell>
          <table:table-cell table:style-name="ce21" office:value-type="string" calcext:value-type="string">
            <text:p>Mediano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5];[$cat_attr_class.$A$2:.$B$7];2;0)" office:value-type="float" office:value="1000" calcext:value-type="float">
            <text:p>1000</text:p>
          </table:table-cell>
          <table:table-cell table:style-name="ce9" table:content-validation-name="val4" office:value-type="string" calcext:value-type="string">
            <text:p>size</text:p>
          </table:table-cell>
          <table:table-cell table:style-name="ce21" office:value-type="string" calcext:value-type="string">
            <text:p>Medium</text:p>
          </table:table-cell>
          <table:table-cell table:style-name="ce21" office:value-type="string" calcext:value-type="string">
            <text:p>Mediano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has a medium size.</text:p>
          </table:table-cell>
          <table:table-cell office:value-type="string" calcext:value-type="string">
            <text:p>El objeto tiene un tamaño mediano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Big</text:p>
          </table:table-cell>
          <table:table-cell table:style-name="ce4" table:content-validation-name="val1" table:formula="of:=[.B5]+1" office:value-type="float" office:value="5" calcext:value-type="float">
            <text:p>5</text:p>
          </table:table-cell>
          <table:table-cell table:style-name="ce21" office:value-type="string" calcext:value-type="string">
            <text:p>Grande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6];[$cat_attr_class.$A$2:.$B$7];2;0)" office:value-type="float" office:value="1000" calcext:value-type="float">
            <text:p>1000</text:p>
          </table:table-cell>
          <table:table-cell table:style-name="ce9" table:content-validation-name="val4" office:value-type="string" calcext:value-type="string">
            <text:p>size</text:p>
          </table:table-cell>
          <table:table-cell table:style-name="ce21" office:value-type="string" calcext:value-type="string">
            <text:p>Big</text:p>
          </table:table-cell>
          <table:table-cell table:style-name="ce21" office:value-type="string" calcext:value-type="string">
            <text:p>Grande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is big in size.</text:p>
          </table:table-cell>
          <table:table-cell office:value-type="string" calcext:value-type="string">
            <text:p>El objeto es de tamaño grande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Has satellites</text:p>
          </table:table-cell>
          <table:table-cell table:style-name="ce4" table:content-validation-name="val1" table:formula="of:=[.B6]+1" office:value-type="float" office:value="6" calcext:value-type="float">
            <text:p>6</text:p>
          </table:table-cell>
          <table:table-cell table:style-name="ce21" office:value-type="string" calcext:value-type="string">
            <text:p>Satelites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7];[$cat_attr_class.$A$2:.$B$7];2;0)" office:value-type="float" office:value="1002" calcext:value-type="float">
            <text:p>1002</text:p>
          </table:table-cell>
          <table:table-cell table:style-name="ce9" table:content-validation-name="val4" office:value-type="string" calcext:value-type="string">
            <text:p>satellites</text:p>
          </table:table-cell>
          <table:table-cell table:style-name="ce21" office:value-type="string" calcext:value-type="string">
            <text:p>Has satellites</text:p>
          </table:table-cell>
          <table:table-cell table:style-name="ce21" office:value-type="string" calcext:value-type="string">
            <text:p>Sí tiene satélites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has satellites.</text:p>
          </table:table-cell>
          <table:table-cell office:value-type="string" calcext:value-type="string">
            <text:p>El objeto tiene satélites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Around the sun</text:p>
          </table:table-cell>
          <table:table-cell table:style-name="ce4" table:content-validation-name="val1" table:formula="of:=[.B7]+1" office:value-type="float" office:value="7" calcext:value-type="float">
            <text:p>7</text:p>
          </table:table-cell>
          <table:table-cell table:style-name="ce21" office:value-type="string" calcext:value-type="string">
            <text:p>Alrededor del Sol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8];[$cat_attr_class.$A$2:.$B$7];2;0)" office:value-type="float" office:value="1003" calcext:value-type="float">
            <text:p>1003</text:p>
          </table:table-cell>
          <table:table-cell table:style-name="ce9" table:content-validation-name="val4" office:value-type="string" calcext:value-type="string">
            <text:p>orbit</text:p>
          </table:table-cell>
          <table:table-cell table:style-name="ce21" office:value-type="string" calcext:value-type="string">
            <text:p>Around the Sun</text:p>
          </table:table-cell>
          <table:table-cell table:style-name="ce21" office:value-type="string" calcext:value-type="string">
            <text:p>Alrededor del Sol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orbits around the sun.</text:p>
          </table:table-cell>
          <table:table-cell office:value-type="string" calcext:value-type="string">
            <text:p>El objeto orbita alrededor del Sol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Around a star</text:p>
          </table:table-cell>
          <table:table-cell table:style-name="ce4" table:content-validation-name="val1" table:formula="of:=[.B8]+1" office:value-type="float" office:value="8" calcext:value-type="float">
            <text:p>8</text:p>
          </table:table-cell>
          <table:table-cell table:style-name="ce21" office:value-type="string" calcext:value-type="string">
            <text:p>Alrededor de una estrella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9];[$cat_attr_class.$A$2:.$B$7];2;0)" office:value-type="float" office:value="1003" calcext:value-type="float">
            <text:p>1003</text:p>
          </table:table-cell>
          <table:table-cell table:style-name="ce9" table:content-validation-name="val4" office:value-type="string" calcext:value-type="string">
            <text:p>orbit</text:p>
          </table:table-cell>
          <table:table-cell table:style-name="ce21" office:value-type="string" calcext:value-type="string">
            <text:p>Around a star</text:p>
          </table:table-cell>
          <table:table-cell table:style-name="ce21" office:value-type="string" calcext:value-type="string">
            <text:p>Alrededor de una estrella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orbits around another star</text:p>
          </table:table-cell>
          <table:table-cell office:value-type="string" calcext:value-type="string">
            <text:p>El objeto orbita alrededor de otra estrella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Fusion</text:p>
          </table:table-cell>
          <table:table-cell table:style-name="ce4" table:content-validation-name="val1" table:formula="of:=[.B9]+1" office:value-type="float" office:value="9" calcext:value-type="float">
            <text:p>9</text:p>
          </table:table-cell>
          <table:table-cell table:style-name="ce21" office:value-type="string" calcext:value-type="string">
            <text:p>Fusion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10];[$cat_attr_class.$A$2:.$B$7];2;0)" office:value-type="float" office:value="1005" calcext:value-type="float">
            <text:p>1005</text:p>
          </table:table-cell>
          <table:table-cell table:style-name="ce9" table:content-validation-name="val4" office:value-type="string" calcext:value-type="string">
            <text:p>fusion</text:p>
          </table:table-cell>
          <table:table-cell table:style-name="ce21" office:value-type="string" calcext:value-type="string">
            <text:p>Fusion</text:p>
          </table:table-cell>
          <table:table-cell table:style-name="ce21" office:value-type="string" calcext:value-type="string">
            <text:p>Fusión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is massive enough to produce themonuclear fusion.</text:p>
          </table:table-cell>
          <table:table-cell office:value-type="string" calcext:value-type="string">
            <text:p>El objeto es lo suficientemente masivo como para producir la fusión nuclear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Spherical</text:p>
          </table:table-cell>
          <table:table-cell table:style-name="ce4" table:content-validation-name="val1" table:formula="of:=[.B10]+1" office:value-type="float" office:value="10" calcext:value-type="float">
            <text:p>10</text:p>
          </table:table-cell>
          <table:table-cell table:style-name="ce21" office:value-type="string" calcext:value-type="string">
            <text:p>Esferico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11];[$cat_attr_class.$A$2:.$B$7];2;0)" office:value-type="float" office:value="1004" calcext:value-type="float">
            <text:p>1004</text:p>
          </table:table-cell>
          <table:table-cell table:style-name="ce9" table:content-validation-name="val4" office:value-type="string" calcext:value-type="string">
            <text:p>spherical</text:p>
          </table:table-cell>
          <table:table-cell table:style-name="ce21" office:value-type="string" calcext:value-type="string">
            <text:p>Spherical</text:p>
          </table:table-cell>
          <table:table-cell table:style-name="ce21" office:value-type="string" calcext:value-type="string">
            <text:p>Esférico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is massive enough to be rounded by its own gravity.</text:p>
          </table:table-cell>
          <table:table-cell office:value-type="string" calcext:value-type="string">
            <text:p>El objeto es lo suficientemente masivo como para ser redondeado por su propia gravedad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Clean</text:p>
          </table:table-cell>
          <table:table-cell table:style-name="ce4" table:content-validation-name="val1" table:formula="of:=[.B11]+1" office:value-type="float" office:value="11" calcext:value-type="float">
            <text:p>11</text:p>
          </table:table-cell>
          <table:table-cell table:style-name="ce21" office:value-type="string" calcext:value-type="string">
            <text:p>Limpia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1" office:value-type="string" calcext:value-type="string">
            <text:p>Additive</text:p>
          </table:table-cell>
          <table:table-cell table:style-name="ce34" table:content-validation-name="val2" table:formula="of:=VLOOKUP([.G12];[$cat_attr_class.$A$2:.$B$7];2;0)" office:value-type="float" office:value="1003" calcext:value-type="float">
            <text:p>1003</text:p>
          </table:table-cell>
          <table:table-cell table:style-name="ce9" table:content-validation-name="val4" office:value-type="string" calcext:value-type="string">
            <text:p>orbit</text:p>
          </table:table-cell>
          <table:table-cell table:style-name="ce21" office:value-type="string" calcext:value-type="string">
            <text:p>Clean orbit</text:p>
          </table:table-cell>
          <table:table-cell table:style-name="ce21" office:value-type="string" calcext:value-type="string">
            <text:p>Órbita limpia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The object has cleaned its orbit from solid objects thought to exist in protoplanetary disks and debris disks, called planetisimals.</text:p>
          </table:table-cell>
          <table:table-cell office:value-type="string" calcext:value-type="string">
            <text:p>El objeto ha limpiado su órbita de objetos sólidos que se cree que existen en discos protoplanetarios y discos de escombros, llamados planetesimales.</text:p>
          </table:table-cell>
          <table:table-cell table:style-name="ce11" office:value-type="string" calcext:value-type="string">
            <text:p>y</text:p>
          </table:table-cell>
          <table:table-cell table:number-columns-repeated="16371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at_attribute.A1:cat_attribute.B1">
            <calcext:condition calcext:apply-style-name="ConditionalStyle_1" calcext:value="formula-is(VLOOKUP([.A1];[$Cat_Validation.$A$2:.$C$9];3;0)&lt;&gt;VLOOKUP([.A1];[$Cat_Validation.$A$2:.$C$9];2;0))" calcext:base-cell-address="cat_attribute.A1"/>
          </calcext:conditional-format>
        </calcext:conditional-formats>
      </table:table>
      <table:table table:name="cat_other" table:style-name="ta7">
        <table:table-column table:style-name="co25" table:default-cell-style-name="ce22"/>
        <table:table-column table:style-name="co3" table:number-columns-repeated="16383" table:default-cell-style-name="ce22"/>
        <table:table-row table:style-name="ro1">
          <table:table-cell table:style-name="ce33" office:value-type="string" calcext:value-type="string">
            <text:p>context_values</text:p>
          </table:table-cell>
          <table:table-cell table:number-columns-repeated="16383"/>
        </table:table-row>
        <table:table-row table:style-name="ro1">
          <table:table-cell table:style-name="ce21" office:value-type="string" calcext:value-type="string">
            <text:p>Pending</text:p>
          </table:table-cell>
          <table:table-cell table:number-columns-repeated="1638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16383"/>
        </table:table-row>
        <table:table-row table:style-name="ro1" table:number-rows-repeated="997">
          <table:table-cell table:style-name="ce34"/>
          <table:table-cell table:number-columns-repeated="16383"/>
        </table:table-row>
        <table:table-row table:style-name="ro1" table:visibility="collapse" table:number-rows-repeated="1047574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table table:name="Cat_Validation" table:style-name="ta8">
        <table:table-column table:style-name="co13" table:default-cell-style-name="ce22"/>
        <table:table-column table:style-name="co26" table:default-cell-style-name="ce22"/>
        <table:table-column table:style-name="co13" table:default-cell-style-name="ce22"/>
        <table:table-column table:style-name="co3" table:number-columns-repeated="16381" table:default-cell-style-name="ce22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Non-emp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_code</text:p>
          </table:table-cell>
          <table:table-cell table:number-matrix-columns-spanned="1" table:number-matrix-rows-spanned="1" table:formula="of:=SUM(IF(ISBLANK([$cat_object.A$2:.A$14]);&quot;&quot;;1/COUNTIF([$cat_object.A$2:.A$14];[$cat_object.A$2:.A$14])))" office:value-type="float" office:value="13" calcext:value-type="float">
            <text:p>13</text:p>
          </table:table-cell>
          <table:table-cell table:formula="of:=COUNTIF([$cat_object.A$2:.A$14];&quot;&lt;&gt;&quot;)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_id</text:p>
          </table:table-cell>
          <table:table-cell table:number-matrix-columns-spanned="1" table:number-matrix-rows-spanned="1" table:formula="of:=SUM(IF(ISBLANK([$cat_object.B$2:.B$14]);&quot;&quot;;1/COUNTIF([$cat_object.B$2:.B$14];[$cat_object.B$2:.B$14])))" office:value-type="float" office:value="13" calcext:value-type="float">
            <text:p>13</text:p>
          </table:table-cell>
          <table:table-cell table:formula="of:=COUNTIF([$cat_object.B$2:.B$14];&quot;&lt;&gt;&quot;)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ribute_label_en</text:p>
          </table:table-cell>
          <table:table-cell table:number-matrix-columns-spanned="1" table:number-matrix-rows-spanned="1" table:formula="of:=SUM(IF(ISBLANK([$cat_attribute.A$2:.A$12]);&quot;&quot;;1/COUNTIF([$cat_attribute.A$2:.A$12];[$cat_attribute.A$2:.A$12])))" office:value-type="float" office:value="11" calcext:value-type="float">
            <text:p>11</text:p>
          </table:table-cell>
          <table:table-cell table:formula="of:=COUNTIF([$cat_attribute.A$2:.A$12];&quot;&lt;&gt;&quot;)"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ribute_id</text:p>
          </table:table-cell>
          <table:table-cell table:number-matrix-columns-spanned="1" table:number-matrix-rows-spanned="1" table:formula="of:=SUM(IF(ISBLANK([$cat_attribute.B$2:.B$12]);&quot;&quot;;1/COUNTIF([$cat_attribute.B$2:.B$12];[$cat_attribute.B$2:.B$12])))" office:value-type="float" office:value="11" calcext:value-type="float">
            <text:p>11</text:p>
          </table:table-cell>
          <table:table-cell table:formula="of:=COUNTIF([$cat_attribute.B$2:.B$12];&quot;&lt;&gt;&quot;)"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r_class_code</text:p>
          </table:table-cell>
          <table:table-cell table:number-matrix-columns-spanned="1" table:number-matrix-rows-spanned="1" table:formula="of:=SUM(IF(ISBLANK([$cat_attr_class.A$2:.A$7]);&quot;&quot;;1/COUNTIF([$cat_attr_class.A$2:.A$7];[$cat_attr_class.A$2:.A$7])))" office:value-type="float" office:value="6" calcext:value-type="float">
            <text:p>6</text:p>
          </table:table-cell>
          <table:table-cell table:formula="of:=COUNTIF([$cat_attr_class.A$2:.A$7];&quot;&lt;&gt;&quot;)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r_class_id</text:p>
          </table:table-cell>
          <table:table-cell table:number-matrix-columns-spanned="1" table:number-matrix-rows-spanned="1" table:formula="of:=SUM(IF(ISBLANK([$cat_attr_class.B$2:.B$7]);&quot;&quot;;1/COUNTIF([$cat_attr_class.B$2:.B$7];[$cat_attr_class.B$2:.B$7])))" office:value-type="float" office:value="6" calcext:value-type="float">
            <text:p>6</text:p>
          </table:table-cell>
          <table:table-cell table:formula="of:=COUNTIF([$cat_attr_class.B$2:.B$7];&quot;&lt;&gt;&quot;)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ext_code</text:p>
          </table:table-cell>
          <table:table-cell table:number-matrix-columns-spanned="1" table:number-matrix-rows-spanned="1" table:formula="of:=SUM(IF(ISBLANK([$cat_context.A$2:.A$1000]);&quot;&quot;;1/COUNTIF([$cat_context.A$2:.A$1000];[$cat_context.A$2:.A$1000])))" office:value-type="float" office:value="2" calcext:value-type="float">
            <text:p>2</text:p>
          </table:table-cell>
          <table:table-cell table:formula="of:=COUNTIF([$cat_context.A$2:.A$1000];&quot;&lt;&gt;&quot;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ext_id</text:p>
          </table:table-cell>
          <table:table-cell table:number-matrix-columns-spanned="1" table:number-matrix-rows-spanned="1" table:formula="of:=SUM(IF(ISBLANK([$cat_context.B$2:.B$1000]);&quot;&quot;;1/COUNTIF([$cat_context.B$2:.B$1000];[$cat_context.B$2:.B$1000])))" office:value-type="float" office:value="999" calcext:value-type="float">
            <text:p>999</text:p>
          </table:table-cell>
          <table:table-cell table:formula="of:=COUNTIF([$cat_context.B$2:.B$1000];&quot;&lt;&gt;&quot;)" office:value-type="float" office:value="999" calcext:value-type="float">
            <text:p>999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ext_SolarSystem" table:style-name="ta11">
        <table:table-column table:style-name="co26" table:default-cell-style-name="ce22"/>
        <table:table-column table:style-name="co31" table:default-cell-style-name="ce22"/>
        <table:table-column table:style-name="co32" table:default-cell-style-name="ce22"/>
        <table:table-column table:style-name="co31" table:default-cell-style-name="ce34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5" table:number-columns-repeated="2" table:default-cell-style-name="ce22"/>
        <table:table-column table:style-name="co37" table:default-cell-style-name="ce22"/>
        <table:table-column table:style-name="co25" table:number-columns-repeated="6" table:default-cell-style-name="ce22"/>
        <table:table-column table:style-name="co3" table:number-columns-repeated="16367" table:default-cell-style-name="ce22"/>
        <table:table-row table:style-name="ro2">
          <table:table-cell table:style-name="ce20" office:value-type="string" calcext:value-type="string">
            <text:p>Context:</text:p>
          </table:table-cell>
          <table:table-cell table:formula="of:=VLOOKUP([.$C$1];[$cat_context.$A$2:.$B$1000];2;0)" office:value-type="float" office:value="1" calcext:value-type="float">
            <text:p>1</text:p>
          </table:table-cell>
          <table:table-cell table:style-name="ce50" table:content-validation-name="val5" office:value-type="string" calcext:value-type="string">
            <text:p>SS</text:p>
          </table:table-cell>
          <table:table-cell table:number-columns-repeated="16381"/>
        </table:table-row>
        <table:table-row table:style-name="ro2">
          <table:table-cell table:number-columns-repeated="9"/>
          <table:table-cell table:style-name="ce55" office:value-type="string" calcext:value-type="string" table:number-columns-spanned="1" table:number-rows-spanned="9">
            <text:p>Attributes</text:p>
          </table:table-cell>
          <table:table-cell table:style-name="ce27" office:value-type="string" calcext:value-type="string">
            <text:p>id</text:p>
          </table:table-cell>
          <table:table-cell table:style-name="ce30" table:formula="of:=VLOOKUP([.L$11];[$cat_attribute.$A$2:.$M$12];2;0)" office:value-type="float" office:value="1" calcext:value-type="float">
            <text:p>1</text:p>
          </table:table-cell>
          <table:table-cell table:style-name="ce30" table:formula="of:=VLOOKUP([.M$11];[$cat_attribute.$A$2:.$M$12];2;0)" office:value-type="float" office:value="2" calcext:value-type="float">
            <text:p>2</text:p>
          </table:table-cell>
          <table:table-cell table:style-name="ce30" table:formula="of:=VLOOKUP([.N$11];[$cat_attribute.$A$2:.$M$12];2;0)" office:value-type="float" office:value="3" calcext:value-type="float">
            <text:p>3</text:p>
          </table:table-cell>
          <table:table-cell table:style-name="ce30" table:formula="of:=VLOOKUP([.O$11];[$cat_attribute.$A$2:.$M$12];2;0)" office:value-type="float" office:value="4" calcext:value-type="float">
            <text:p>4</text:p>
          </table:table-cell>
          <table:table-cell table:style-name="ce30" table:formula="of:=VLOOKUP([.P$11];[$cat_attribute.$A$2:.$M$12];2;0)" office:value-type="float" office:value="5" calcext:value-type="float">
            <text:p>5</text:p>
          </table:table-cell>
          <table:table-cell table:style-name="ce30" table:formula="of:=VLOOKUP([.Q$11];[$cat_attribute.$A$2:.$M$12];2;0)" office:value-type="float" office:value="6" calcext:value-type="float">
            <text:p>6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reference</text:p>
          </table:table-cell>
          <table:table-cell table:style-name="ce12" table:formula="of:=VLOOKUP([.L$11];[$cat_attribute.$A$2:.$M$12];13;0)" office:value-type="string" office:string-value="y" calcext:value-type="string">
            <text:p>y</text:p>
          </table:table-cell>
          <table:table-cell table:style-name="ce12" table:formula="of:=VLOOKUP([.M$11];[$cat_attribute.$A$2:.$M$12];13;0)" office:value-type="string" office:string-value="y" calcext:value-type="string">
            <text:p>y</text:p>
          </table:table-cell>
          <table:table-cell table:style-name="ce12" table:formula="of:=VLOOKUP([.N$11];[$cat_attribute.$A$2:.$M$12];13;0)" office:value-type="string" office:string-value="y" calcext:value-type="string">
            <text:p>y</text:p>
          </table:table-cell>
          <table:table-cell table:style-name="ce12" table:formula="of:=VLOOKUP([.O$11];[$cat_attribute.$A$2:.$M$12];13;0)" office:value-type="string" office:string-value="y" calcext:value-type="string">
            <text:p>y</text:p>
          </table:table-cell>
          <table:table-cell table:style-name="ce12" table:formula="of:=VLOOKUP([.P$11];[$cat_attribute.$A$2:.$M$12];13;0)" office:value-type="string" office:string-value="y" calcext:value-type="string">
            <text:p>y</text:p>
          </table:table-cell>
          <table:table-cell table:style-name="ce12" table:formula="of:=VLOOKUP([.Q$11];[$cat_attribute.$A$2:.$M$12];13;0)" office:value-type="string" office:string-value="y" calcext:value-type="string">
            <text:p>y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explanation_es</text:p>
          </table:table-cell>
          <table:table-cell table:style-name="ce12" table:formula="of:=VLOOKUP([.L$11];[$cat_attribute.$A$2:.$M$12];12;0)" office:value-type="string" office:string-value="El objeto está cerca del Sol, es decir, dentro del cinturón de asteroides." calcext:value-type="string">
            <text:p>El objeto está cerca del Sol, es decir, dentro del cinturón de asteroides.</text:p>
          </table:table-cell>
          <table:table-cell table:style-name="ce12" table:formula="of:=VLOOKUP([.M$11];[$cat_attribute.$A$2:.$M$12];12;0)" office:value-type="string" office:string-value="El objeto está lejos del Sol, es decir, fuera del cinturón de asteroides." calcext:value-type="string">
            <text:p>El objeto está lejos del Sol, es decir, fuera del cinturón de asteroides.</text:p>
          </table:table-cell>
          <table:table-cell table:style-name="ce12" table:formula="of:=VLOOKUP([.N$11];[$cat_attribute.$A$2:.$M$12];12;0)" office:value-type="string" office:string-value="El objeto es de tamaño pequeño." calcext:value-type="string">
            <text:p>El objeto es de tamaño pequeño.</text:p>
          </table:table-cell>
          <table:table-cell table:style-name="ce12" table:formula="of:=VLOOKUP([.O$11];[$cat_attribute.$A$2:.$M$12];12;0)" office:value-type="string" office:string-value="El objeto tiene un tamaño mediano." calcext:value-type="string">
            <text:p>El objeto tiene un tamaño mediano.</text:p>
          </table:table-cell>
          <table:table-cell table:style-name="ce12" table:formula="of:=VLOOKUP([.P$11];[$cat_attribute.$A$2:.$M$12];12;0)" office:value-type="string" office:string-value="El objeto es de tamaño grande." calcext:value-type="string">
            <text:p>El objeto es de tamaño grande.</text:p>
          </table:table-cell>
          <table:table-cell table:style-name="ce12" table:formula="of:=VLOOKUP([.Q$11];[$cat_attribute.$A$2:.$M$12];12;0)" office:value-type="string" office:string-value="El objeto tiene satélites." calcext:value-type="string">
            <text:p>El objeto tiene satélites.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explanation_en</text:p>
          </table:table-cell>
          <table:table-cell table:style-name="ce12" table:formula="of:=VLOOKUP([.L$11];[$cat_attribute.$A$2:.$M$12];11;0)" office:value-type="string" office:string-value="The object is near the Sun, that is, inside the asteroid belt." calcext:value-type="string">
            <text:p>The object is near the Sun, that is, inside the asteroid belt.</text:p>
          </table:table-cell>
          <table:table-cell table:style-name="ce12" table:formula="of:=VLOOKUP([.M$11];[$cat_attribute.$A$2:.$M$12];11;0)" office:value-type="string" office:string-value="The object is far from the Sun, that is, outside the asteroid belt." calcext:value-type="string">
            <text:p>The object is far from the Sun, that is, outside the asteroid belt.</text:p>
          </table:table-cell>
          <table:table-cell table:style-name="ce12" table:formula="of:=VLOOKUP([.N$11];[$cat_attribute.$A$2:.$M$12];11;0)" office:value-type="string" office:string-value="The object is small in size." calcext:value-type="string">
            <text:p>The object is small in size.</text:p>
          </table:table-cell>
          <table:table-cell table:style-name="ce12" table:formula="of:=VLOOKUP([.O$11];[$cat_attribute.$A$2:.$M$12];11;0)" office:value-type="string" office:string-value="The object has a medium size." calcext:value-type="string">
            <text:p>The object has a medium size.</text:p>
          </table:table-cell>
          <table:table-cell table:style-name="ce12" table:formula="of:=VLOOKUP([.P$11];[$cat_attribute.$A$2:.$M$12];11;0)" office:value-type="string" office:string-value="The object is big in size." calcext:value-type="string">
            <text:p>The object is big in size.</text:p>
          </table:table-cell>
          <table:table-cell table:style-name="ce12" table:formula="of:=VLOOKUP([.Q$11];[$cat_attribute.$A$2:.$M$12];11;0)" office:value-type="string" office:string-value="The object has satellites." calcext:value-type="string">
            <text:p>The object has satellites.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formula</text:p>
          </table:table-cell>
          <table:table-cell table:style-name="ce12" table:formula="of:=VLOOKUP([.L$11];[$cat_attribute.$A$2:.$M$12];10;0)" office:value-type="string" office:string-value="x" calcext:value-type="string">
            <text:p>x</text:p>
          </table:table-cell>
          <table:table-cell table:style-name="ce12" table:formula="of:=VLOOKUP([.M$11];[$cat_attribute.$A$2:.$M$12];10;0)" office:value-type="string" office:string-value="x" calcext:value-type="string">
            <text:p>x</text:p>
          </table:table-cell>
          <table:table-cell table:style-name="ce12" table:formula="of:=VLOOKUP([.N$11];[$cat_attribute.$A$2:.$M$12];10;0)" office:value-type="string" office:string-value="x" calcext:value-type="string">
            <text:p>x</text:p>
          </table:table-cell>
          <table:table-cell table:style-name="ce12" table:formula="of:=VLOOKUP([.O$11];[$cat_attribute.$A$2:.$M$12];10;0)" office:value-type="string" office:string-value="x" calcext:value-type="string">
            <text:p>x</text:p>
          </table:table-cell>
          <table:table-cell table:style-name="ce12" table:formula="of:=VLOOKUP([.P$11];[$cat_attribute.$A$2:.$M$12];10;0)" office:value-type="string" office:string-value="x" calcext:value-type="string">
            <text:p>x</text:p>
          </table:table-cell>
          <table:table-cell table:style-name="ce12" table:formula="of:=VLOOKUP([.Q$11];[$cat_attribute.$A$2:.$M$12];10;0)" office:value-type="string" office:string-value="x" calcext:value-type="string">
            <text:p>x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title_es</text:p>
          </table:table-cell>
          <table:table-cell table:style-name="ce12" table:formula="of:=VLOOKUP([.L$11];[$cat_attribute.$A$2:.$M$12];9;0)" office:value-type="string" office:string-value="Cerca" calcext:value-type="string">
            <text:p>Cerca</text:p>
          </table:table-cell>
          <table:table-cell table:style-name="ce12" table:formula="of:=VLOOKUP([.M$11];[$cat_attribute.$A$2:.$M$12];9;0)" office:value-type="string" office:string-value="Lejos" calcext:value-type="string">
            <text:p>Lejos</text:p>
          </table:table-cell>
          <table:table-cell table:style-name="ce12" table:formula="of:=VLOOKUP([.N$11];[$cat_attribute.$A$2:.$M$12];9;0)" office:value-type="string" office:string-value="Chico" calcext:value-type="string">
            <text:p>Chico</text:p>
          </table:table-cell>
          <table:table-cell table:style-name="ce12" table:formula="of:=VLOOKUP([.O$11];[$cat_attribute.$A$2:.$M$12];9;0)" office:value-type="string" office:string-value="Mediano" calcext:value-type="string">
            <text:p>Mediano</text:p>
          </table:table-cell>
          <table:table-cell table:style-name="ce12" table:formula="of:=VLOOKUP([.P$11];[$cat_attribute.$A$2:.$M$12];9;0)" office:value-type="string" office:string-value="Grande" calcext:value-type="string">
            <text:p>Grande</text:p>
          </table:table-cell>
          <table:table-cell table:style-name="ce12" table:formula="of:=VLOOKUP([.Q$11];[$cat_attribute.$A$2:.$M$12];9;0)" office:value-type="string" office:string-value="Sí tiene satélites" calcext:value-type="string">
            <text:p>Sí tiene satélites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title_en</text:p>
          </table:table-cell>
          <table:table-cell table:style-name="ce12" table:formula="of:=VLOOKUP([.L$11];[$cat_attribute.$A$2:.$M$12];8;0)" office:value-type="string" office:string-value="Near" calcext:value-type="string">
            <text:p>Near</text:p>
          </table:table-cell>
          <table:table-cell table:style-name="ce12" table:formula="of:=VLOOKUP([.M$11];[$cat_attribute.$A$2:.$M$12];8;0)" office:value-type="string" office:string-value="Far" calcext:value-type="string">
            <text:p>Far</text:p>
          </table:table-cell>
          <table:table-cell table:style-name="ce12" table:formula="of:=VLOOKUP([.N$11];[$cat_attribute.$A$2:.$M$12];8;0)" office:value-type="string" office:string-value="Small" calcext:value-type="string">
            <text:p>Small</text:p>
          </table:table-cell>
          <table:table-cell table:style-name="ce12" table:formula="of:=VLOOKUP([.O$11];[$cat_attribute.$A$2:.$M$12];8;0)" office:value-type="string" office:string-value="Medium" calcext:value-type="string">
            <text:p>Medium</text:p>
          </table:table-cell>
          <table:table-cell table:style-name="ce12" table:formula="of:=VLOOKUP([.P$11];[$cat_attribute.$A$2:.$M$12];8;0)" office:value-type="string" office:string-value="Big" calcext:value-type="string">
            <text:p>Big</text:p>
          </table:table-cell>
          <table:table-cell table:style-name="ce12" table:formula="of:=VLOOKUP([.Q$11];[$cat_attribute.$A$2:.$M$12];8;0)" office:value-type="string" office:string-value="Has satellites" calcext:value-type="string">
            <text:p>Has satellites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class_id</text:p>
          </table:table-cell>
          <table:table-cell table:style-name="ce34" table:formula="of:=VLOOKUP([.L$11];[$cat_attribute.$A$2:.$M$12];7;0)" office:value-type="string" office:string-value="distance" calcext:value-type="string">
            <text:p>distance</text:p>
          </table:table-cell>
          <table:table-cell table:style-name="ce34" table:formula="of:=VLOOKUP([.M$11];[$cat_attribute.$A$2:.$M$12];7;0)" office:value-type="string" office:string-value="distance" calcext:value-type="string">
            <text:p>distance</text:p>
          </table:table-cell>
          <table:table-cell table:style-name="ce34" table:formula="of:=VLOOKUP([.N$11];[$cat_attribute.$A$2:.$M$12];7;0)" office:value-type="string" office:string-value="size" calcext:value-type="string">
            <text:p>size</text:p>
          </table:table-cell>
          <table:table-cell table:style-name="ce34" table:formula="of:=VLOOKUP([.O$11];[$cat_attribute.$A$2:.$M$12];7;0)" office:value-type="string" office:string-value="size" calcext:value-type="string">
            <text:p>size</text:p>
          </table:table-cell>
          <table:table-cell table:style-name="ce34" table:formula="of:=VLOOKUP([.P$11];[$cat_attribute.$A$2:.$M$12];7;0)" office:value-type="string" office:string-value="size" calcext:value-type="string">
            <text:p>size</text:p>
          </table:table-cell>
          <table:table-cell table:style-name="ce34" table:formula="of:=VLOOKUP([.Q$11];[$cat_attribute.$A$2:.$M$12];7;0)" office:value-type="string" office:string-value="satellites" calcext:value-type="string">
            <text:p>satellit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51" office:value-type="string" calcext:value-type="string" table:number-columns-spanned="6" table:number-rows-spanned="1">
            <text:p>Objects</text:p>
          </table:table-cell>
          <table:covered-table-cell table:number-columns-repeated="5" table:style-name="ce51"/>
          <table:covered-table-cell table:style-name="ce55"/>
          <table:table-cell table:style-name="ce28" office:value-type="string" calcext:value-type="string">
            <text:p>label_es</text:p>
          </table:table-cell>
          <table:table-cell table:style-name="ce34" table:formula="of:=VLOOKUP([.L$11];[$cat_attribute.$A$2:.$M$12];3;0)" office:value-type="string" office:string-value="Cerca" calcext:value-type="string">
            <text:p>Cerca</text:p>
          </table:table-cell>
          <table:table-cell table:style-name="ce34" table:formula="of:=VLOOKUP([.M$11];[$cat_attribute.$A$2:.$M$12];3;0)" office:value-type="string" office:string-value="Lejos" calcext:value-type="string">
            <text:p>Lejos</text:p>
          </table:table-cell>
          <table:table-cell table:style-name="ce34" table:formula="of:=VLOOKUP([.N$11];[$cat_attribute.$A$2:.$M$12];3;0)" office:value-type="string" office:string-value="Chico" calcext:value-type="string">
            <text:p>Chico</text:p>
          </table:table-cell>
          <table:table-cell table:style-name="ce34" table:formula="of:=VLOOKUP([.O$11];[$cat_attribute.$A$2:.$M$12];3;0)" office:value-type="string" office:string-value="Mediano" calcext:value-type="string">
            <text:p>Mediano</text:p>
          </table:table-cell>
          <table:table-cell table:style-name="ce34" table:formula="of:=VLOOKUP([.P$11];[$cat_attribute.$A$2:.$M$12];3;0)" office:value-type="string" office:string-value="Grande" calcext:value-type="string">
            <text:p>Grande</text:p>
          </table:table-cell>
          <table:table-cell table:style-name="ce34" table:formula="of:=VLOOKUP([.Q$11];[$cat_attribute.$A$2:.$M$12];3;0)" office:value-type="string" office:string-value="Satelites" calcext:value-type="string">
            <text:p>Satelit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3" office:value-type="string" calcext:value-type="string">
            <text:p>id</text:p>
          </table:table-cell>
          <table:table-cell table:style-name="ce25" office:value-type="string" calcext:value-type="string">
            <text:p>reference</text:p>
          </table:table-cell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desc_es</text:p>
          </table:table-cell>
          <table:table-cell table:style-name="ce25" office:value-type="string" calcext:value-type="string">
            <text:p>desc_en</text:p>
          </table:table-cell>
          <table:table-cell table:style-name="ce25" office:value-type="string" calcext:value-type="string">
            <text:p>label_es</text:p>
          </table:table-cell>
          <table:table-cell table:style-name="ce25" office:value-type="string" calcext:value-type="string">
            <text:p>label_en</text:p>
          </table:table-cell>
          <table:table-cell table:style-name="ce29" office:value-type="string" calcext:value-type="string">
            <text:p>code <text:s text:c="12"/>label_en</text:p>
          </table:table-cell>
          <table:table-cell table:style-name="ce50" table:content-validation-name="val7" office:value-type="string" calcext:value-type="string">
            <text:p>Near</text:p>
          </table:table-cell>
          <table:table-cell table:style-name="ce50" table:content-validation-name="val7" office:value-type="string" calcext:value-type="string">
            <text:p>Far</text:p>
          </table:table-cell>
          <table:table-cell table:style-name="ce50" table:content-validation-name="val7" office:value-type="string" calcext:value-type="string">
            <text:p>Small</text:p>
          </table:table-cell>
          <table:table-cell table:style-name="ce50" table:content-validation-name="val7" office:value-type="string" calcext:value-type="string">
            <text:p>Medium</text:p>
          </table:table-cell>
          <table:table-cell table:style-name="ce50" table:content-validation-name="val7" office:value-type="string" calcext:value-type="string">
            <text:p>Big</text:p>
          </table:table-cell>
          <table:table-cell table:style-name="ce50" table:content-validation-name="val7" office:value-type="string" calcext:value-type="string">
            <text:p>Has satellit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2];[$cat_object.$A$2:.$J$14];2;0)" office:value-type="float" office:value="1" calcext:value-type="float">
            <text:p>1</text:p>
          </table:table-cell>
          <table:table-cell table:style-name="ce12" table:formula="of:=VLOOKUP([.$K12];[$cat_object.$A$2:.$J$14];9;0)" office:value-type="float" office:value="0" calcext:value-type="float">
            <text:p/>
          </table:table-cell>
          <table:table-cell table:style-name="ce12" table:formula="of:=VLOOKUP([.$K12];[$cat_object.$A$2:.$J$14];10;0)" office:value-type="float" office:value="0" calcext:value-type="float">
            <text:p/>
          </table:table-cell>
          <table:table-cell table:style-name="ce12" table:formula="of:=VLOOKUP([.$K12];[$cat_object.$A$2:.$J$14];8;0)" office:value-type="string" office:string-value="Pequeño, rocoso y el más cercano al Sol." calcext:value-type="string">
            <text:p>Pequeño, rocoso y el más cercano al Sol.</text:p>
          </table:table-cell>
          <table:table-cell table:style-name="ce12" table:formula="of:=VLOOKUP([.$K12];[$cat_object.$A$2:.$J$14];7;0)" office:value-type="string" office:string-value="Small, rocky, and closest to the Sun" calcext:value-type="string">
            <text:p>Small, rocky, and closest to the Sun</text:p>
          </table:table-cell>
          <table:table-cell table:style-name="ce34" table:formula="of:=VLOOKUP([.$K12];[$cat_object.$A$2:.$J$14];4;0)" office:value-type="string" office:string-value="Mercurio" calcext:value-type="string">
            <text:p>Mercurio</text:p>
          </table:table-cell>
          <table:table-cell table:style-name="ce34" table:formula="of:=VLOOKUP([.$K12];[$cat_object.$A$2:.$J$14];3;0)" office:value-type="string" office:string-value="Mercury" calcext:value-type="string">
            <text:p>Mercury</text:p>
          </table:table-cell>
          <table:table-cell table:style-name="ce50" table:content-validation-name="val6" office:value-type="string" calcext:value-type="string">
            <text:p>Mer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3"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3];[$cat_object.$A$2:.$J$14];2;0)" office:value-type="float" office:value="2" calcext:value-type="float">
            <text:p>2</text:p>
          </table:table-cell>
          <table:table-cell table:style-name="ce12" table:formula="of:=VLOOKUP([.$K13];[$cat_object.$A$2:.$J$14];9;0)" office:value-type="float" office:value="0" calcext:value-type="float">
            <text:p/>
          </table:table-cell>
          <table:table-cell table:style-name="ce12" table:formula="of:=VLOOKUP([.$K13];[$cat_object.$A$2:.$J$14];10;0)" office:value-type="float" office:value="0" calcext:value-type="float">
            <text:p/>
          </table:table-cell>
          <table:table-cell table:style-name="ce12" table:formula="of:=VLOOKUP([.$K13];[$cat_object.$A$2:.$J$14];8;0)" office:value-type="string" office:string-value="Caluroso, con nubes espesas y un efecto invernadero extremo." calcext:value-type="string">
            <text:p>Caluroso, con nubes espesas y un efecto invernadero extremo.</text:p>
          </table:table-cell>
          <table:table-cell table:style-name="ce12" table:formula="of:=VLOOKUP([.$K13];[$cat_object.$A$2:.$J$14];7;0)" office:value-type="string" office:string-value="Hot, with thick clouds and extreme greenhouse effect." calcext:value-type="string">
            <text:p>Hot, with thick clouds and extreme greenhouse effect.</text:p>
          </table:table-cell>
          <table:table-cell table:style-name="ce34" table:formula="of:=VLOOKUP([.$K13];[$cat_object.$A$2:.$J$14];4;0)" office:value-type="string" office:string-value="Venus" calcext:value-type="string">
            <text:p>Venus</text:p>
          </table:table-cell>
          <table:table-cell table:style-name="ce34" table:formula="of:=VLOOKUP([.$K13];[$cat_object.$A$2:.$J$14];3;0)" office:value-type="string" office:string-value="Venus" calcext:value-type="string">
            <text:p>Venus</text:p>
          </table:table-cell>
          <table:table-cell table:style-name="ce50" table:content-validation-name="val6" office:value-type="string" calcext:value-type="string">
            <text:p>Ven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3"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4];[$cat_object.$A$2:.$J$14];2;0)" office:value-type="float" office:value="3" calcext:value-type="float">
            <text:p>3</text:p>
          </table:table-cell>
          <table:table-cell table:style-name="ce12" table:formula="of:=VLOOKUP([.$K14];[$cat_object.$A$2:.$J$14];9;0)" office:value-type="string" office:string-value="De Revolutionibus Orbium Coelestium, Nicolás Copérnico" calcext:value-type="string">
            <text:p>De Revolutionibus Orbium Coelestium, Nicolás Copérnico</text:p>
          </table:table-cell>
          <table:table-cell table:style-name="ce12" table:formula="of:=VLOOKUP([.$K14];[$cat_object.$A$2:.$J$14];10;0)" office:value-type="float" office:value="1543" calcext:value-type="float">
            <text:p>1543</text:p>
          </table:table-cell>
          <table:table-cell table:style-name="ce12" table:formula="of:=VLOOKUP([.$K14];[$cat_object.$A$2:.$J$14];8;0)" office:value-type="string" office:string-value="El único planeta conocido que alberga vida, con océanos y tierra." calcext:value-type="string">
            <text:p>El único planeta conocido que alberga vida, con océanos y tierra.</text:p>
          </table:table-cell>
          <table:table-cell table:style-name="ce12" table:formula="of:=VLOOKUP([.$K14];[$cat_object.$A$2:.$J$14];7;0)" office:value-type="string" office:string-value="The only planet known to support life, with oceans and land." calcext:value-type="string">
            <text:p>The only planet known to support life, with oceans and land.</text:p>
          </table:table-cell>
          <table:table-cell table:style-name="ce34" table:formula="of:=VLOOKUP([.$K14];[$cat_object.$A$2:.$J$14];4;0)" office:value-type="string" office:string-value="Tierra" calcext:value-type="string">
            <text:p>Tierra</text:p>
          </table:table-cell>
          <table:table-cell table:style-name="ce34" table:formula="of:=VLOOKUP([.$K14];[$cat_object.$A$2:.$J$14];3;0)" office:value-type="string" office:string-value="Earth" calcext:value-type="string">
            <text:p>Earth</text:p>
          </table:table-cell>
          <table:table-cell table:style-name="ce50" table:content-validation-name="val6" office:value-type="string" calcext:value-type="string">
            <text:p>Earth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2"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5];[$cat_object.$A$2:.$J$14];2;0)" office:value-type="float" office:value="4" calcext:value-type="float">
            <text:p>4</text:p>
          </table:table-cell>
          <table:table-cell table:style-name="ce12" table:formula="of:=VLOOKUP([.$K15];[$cat_object.$A$2:.$J$14];9;0)" office:value-type="float" office:value="0" calcext:value-type="float">
            <text:p/>
          </table:table-cell>
          <table:table-cell table:style-name="ce12" table:formula="of:=VLOOKUP([.$K15];[$cat_object.$A$2:.$J$14];10;0)" office:value-type="float" office:value="0" calcext:value-type="float">
            <text:p/>
          </table:table-cell>
          <table:table-cell table:style-name="ce12" table:formula="of:=VLOOKUP([.$K15];[$cat_object.$A$2:.$J$14];8;0)" office:value-type="string" office:string-value="Rojo, polvoriento y potencialmente hogar de agua antigua." calcext:value-type="string">
            <text:p>Rojo, polvoriento y potencialmente hogar de agua antigua.</text:p>
          </table:table-cell>
          <table:table-cell table:style-name="ce12" table:formula="of:=VLOOKUP([.$K15];[$cat_object.$A$2:.$J$14];7;0)" office:value-type="string" office:string-value="Red, dusty, and potentially home to ancient water." calcext:value-type="string">
            <text:p>Red, dusty, and potentially home to ancient water.</text:p>
          </table:table-cell>
          <table:table-cell table:style-name="ce34" table:formula="of:=VLOOKUP([.$K15];[$cat_object.$A$2:.$J$14];4;0)" office:value-type="string" office:string-value="Marte" calcext:value-type="string">
            <text:p>Marte</text:p>
          </table:table-cell>
          <table:table-cell table:style-name="ce34" table:formula="of:=VLOOKUP([.$K15];[$cat_object.$A$2:.$J$14];3;0)" office:value-type="string" office:string-value="Mars" calcext:value-type="string">
            <text:p>Mars</text:p>
          </table:table-cell>
          <table:table-cell table:style-name="ce50" table:content-validation-name="val6" office:value-type="string" calcext:value-type="string">
            <text:p>Mars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2"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6];[$cat_object.$A$2:.$J$14];2;0)" office:value-type="float" office:value="5" calcext:value-type="float">
            <text:p>5</text:p>
          </table:table-cell>
          <table:table-cell table:style-name="ce12" table:formula="of:=VLOOKUP([.$K16];[$cat_object.$A$2:.$J$14];9;0)" office:value-type="float" office:value="0" calcext:value-type="float">
            <text:p/>
          </table:table-cell>
          <table:table-cell table:style-name="ce12" table:formula="of:=VLOOKUP([.$K16];[$cat_object.$A$2:.$J$14];10;0)" office:value-type="float" office:value="0" calcext:value-type="float">
            <text:p/>
          </table:table-cell>
          <table:table-cell table:style-name="ce12" table:formula="of:=VLOOKUP([.$K16];[$cat_object.$A$2:.$J$14];8;0)" office:value-type="string" office:string-value="Gigante gaseoso masivo con una tormenta llamada Gran Mancha Roja." calcext:value-type="string">
            <text:p>Gigante gaseoso masivo con una tormenta llamada Gran Mancha Roja.</text:p>
          </table:table-cell>
          <table:table-cell table:style-name="ce12" table:formula="of:=VLOOKUP([.$K16];[$cat_object.$A$2:.$J$14];7;0)" office:value-type="string" office:string-value="Massive gas giant with a Great Red Spot storm." calcext:value-type="string">
            <text:p>Massive gas giant with a Great Red Spot storm.</text:p>
          </table:table-cell>
          <table:table-cell table:style-name="ce34" table:formula="of:=VLOOKUP([.$K16];[$cat_object.$A$2:.$J$14];4;0)" office:value-type="string" office:string-value="Júpiter" calcext:value-type="string">
            <text:p>Júpiter</text:p>
          </table:table-cell>
          <table:table-cell table:style-name="ce34" table:formula="of:=VLOOKUP([.$K16];[$cat_object.$A$2:.$J$14];3;0)" office:value-type="string" office:string-value="Jupiter" calcext:value-type="string">
            <text:p>Jupiter</text:p>
          </table:table-cell>
          <table:table-cell table:style-name="ce50" table:content-validation-name="val6" office:value-type="string" calcext:value-type="string">
            <text:p>Jup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2"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7];[$cat_object.$A$2:.$J$14];2;0)" office:value-type="float" office:value="6" calcext:value-type="float">
            <text:p>6</text:p>
          </table:table-cell>
          <table:table-cell table:style-name="ce12" table:formula="of:=VLOOKUP([.$K17];[$cat_object.$A$2:.$J$14];9;0)" office:value-type="float" office:value="0" calcext:value-type="float">
            <text:p/>
          </table:table-cell>
          <table:table-cell table:style-name="ce12" table:formula="of:=VLOOKUP([.$K17];[$cat_object.$A$2:.$J$14];10;0)" office:value-type="float" office:value="0" calcext:value-type="float">
            <text:p/>
          </table:table-cell>
          <table:table-cell table:style-name="ce12" table:formula="of:=VLOOKUP([.$K17];[$cat_object.$A$2:.$J$14];8;0)" office:value-type="string" office:string-value="Gigante gaseoso con anillos prominentes y hermosos." calcext:value-type="string">
            <text:p>Gigante gaseoso con anillos prominentes y hermosos.</text:p>
          </table:table-cell>
          <table:table-cell table:style-name="ce12" table:formula="of:=VLOOKUP([.$K17];[$cat_object.$A$2:.$J$14];7;0)" office:value-type="string" office:string-value="Gas giant with prominent, beautiful rings." calcext:value-type="string">
            <text:p>Gas giant with prominent, beautiful rings.</text:p>
          </table:table-cell>
          <table:table-cell table:style-name="ce34" table:formula="of:=VLOOKUP([.$K17];[$cat_object.$A$2:.$J$14];4;0)" office:value-type="string" office:string-value="Saturno" calcext:value-type="string">
            <text:p>Saturno</text:p>
          </table:table-cell>
          <table:table-cell table:style-name="ce34" table:formula="of:=VLOOKUP([.$K17];[$cat_object.$A$2:.$J$14];3;0)" office:value-type="string" office:string-value="Saturn" calcext:value-type="string">
            <text:p>Saturn</text:p>
          </table:table-cell>
          <table:table-cell table:style-name="ce50" table:content-validation-name="val6" office:value-type="string" calcext:value-type="string">
            <text:p>Sat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2"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8];[$cat_object.$A$2:.$J$14];2;0)" office:value-type="float" office:value="7" calcext:value-type="float">
            <text:p>7</text:p>
          </table:table-cell>
          <table:table-cell table:style-name="ce12" table:formula="of:=VLOOKUP([.$K18];[$cat_object.$A$2:.$J$14];9;0)" office:value-type="string" office:string-value="Herschel, William; «Account of a Comet. By Mr. Herschel, F. R. S.; communicated by Dr. Watson, Jun. of Bath, F. R. S.» Philosophical Transactions of the Royal Society of London, Vol. 71, pp. 492-501." calcext:value-type="string">
            <text:p>Herschel, William; «Account of a Comet. By Mr. Herschel, F. R. S.; communicated by Dr. Watson, Jun. of Bath, F. R. S.» Philosophical Transactions of the Royal Society of London, Vol. 71, pp. 492-501.</text:p>
          </table:table-cell>
          <table:table-cell table:style-name="ce12" table:formula="of:=VLOOKUP([.$K18];[$cat_object.$A$2:.$J$14];10;0)" office:value-type="float" office:value="1781" calcext:value-type="float">
            <text:p>1781</text:p>
          </table:table-cell>
          <table:table-cell table:style-name="ce12" table:formula="of:=VLOOKUP([.$K18];[$cat_object.$A$2:.$J$14];8;0)" office:value-type="string" office:string-value="Gigante de hielo inclinado de lado, con anillos tenues." calcext:value-type="string">
            <text:p>Gigante de hielo inclinado de lado, con anillos tenues.</text:p>
          </table:table-cell>
          <table:table-cell table:style-name="ce12" table:formula="of:=VLOOKUP([.$K18];[$cat_object.$A$2:.$J$14];7;0)" office:value-type="string" office:string-value="Ice giant tilted on its side, with faint rings." calcext:value-type="string">
            <text:p>Ice giant tilted on its side, with faint rings.</text:p>
          </table:table-cell>
          <table:table-cell table:style-name="ce34" table:formula="of:=VLOOKUP([.$K18];[$cat_object.$A$2:.$J$14];4;0)" office:value-type="string" office:string-value="Urano" calcext:value-type="string">
            <text:p>Urano</text:p>
          </table:table-cell>
          <table:table-cell table:style-name="ce34" table:formula="of:=VLOOKUP([.$K18];[$cat_object.$A$2:.$J$14];3;0)" office:value-type="string" office:string-value="Uranus" calcext:value-type="string">
            <text:p>Uranus</text:p>
          </table:table-cell>
          <table:table-cell table:style-name="ce50" table:content-validation-name="val6" office:value-type="string" calcext:value-type="string">
            <text:p>Uran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9];[$cat_object.$A$2:.$J$14];2;0)" office:value-type="float" office:value="8" calcext:value-type="float">
            <text:p>8</text:p>
          </table:table-cell>
          <table:table-cell table:style-name="ce12" table:formula="of:=VLOOKUP([.$K19];[$cat_object.$A$2:.$J$14];9;0)" office:value-type="string" office:string-value="Urbain LeVerrier, “Account of the Discovery of the Planet of Le Verrier at Berlin”, Monthly Notices of the Royal Astronomical Society, Vol. 7, No. 9, pp. 153–157." calcext:value-type="string">
            <text:p>Urbain LeVerrier, “Account of the Discovery of the Planet of Le Verrier at Berlin”, Monthly Notices of the Royal Astronomical Society, Vol. 7, No. 9, pp. 153–157.</text:p>
          </table:table-cell>
          <table:table-cell table:style-name="ce12" table:formula="of:=VLOOKUP([.$K19];[$cat_object.$A$2:.$J$14];10;0)" office:value-type="float" office:value="1846" calcext:value-type="float">
            <text:p>1846</text:p>
          </table:table-cell>
          <table:table-cell table:style-name="ce12" table:formula="of:=VLOOKUP([.$K19];[$cat_object.$A$2:.$J$14];8;0)" office:value-type="string" office:string-value="Gigante de hielo azul y frío con fuertes vientos." calcext:value-type="string">
            <text:p>Gigante de hielo azul y frío con fuertes vientos.</text:p>
          </table:table-cell>
          <table:table-cell table:style-name="ce12" table:formula="of:=VLOOKUP([.$K19];[$cat_object.$A$2:.$J$14];7;0)" office:value-type="string" office:string-value="Cold, blue ice giant with strong winds." calcext:value-type="string">
            <text:p>Cold, blue ice giant with strong winds.</text:p>
          </table:table-cell>
          <table:table-cell table:style-name="ce34" table:formula="of:=VLOOKUP([.$K19];[$cat_object.$A$2:.$J$14];4;0)" office:value-type="string" office:string-value="Neptuno" calcext:value-type="string">
            <text:p>Neptuno</text:p>
          </table:table-cell>
          <table:table-cell table:style-name="ce34" table:formula="of:=VLOOKUP([.$K19];[$cat_object.$A$2:.$J$14];3;0)" office:value-type="string" office:string-value="Neptune" calcext:value-type="string">
            <text:p>Neptune</text:p>
          </table:table-cell>
          <table:table-cell table:style-name="ce50" table:content-validation-name="val6" office:value-type="string" calcext:value-type="string">
            <text:p>Nep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20];[$cat_object.$A$2:.$J$14];2;0)" office:value-type="float" office:value="9" calcext:value-type="float">
            <text:p>9</text:p>
          </table:table-cell>
          <table:table-cell table:style-name="ce12" table:formula="of:=VLOOKUP([.$K20];[$cat_object.$A$2:.$J$14];9;0)" office:value-type="string" office:string-value="Tombaugh, Clyde W.; «The Search for the Ninth Planet, Pluto.» Astronomical Society of the Pacific Leaflets, Vol. 5, No. 209 , pp. 73-80." calcext:value-type="string">
            <text:p>Tombaugh, Clyde W.; «The Search for the Ninth Planet, Pluto.» Astronomical Society of the Pacific Leaflets, Vol. 5, No. 209 , pp. 73-80.</text:p>
          </table:table-cell>
          <table:table-cell table:style-name="ce12" table:formula="of:=VLOOKUP([.$K20];[$cat_object.$A$2:.$J$14];10;0)" office:value-type="float" office:value="1930" calcext:value-type="float">
            <text:p>1930</text:p>
          </table:table-cell>
          <table:table-cell table:style-name="ce12" table:formula="of:=VLOOKUP([.$K20];[$cat_object.$A$2:.$J$14];8;0)" office:value-type="string" office:string-value="Un pequeño planeta enano helado en el Cinturón de Kuiper, con una órbita altamente elíptica." calcext:value-type="string">
            <text:p>Un pequeño planeta enano helado en el Cinturón de Kuiper, con una órbita altamente elíptica.</text:p>
          </table:table-cell>
          <table:table-cell table:style-name="ce12" table:formula="of:=VLOOKUP([.$K20];[$cat_object.$A$2:.$J$14];7;0)" office:value-type="string" office:string-value="A small, icy dwarf planet in the Kuiper Belt, with a highly elliptical orbit." calcext:value-type="string">
            <text:p>A small, icy dwarf planet in the Kuiper Belt, with a highly elliptical orbit.</text:p>
          </table:table-cell>
          <table:table-cell table:style-name="ce34" table:formula="of:=VLOOKUP([.$K20];[$cat_object.$A$2:.$J$14];4;0)" office:value-type="string" office:string-value="Pluton" calcext:value-type="string">
            <text:p>Pluton</text:p>
          </table:table-cell>
          <table:table-cell table:style-name="ce34" table:formula="of:=VLOOKUP([.$K20];[$cat_object.$A$2:.$J$14];3;0)" office:value-type="string" office:string-value="Pluto" calcext:value-type="string">
            <text:p>Pluto</text:p>
          </table:table-cell>
          <table:table-cell table:style-name="ce50" table:content-validation-name="val6" office:value-type="string" calcext:value-type="string">
            <text:p>Pluto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number-columns-repeated="2"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15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text_SS_IAU" table:style-name="ta12">
        <table:table-column table:style-name="co26" table:default-cell-style-name="ce22"/>
        <table:table-column table:style-name="co31" table:default-cell-style-name="ce22"/>
        <table:table-column table:style-name="co26" table:default-cell-style-name="ce22"/>
        <table:table-column table:style-name="co31" table:default-cell-style-name="ce34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5" table:number-columns-repeated="2" table:default-cell-style-name="ce22"/>
        <table:table-column table:style-name="co37" table:default-cell-style-name="ce22"/>
        <table:table-column table:style-name="co25" table:number-columns-repeated="2" table:default-cell-style-name="ce22"/>
        <table:table-column table:style-name="co38" table:default-cell-style-name="ce22"/>
        <table:table-column table:style-name="co25" table:number-columns-repeated="3" table:default-cell-style-name="ce22"/>
        <table:table-column table:style-name="co3" table:number-columns-repeated="16367" table:default-cell-style-name="ce22"/>
        <table:table-row table:style-name="ro2">
          <table:table-cell table:style-name="ce20" office:value-type="string" calcext:value-type="string">
            <text:p>Context:</text:p>
          </table:table-cell>
          <table:table-cell table:formula="of:=VLOOKUP([.$C$1];[$cat_context.$A$2:.$B$1000];2;0)" office:value-type="float" office:value="2" calcext:value-type="float">
            <text:p>2</text:p>
          </table:table-cell>
          <table:table-cell table:style-name="ce60" table:content-validation-name="val5" office:value-type="string" calcext:value-type="string">
            <text:p>SS-IAU</text:p>
          </table:table-cell>
          <table:table-cell table:number-columns-repeated="16381"/>
        </table:table-row>
        <table:table-row table:style-name="ro2">
          <table:table-cell table:number-columns-repeated="9"/>
          <table:table-cell table:style-name="ce55" office:value-type="string" calcext:value-type="string" table:number-columns-spanned="1" table:number-rows-spanned="9">
            <text:p>Attributes</text:p>
          </table:table-cell>
          <table:table-cell table:style-name="ce27" office:value-type="string" calcext:value-type="string">
            <text:p>id</text:p>
          </table:table-cell>
          <table:table-cell table:style-name="ce30" table:formula="of:=VLOOKUP([.L$11];[$cat_attribute.$A$2:.$M$12];2;0)" office:value-type="float" office:value="8" calcext:value-type="float">
            <text:p>8</text:p>
          </table:table-cell>
          <table:table-cell table:style-name="ce30" table:formula="of:=VLOOKUP([.M$11];[$cat_attribute.$A$2:.$M$12];2;0)" office:value-type="float" office:value="7" calcext:value-type="float">
            <text:p>7</text:p>
          </table:table-cell>
          <table:table-cell table:style-name="ce30" table:formula="of:=VLOOKUP([.N$11];[$cat_attribute.$A$2:.$M$12];2;0)" office:value-type="float" office:value="9" calcext:value-type="float">
            <text:p>9</text:p>
          </table:table-cell>
          <table:table-cell table:style-name="ce30" table:formula="of:=VLOOKUP([.O$11];[$cat_attribute.$A$2:.$M$12];2;0)" office:value-type="float" office:value="10" calcext:value-type="float">
            <text:p>10</text:p>
          </table:table-cell>
          <table:table-cell table:style-name="ce30" table:formula="of:=VLOOKUP([.P$11];[$cat_attribute.$A$2:.$M$12];2;0)" office:value-type="float" office:value="11" calcext:value-type="float">
            <text:p>11</text:p>
          </table:table-cell>
          <table:table-cell table:style-name="ce30" table:formula="of:=VLOOKUP([.Q$11];[$cat_attribute.$A$2:.$M$12];2;0)" office:value-type="float" office:value="6" calcext:value-type="float">
            <text:p>6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reference</text:p>
          </table:table-cell>
          <table:table-cell table:style-name="ce34" table:formula="of:=VLOOKUP([.L$11];[$cat_attribute.$A$2:.$M$12];13;0)" office:value-type="string" office:string-value="y" calcext:value-type="string">
            <text:p>y</text:p>
          </table:table-cell>
          <table:table-cell table:style-name="ce34" table:formula="of:=VLOOKUP([.M$11];[$cat_attribute.$A$2:.$M$12];13;0)" office:value-type="string" office:string-value="y" calcext:value-type="string">
            <text:p>y</text:p>
          </table:table-cell>
          <table:table-cell table:style-name="ce34" table:formula="of:=VLOOKUP([.N$11];[$cat_attribute.$A$2:.$M$12];13;0)" office:value-type="string" office:string-value="y" calcext:value-type="string">
            <text:p>y</text:p>
          </table:table-cell>
          <table:table-cell table:style-name="ce34" table:formula="of:=VLOOKUP([.O$11];[$cat_attribute.$A$2:.$M$12];13;0)" office:value-type="string" office:string-value="y" calcext:value-type="string">
            <text:p>y</text:p>
          </table:table-cell>
          <table:table-cell table:style-name="ce34" table:formula="of:=VLOOKUP([.P$11];[$cat_attribute.$A$2:.$M$12];13;0)" office:value-type="string" office:string-value="y" calcext:value-type="string">
            <text:p>y</text:p>
          </table:table-cell>
          <table:table-cell table:style-name="ce34" table:formula="of:=VLOOKUP([.Q$11];[$cat_attribute.$A$2:.$M$12];13;0)" office:value-type="string" office:string-value="y" calcext:value-type="string">
            <text:p>y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explanation_es</text:p>
          </table:table-cell>
          <table:table-cell table:style-name="ce34" table:formula="of:=VLOOKUP([.L$11];[$cat_attribute.$A$2:.$M$12];12;0)" office:value-type="string" office:string-value="El objeto orbita alrededor de otra estrella" calcext:value-type="string">
            <text:p>El objeto orbita alrededor de otra estrella</text:p>
          </table:table-cell>
          <table:table-cell table:style-name="ce34" table:formula="of:=VLOOKUP([.M$11];[$cat_attribute.$A$2:.$M$12];12;0)" office:value-type="string" office:string-value="El objeto orbita alrededor del Sol." calcext:value-type="string">
            <text:p>El objeto orbita alrededor del Sol.</text:p>
          </table:table-cell>
          <table:table-cell table:style-name="ce34" table:formula="of:=VLOOKUP([.N$11];[$cat_attribute.$A$2:.$M$12];12;0)" office:value-type="string" office:string-value="El objeto es lo suficientemente masivo como para producir la fusión nuclear." calcext:value-type="string">
            <text:p>El objeto es lo suficientemente masivo como para producir la fusión nuclear.</text:p>
          </table:table-cell>
          <table:table-cell table:style-name="ce34" table:formula="of:=VLOOKUP([.O$11];[$cat_attribute.$A$2:.$M$12];12;0)" office:value-type="string" office:string-value="El objeto es lo suficientemente masivo como para ser redondeado por su propia gravedad." calcext:value-type="string">
            <text:p>El objeto es lo suficientemente masivo como para ser redondeado por su propia gravedad.</text:p>
          </table:table-cell>
          <table:table-cell table:style-name="ce34" table:formula="of:=VLOOKUP([.P$11];[$cat_attribute.$A$2:.$M$12];12;0)" office:value-type="string" office:string-value="El objeto ha limpiado su órbita de objetos sólidos que se cree que existen en discos protoplanetarios y discos de escombros, llamados planetesimales." calcext:value-type="string">
            <text:p>El objeto ha limpiado su órbita de objetos sólidos que se cree que existen en discos protoplanetarios y discos de escombros, llamados planetesimales.</text:p>
          </table:table-cell>
          <table:table-cell table:style-name="ce34" table:formula="of:=VLOOKUP([.Q$11];[$cat_attribute.$A$2:.$M$12];12;0)" office:value-type="string" office:string-value="El objeto tiene satélites." calcext:value-type="string">
            <text:p>El objeto tiene satélites.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explanation_en</text:p>
          </table:table-cell>
          <table:table-cell table:style-name="ce34" table:formula="of:=VLOOKUP([.L$11];[$cat_attribute.$A$2:.$M$12];11;0)" office:value-type="string" office:string-value="The object orbits around another star" calcext:value-type="string">
            <text:p>The object orbits around another star</text:p>
          </table:table-cell>
          <table:table-cell table:style-name="ce34" table:formula="of:=VLOOKUP([.M$11];[$cat_attribute.$A$2:.$M$12];11;0)" office:value-type="string" office:string-value="The object orbits around the sun." calcext:value-type="string">
            <text:p>The object orbits around the sun.</text:p>
          </table:table-cell>
          <table:table-cell table:style-name="ce34" table:formula="of:=VLOOKUP([.N$11];[$cat_attribute.$A$2:.$M$12];11;0)" office:value-type="string" office:string-value="The object is massive enough to produce themonuclear fusion." calcext:value-type="string">
            <text:p>The object is massive enough to produce themonuclear fusion.</text:p>
          </table:table-cell>
          <table:table-cell table:style-name="ce34" table:formula="of:=VLOOKUP([.O$11];[$cat_attribute.$A$2:.$M$12];11;0)" office:value-type="string" office:string-value="The object is massive enough to be rounded by its own gravity." calcext:value-type="string">
            <text:p>The object is massive enough to be rounded by its own gravity.</text:p>
          </table:table-cell>
          <table:table-cell table:style-name="ce34" table:formula="of:=VLOOKUP([.P$11];[$cat_attribute.$A$2:.$M$12];11;0)" office:value-type="string" office:string-value="The object has cleaned its orbit from solid objects thought to exist in protoplanetary disks and debris disks, called planetisimals." calcext:value-type="string">
            <text:p>The object has cleaned its orbit from solid objects thought to exist in protoplanetary disks and debris disks, called planetisimals.</text:p>
          </table:table-cell>
          <table:table-cell table:style-name="ce34" table:formula="of:=VLOOKUP([.Q$11];[$cat_attribute.$A$2:.$M$12];11;0)" office:value-type="string" office:string-value="The object has satellites." calcext:value-type="string">
            <text:p>The object has satellites.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formula</text:p>
          </table:table-cell>
          <table:table-cell table:style-name="ce34" table:formula="of:=VLOOKUP([.L$11];[$cat_attribute.$A$2:.$M$12];10;0)" office:value-type="string" office:string-value="x" calcext:value-type="string">
            <text:p>x</text:p>
          </table:table-cell>
          <table:table-cell table:style-name="ce34" table:formula="of:=VLOOKUP([.M$11];[$cat_attribute.$A$2:.$M$12];10;0)" office:value-type="string" office:string-value="x" calcext:value-type="string">
            <text:p>x</text:p>
          </table:table-cell>
          <table:table-cell table:style-name="ce34" table:formula="of:=VLOOKUP([.N$11];[$cat_attribute.$A$2:.$M$12];10;0)" office:value-type="string" office:string-value="x" calcext:value-type="string">
            <text:p>x</text:p>
          </table:table-cell>
          <table:table-cell table:style-name="ce34" table:formula="of:=VLOOKUP([.O$11];[$cat_attribute.$A$2:.$M$12];10;0)" office:value-type="string" office:string-value="x" calcext:value-type="string">
            <text:p>x</text:p>
          </table:table-cell>
          <table:table-cell table:style-name="ce34" table:formula="of:=VLOOKUP([.P$11];[$cat_attribute.$A$2:.$M$12];10;0)" office:value-type="string" office:string-value="x" calcext:value-type="string">
            <text:p>x</text:p>
          </table:table-cell>
          <table:table-cell table:style-name="ce34" table:formula="of:=VLOOKUP([.Q$11];[$cat_attribute.$A$2:.$M$12];10;0)" office:value-type="string" office:string-value="x" calcext:value-type="string">
            <text:p>x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title_es</text:p>
          </table:table-cell>
          <table:table-cell table:style-name="ce34" table:formula="of:=VLOOKUP([.L$11];[$cat_attribute.$A$2:.$M$12];9;0)" office:value-type="string" office:string-value="Alrededor de una estrella" calcext:value-type="string">
            <text:p>Alrededor de una estrella</text:p>
          </table:table-cell>
          <table:table-cell table:style-name="ce34" table:formula="of:=VLOOKUP([.M$11];[$cat_attribute.$A$2:.$M$12];9;0)" office:value-type="string" office:string-value="Alrededor del Sol" calcext:value-type="string">
            <text:p>Alrededor del Sol</text:p>
          </table:table-cell>
          <table:table-cell table:style-name="ce34" table:formula="of:=VLOOKUP([.N$11];[$cat_attribute.$A$2:.$M$12];9;0)" office:value-type="string" office:string-value="Fusión" calcext:value-type="string">
            <text:p>Fusión</text:p>
          </table:table-cell>
          <table:table-cell table:style-name="ce34" table:formula="of:=VLOOKUP([.O$11];[$cat_attribute.$A$2:.$M$12];9;0)" office:value-type="string" office:string-value="Esférico" calcext:value-type="string">
            <text:p>Esférico</text:p>
          </table:table-cell>
          <table:table-cell table:style-name="ce34" table:formula="of:=VLOOKUP([.P$11];[$cat_attribute.$A$2:.$M$12];9;0)" office:value-type="string" office:string-value="Órbita limpia" calcext:value-type="string">
            <text:p>Órbita limpia</text:p>
          </table:table-cell>
          <table:table-cell table:style-name="ce34" table:formula="of:=VLOOKUP([.Q$11];[$cat_attribute.$A$2:.$M$12];9;0)" office:value-type="string" office:string-value="Sí tiene satélites" calcext:value-type="string">
            <text:p>Sí tiene satélites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title_en</text:p>
          </table:table-cell>
          <table:table-cell table:style-name="ce34" table:formula="of:=VLOOKUP([.L$11];[$cat_attribute.$A$2:.$M$12];8;0)" office:value-type="string" office:string-value="Around a star" calcext:value-type="string">
            <text:p>Around a star</text:p>
          </table:table-cell>
          <table:table-cell table:style-name="ce34" table:formula="of:=VLOOKUP([.M$11];[$cat_attribute.$A$2:.$M$12];8;0)" office:value-type="string" office:string-value="Around the Sun" calcext:value-type="string">
            <text:p>Around the Sun</text:p>
          </table:table-cell>
          <table:table-cell table:style-name="ce34" table:formula="of:=VLOOKUP([.N$11];[$cat_attribute.$A$2:.$M$12];8;0)" office:value-type="string" office:string-value="Fusion" calcext:value-type="string">
            <text:p>Fusion</text:p>
          </table:table-cell>
          <table:table-cell table:style-name="ce34" table:formula="of:=VLOOKUP([.O$11];[$cat_attribute.$A$2:.$M$12];8;0)" office:value-type="string" office:string-value="Spherical" calcext:value-type="string">
            <text:p>Spherical</text:p>
          </table:table-cell>
          <table:table-cell table:style-name="ce34" table:formula="of:=VLOOKUP([.P$11];[$cat_attribute.$A$2:.$M$12];8;0)" office:value-type="string" office:string-value="Clean orbit" calcext:value-type="string">
            <text:p>Clean orbit</text:p>
          </table:table-cell>
          <table:table-cell table:style-name="ce34" table:formula="of:=VLOOKUP([.Q$11];[$cat_attribute.$A$2:.$M$12];8;0)" office:value-type="string" office:string-value="Has satellites" calcext:value-type="string">
            <text:p>Has satellites</text:p>
          </table:table-cell>
          <table:table-cell table:number-columns-repeated="16367"/>
        </table:table-row>
        <table:table-row table:style-name="ro2">
          <table:table-cell table:number-columns-repeated="9"/>
          <table:covered-table-cell table:style-name="ce55"/>
          <table:table-cell table:style-name="ce28" office:value-type="string" calcext:value-type="string">
            <text:p>class_id</text:p>
          </table:table-cell>
          <table:table-cell table:style-name="ce34" table:formula="of:=VLOOKUP([.L$11];[$cat_attribute.$A$2:.$M$12];7;0)" office:value-type="string" office:string-value="orbit" calcext:value-type="string">
            <text:p>orbit</text:p>
          </table:table-cell>
          <table:table-cell table:style-name="ce34" table:formula="of:=VLOOKUP([.M$11];[$cat_attribute.$A$2:.$M$12];7;0)" office:value-type="string" office:string-value="orbit" calcext:value-type="string">
            <text:p>orbit</text:p>
          </table:table-cell>
          <table:table-cell table:style-name="ce34" table:formula="of:=VLOOKUP([.N$11];[$cat_attribute.$A$2:.$M$12];7;0)" office:value-type="string" office:string-value="fusion" calcext:value-type="string">
            <text:p>fusion</text:p>
          </table:table-cell>
          <table:table-cell table:style-name="ce34" table:formula="of:=VLOOKUP([.O$11];[$cat_attribute.$A$2:.$M$12];7;0)" office:value-type="string" office:string-value="spherical" calcext:value-type="string">
            <text:p>spherical</text:p>
          </table:table-cell>
          <table:table-cell table:style-name="ce34" table:formula="of:=VLOOKUP([.P$11];[$cat_attribute.$A$2:.$M$12];7;0)" office:value-type="string" office:string-value="orbit" calcext:value-type="string">
            <text:p>orbit</text:p>
          </table:table-cell>
          <table:table-cell table:style-name="ce34" table:formula="of:=VLOOKUP([.Q$11];[$cat_attribute.$A$2:.$M$12];7;0)" office:value-type="string" office:string-value="satellites" calcext:value-type="string">
            <text:p>satellit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51" office:value-type="string" calcext:value-type="string" table:number-columns-spanned="6" table:number-rows-spanned="1">
            <text:p>Objects</text:p>
          </table:table-cell>
          <table:covered-table-cell table:number-columns-repeated="5" table:style-name="ce51"/>
          <table:covered-table-cell table:style-name="ce55"/>
          <table:table-cell table:style-name="ce28" office:value-type="string" calcext:value-type="string">
            <text:p>label_es</text:p>
          </table:table-cell>
          <table:table-cell table:style-name="ce34" table:formula="of:=VLOOKUP([.L$11];[$cat_attribute.$A$2:.$M$12];3;0)" office:value-type="string" office:string-value="Alrededor de una estrella" calcext:value-type="string">
            <text:p>Alrededor de una estrella</text:p>
          </table:table-cell>
          <table:table-cell table:style-name="ce34" table:formula="of:=VLOOKUP([.M$11];[$cat_attribute.$A$2:.$M$12];3;0)" office:value-type="string" office:string-value="Alrededor del Sol" calcext:value-type="string">
            <text:p>Alrededor del Sol</text:p>
          </table:table-cell>
          <table:table-cell table:style-name="ce34" table:formula="of:=VLOOKUP([.N$11];[$cat_attribute.$A$2:.$M$12];3;0)" office:value-type="string" office:string-value="Fusion" calcext:value-type="string">
            <text:p>Fusion</text:p>
          </table:table-cell>
          <table:table-cell table:style-name="ce34" table:formula="of:=VLOOKUP([.O$11];[$cat_attribute.$A$2:.$M$12];3;0)" office:value-type="string" office:string-value="Esferico" calcext:value-type="string">
            <text:p>Esferico</text:p>
          </table:table-cell>
          <table:table-cell table:style-name="ce34" table:formula="of:=VLOOKUP([.P$11];[$cat_attribute.$A$2:.$M$12];3;0)" office:value-type="string" office:string-value="Limpia" calcext:value-type="string">
            <text:p>Limpia</text:p>
          </table:table-cell>
          <table:table-cell table:style-name="ce34" table:formula="of:=VLOOKUP([.Q$11];[$cat_attribute.$A$2:.$M$12];3;0)" office:value-type="string" office:string-value="Satelites" calcext:value-type="string">
            <text:p>Satelit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3" office:value-type="string" calcext:value-type="string">
            <text:p>id</text:p>
          </table:table-cell>
          <table:table-cell table:style-name="ce25" office:value-type="string" calcext:value-type="string">
            <text:p>reference</text:p>
          </table:table-cell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desc_es</text:p>
          </table:table-cell>
          <table:table-cell table:style-name="ce25" office:value-type="string" calcext:value-type="string">
            <text:p>desc_en</text:p>
          </table:table-cell>
          <table:table-cell table:style-name="ce25" office:value-type="string" calcext:value-type="string">
            <text:p>label_es</text:p>
          </table:table-cell>
          <table:table-cell table:style-name="ce25" office:value-type="string" calcext:value-type="string">
            <text:p>label_en</text:p>
          </table:table-cell>
          <table:table-cell table:style-name="ce29" office:value-type="string" calcext:value-type="string">
            <text:p>code <text:s text:c="12"/>label_en</text:p>
          </table:table-cell>
          <table:table-cell table:style-name="ce60" table:content-validation-name="val7" office:value-type="string" calcext:value-type="string">
            <text:p>Around a star</text:p>
          </table:table-cell>
          <table:table-cell table:style-name="ce60" table:content-validation-name="val7" office:value-type="string" calcext:value-type="string">
            <text:p>Around the sun</text:p>
          </table:table-cell>
          <table:table-cell table:style-name="ce60" table:content-validation-name="val7" office:value-type="string" calcext:value-type="string">
            <text:p>Fusion</text:p>
          </table:table-cell>
          <table:table-cell table:style-name="ce60" table:content-validation-name="val7" office:value-type="string" calcext:value-type="string">
            <text:p>Spherical</text:p>
          </table:table-cell>
          <table:table-cell table:style-name="ce60" table:content-validation-name="val7" office:value-type="string" calcext:value-type="string">
            <text:p>Clean</text:p>
          </table:table-cell>
          <table:table-cell table:style-name="ce60" table:content-validation-name="val7" office:value-type="string" calcext:value-type="string">
            <text:p>Has satellit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2];[$cat_object.$A$2:.$J$14];2;0)" office:value-type="float" office:value="1" calcext:value-type="float">
            <text:p>1</text:p>
          </table:table-cell>
          <table:table-cell table:style-name="ce12" table:formula="of:=VLOOKUP([.$K12];[$cat_object.$A$2:.$J$14];9;0)" office:value-type="float" office:value="0" calcext:value-type="float">
            <text:p/>
          </table:table-cell>
          <table:table-cell table:style-name="ce12" table:formula="of:=VLOOKUP([.$K12];[$cat_object.$A$2:.$J$14];10;0)" office:value-type="float" office:value="0" calcext:value-type="float">
            <text:p/>
          </table:table-cell>
          <table:table-cell table:style-name="ce12" table:formula="of:=VLOOKUP([.$K12];[$cat_object.$A$2:.$J$14];8;0)" office:value-type="string" office:string-value="Pequeño, rocoso y el más cercano al Sol." calcext:value-type="string">
            <text:p>Pequeño, rocoso y el más cercano al Sol.</text:p>
          </table:table-cell>
          <table:table-cell table:style-name="ce12" table:formula="of:=VLOOKUP([.$K12];[$cat_object.$A$2:.$J$14];7;0)" office:value-type="string" office:string-value="Small, rocky, and closest to the Sun" calcext:value-type="string">
            <text:p>Small, rocky, and closest to the Sun</text:p>
          </table:table-cell>
          <table:table-cell table:style-name="ce34" table:formula="of:=VLOOKUP([.$K12];[$cat_object.$A$2:.$J$14];4;0)" office:value-type="string" office:string-value="Mercurio" calcext:value-type="string">
            <text:p>Mercurio</text:p>
          </table:table-cell>
          <table:table-cell table:style-name="ce34" table:formula="of:=VLOOKUP([.$K12];[$cat_object.$A$2:.$J$14];3;0)" office:value-type="string" office:string-value="Mercury" calcext:value-type="string">
            <text:p>Mercury</text:p>
          </table:table-cell>
          <table:table-cell table:style-name="ce60" table:content-validation-name="val6" office:value-type="string" calcext:value-type="string">
            <text:p>Mer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3];[$cat_object.$A$2:.$J$14];2;0)" office:value-type="float" office:value="2" calcext:value-type="float">
            <text:p>2</text:p>
          </table:table-cell>
          <table:table-cell table:style-name="ce12" table:formula="of:=VLOOKUP([.$K13];[$cat_object.$A$2:.$J$14];9;0)" office:value-type="float" office:value="0" calcext:value-type="float">
            <text:p/>
          </table:table-cell>
          <table:table-cell table:style-name="ce12" table:formula="of:=VLOOKUP([.$K13];[$cat_object.$A$2:.$J$14];10;0)" office:value-type="float" office:value="0" calcext:value-type="float">
            <text:p/>
          </table:table-cell>
          <table:table-cell table:style-name="ce12" table:formula="of:=VLOOKUP([.$K13];[$cat_object.$A$2:.$J$14];8;0)" office:value-type="string" office:string-value="Caluroso, con nubes espesas y un efecto invernadero extremo." calcext:value-type="string">
            <text:p>Caluroso, con nubes espesas y un efecto invernadero extremo.</text:p>
          </table:table-cell>
          <table:table-cell table:style-name="ce12" table:formula="of:=VLOOKUP([.$K13];[$cat_object.$A$2:.$J$14];7;0)" office:value-type="string" office:string-value="Hot, with thick clouds and extreme greenhouse effect." calcext:value-type="string">
            <text:p>Hot, with thick clouds and extreme greenhouse effect.</text:p>
          </table:table-cell>
          <table:table-cell table:style-name="ce34" table:formula="of:=VLOOKUP([.$K13];[$cat_object.$A$2:.$J$14];4;0)" office:value-type="string" office:string-value="Venus" calcext:value-type="string">
            <text:p>Venus</text:p>
          </table:table-cell>
          <table:table-cell table:style-name="ce34" table:formula="of:=VLOOKUP([.$K13];[$cat_object.$A$2:.$J$14];3;0)" office:value-type="string" office:string-value="Venus" calcext:value-type="string">
            <text:p>Venus</text:p>
          </table:table-cell>
          <table:table-cell table:style-name="ce60" table:content-validation-name="val6" office:value-type="string" calcext:value-type="string">
            <text:p>Ven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4];[$cat_object.$A$2:.$J$14];2;0)" office:value-type="float" office:value="3" calcext:value-type="float">
            <text:p>3</text:p>
          </table:table-cell>
          <table:table-cell table:style-name="ce12" table:formula="of:=VLOOKUP([.$K14];[$cat_object.$A$2:.$J$14];9;0)" office:value-type="string" office:string-value="De Revolutionibus Orbium Coelestium, Nicolás Copérnico" calcext:value-type="string">
            <text:p>De Revolutionibus Orbium Coelestium, Nicolás Copérnico</text:p>
          </table:table-cell>
          <table:table-cell table:style-name="ce12" table:formula="of:=VLOOKUP([.$K14];[$cat_object.$A$2:.$J$14];10;0)" office:value-type="float" office:value="1543" calcext:value-type="float">
            <text:p>1543</text:p>
          </table:table-cell>
          <table:table-cell table:style-name="ce12" table:formula="of:=VLOOKUP([.$K14];[$cat_object.$A$2:.$J$14];8;0)" office:value-type="string" office:string-value="El único planeta conocido que alberga vida, con océanos y tierra." calcext:value-type="string">
            <text:p>El único planeta conocido que alberga vida, con océanos y tierra.</text:p>
          </table:table-cell>
          <table:table-cell table:style-name="ce12" table:formula="of:=VLOOKUP([.$K14];[$cat_object.$A$2:.$J$14];7;0)" office:value-type="string" office:string-value="The only planet known to support life, with oceans and land." calcext:value-type="string">
            <text:p>The only planet known to support life, with oceans and land.</text:p>
          </table:table-cell>
          <table:table-cell table:style-name="ce34" table:formula="of:=VLOOKUP([.$K14];[$cat_object.$A$2:.$J$14];4;0)" office:value-type="string" office:string-value="Tierra" calcext:value-type="string">
            <text:p>Tierra</text:p>
          </table:table-cell>
          <table:table-cell table:style-name="ce34" table:formula="of:=VLOOKUP([.$K14];[$cat_object.$A$2:.$J$14];3;0)" office:value-type="string" office:string-value="Earth" calcext:value-type="string">
            <text:p>Earth</text:p>
          </table:table-cell>
          <table:table-cell table:style-name="ce60" table:content-validation-name="val6" office:value-type="string" calcext:value-type="string">
            <text:p>Earth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3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5];[$cat_object.$A$2:.$J$14];2;0)" office:value-type="float" office:value="4" calcext:value-type="float">
            <text:p>4</text:p>
          </table:table-cell>
          <table:table-cell table:style-name="ce12" table:formula="of:=VLOOKUP([.$K15];[$cat_object.$A$2:.$J$14];9;0)" office:value-type="float" office:value="0" calcext:value-type="float">
            <text:p/>
          </table:table-cell>
          <table:table-cell table:style-name="ce12" table:formula="of:=VLOOKUP([.$K15];[$cat_object.$A$2:.$J$14];10;0)" office:value-type="float" office:value="0" calcext:value-type="float">
            <text:p/>
          </table:table-cell>
          <table:table-cell table:style-name="ce12" table:formula="of:=VLOOKUP([.$K15];[$cat_object.$A$2:.$J$14];8;0)" office:value-type="string" office:string-value="Rojo, polvoriento y potencialmente hogar de agua antigua." calcext:value-type="string">
            <text:p>Rojo, polvoriento y potencialmente hogar de agua antigua.</text:p>
          </table:table-cell>
          <table:table-cell table:style-name="ce12" table:formula="of:=VLOOKUP([.$K15];[$cat_object.$A$2:.$J$14];7;0)" office:value-type="string" office:string-value="Red, dusty, and potentially home to ancient water." calcext:value-type="string">
            <text:p>Red, dusty, and potentially home to ancient water.</text:p>
          </table:table-cell>
          <table:table-cell table:style-name="ce34" table:formula="of:=VLOOKUP([.$K15];[$cat_object.$A$2:.$J$14];4;0)" office:value-type="string" office:string-value="Marte" calcext:value-type="string">
            <text:p>Marte</text:p>
          </table:table-cell>
          <table:table-cell table:style-name="ce34" table:formula="of:=VLOOKUP([.$K15];[$cat_object.$A$2:.$J$14];3;0)" office:value-type="string" office:string-value="Mars" calcext:value-type="string">
            <text:p>Mars</text:p>
          </table:table-cell>
          <table:table-cell table:style-name="ce60" table:content-validation-name="val6" office:value-type="string" calcext:value-type="string">
            <text:p>Mars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3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6];[$cat_object.$A$2:.$J$14];2;0)" office:value-type="float" office:value="5" calcext:value-type="float">
            <text:p>5</text:p>
          </table:table-cell>
          <table:table-cell table:style-name="ce12" table:formula="of:=VLOOKUP([.$K16];[$cat_object.$A$2:.$J$14];9;0)" office:value-type="float" office:value="0" calcext:value-type="float">
            <text:p/>
          </table:table-cell>
          <table:table-cell table:style-name="ce12" table:formula="of:=VLOOKUP([.$K16];[$cat_object.$A$2:.$J$14];10;0)" office:value-type="float" office:value="0" calcext:value-type="float">
            <text:p/>
          </table:table-cell>
          <table:table-cell table:style-name="ce12" table:formula="of:=VLOOKUP([.$K16];[$cat_object.$A$2:.$J$14];8;0)" office:value-type="string" office:string-value="Gigante gaseoso masivo con una tormenta llamada Gran Mancha Roja." calcext:value-type="string">
            <text:p>Gigante gaseoso masivo con una tormenta llamada Gran Mancha Roja.</text:p>
          </table:table-cell>
          <table:table-cell table:style-name="ce12" table:formula="of:=VLOOKUP([.$K16];[$cat_object.$A$2:.$J$14];7;0)" office:value-type="string" office:string-value="Massive gas giant with a Great Red Spot storm." calcext:value-type="string">
            <text:p>Massive gas giant with a Great Red Spot storm.</text:p>
          </table:table-cell>
          <table:table-cell table:style-name="ce34" table:formula="of:=VLOOKUP([.$K16];[$cat_object.$A$2:.$J$14];4;0)" office:value-type="string" office:string-value="Júpiter" calcext:value-type="string">
            <text:p>Júpiter</text:p>
          </table:table-cell>
          <table:table-cell table:style-name="ce34" table:formula="of:=VLOOKUP([.$K16];[$cat_object.$A$2:.$J$14];3;0)" office:value-type="string" office:string-value="Jupiter" calcext:value-type="string">
            <text:p>Jupiter</text:p>
          </table:table-cell>
          <table:table-cell table:style-name="ce60" table:content-validation-name="val6" office:value-type="string" calcext:value-type="string">
            <text:p>Jup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3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7];[$cat_object.$A$2:.$J$14];2;0)" office:value-type="float" office:value="6" calcext:value-type="float">
            <text:p>6</text:p>
          </table:table-cell>
          <table:table-cell table:style-name="ce12" table:formula="of:=VLOOKUP([.$K17];[$cat_object.$A$2:.$J$14];9;0)" office:value-type="float" office:value="0" calcext:value-type="float">
            <text:p/>
          </table:table-cell>
          <table:table-cell table:style-name="ce12" table:formula="of:=VLOOKUP([.$K17];[$cat_object.$A$2:.$J$14];10;0)" office:value-type="float" office:value="0" calcext:value-type="float">
            <text:p/>
          </table:table-cell>
          <table:table-cell table:style-name="ce12" table:formula="of:=VLOOKUP([.$K17];[$cat_object.$A$2:.$J$14];8;0)" office:value-type="string" office:string-value="Gigante gaseoso con anillos prominentes y hermosos." calcext:value-type="string">
            <text:p>Gigante gaseoso con anillos prominentes y hermosos.</text:p>
          </table:table-cell>
          <table:table-cell table:style-name="ce12" table:formula="of:=VLOOKUP([.$K17];[$cat_object.$A$2:.$J$14];7;0)" office:value-type="string" office:string-value="Gas giant with prominent, beautiful rings." calcext:value-type="string">
            <text:p>Gas giant with prominent, beautiful rings.</text:p>
          </table:table-cell>
          <table:table-cell table:style-name="ce34" table:formula="of:=VLOOKUP([.$K17];[$cat_object.$A$2:.$J$14];4;0)" office:value-type="string" office:string-value="Saturno" calcext:value-type="string">
            <text:p>Saturno</text:p>
          </table:table-cell>
          <table:table-cell table:style-name="ce34" table:formula="of:=VLOOKUP([.$K17];[$cat_object.$A$2:.$J$14];3;0)" office:value-type="string" office:string-value="Saturn" calcext:value-type="string">
            <text:p>Saturn</text:p>
          </table:table-cell>
          <table:table-cell table:style-name="ce60" table:content-validation-name="val6" office:value-type="string" calcext:value-type="string">
            <text:p>Sat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3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8];[$cat_object.$A$2:.$J$14];2;0)" office:value-type="float" office:value="7" calcext:value-type="float">
            <text:p>7</text:p>
          </table:table-cell>
          <table:table-cell table:style-name="ce12" table:formula="of:=VLOOKUP([.$K18];[$cat_object.$A$2:.$J$14];9;0)" office:value-type="string" office:string-value="Herschel, William; «Account of a Comet. By Mr. Herschel, F. R. S.; communicated by Dr. Watson, Jun. of Bath, F. R. S.» Philosophical Transactions of the Royal Society of London, Vol. 71, pp. 492-501." calcext:value-type="string">
            <text:p>Herschel, William; «Account of a Comet. By Mr. Herschel, F. R. S.; communicated by Dr. Watson, Jun. of Bath, F. R. S.» Philosophical Transactions of the Royal Society of London, Vol. 71, pp. 492-501.</text:p>
          </table:table-cell>
          <table:table-cell table:style-name="ce12" table:formula="of:=VLOOKUP([.$K18];[$cat_object.$A$2:.$J$14];10;0)" office:value-type="float" office:value="1781" calcext:value-type="float">
            <text:p>1781</text:p>
          </table:table-cell>
          <table:table-cell table:style-name="ce12" table:formula="of:=VLOOKUP([.$K18];[$cat_object.$A$2:.$J$14];8;0)" office:value-type="string" office:string-value="Gigante de hielo inclinado de lado, con anillos tenues." calcext:value-type="string">
            <text:p>Gigante de hielo inclinado de lado, con anillos tenues.</text:p>
          </table:table-cell>
          <table:table-cell table:style-name="ce12" table:formula="of:=VLOOKUP([.$K18];[$cat_object.$A$2:.$J$14];7;0)" office:value-type="string" office:string-value="Ice giant tilted on its side, with faint rings." calcext:value-type="string">
            <text:p>Ice giant tilted on its side, with faint rings.</text:p>
          </table:table-cell>
          <table:table-cell table:style-name="ce34" table:formula="of:=VLOOKUP([.$K18];[$cat_object.$A$2:.$J$14];4;0)" office:value-type="string" office:string-value="Urano" calcext:value-type="string">
            <text:p>Urano</text:p>
          </table:table-cell>
          <table:table-cell table:style-name="ce34" table:formula="of:=VLOOKUP([.$K18];[$cat_object.$A$2:.$J$14];3;0)" office:value-type="string" office:string-value="Uranus" calcext:value-type="string">
            <text:p>Uranus</text:p>
          </table:table-cell>
          <table:table-cell table:style-name="ce60" table:content-validation-name="val6" office:value-type="string" calcext:value-type="string">
            <text:p>Uran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3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19];[$cat_object.$A$2:.$J$14];2;0)" office:value-type="float" office:value="8" calcext:value-type="float">
            <text:p>8</text:p>
          </table:table-cell>
          <table:table-cell table:style-name="ce12" table:formula="of:=VLOOKUP([.$K19];[$cat_object.$A$2:.$J$14];9;0)" office:value-type="string" office:string-value="Urbain LeVerrier, “Account of the Discovery of the Planet of Le Verrier at Berlin”, Monthly Notices of the Royal Astronomical Society, Vol. 7, No. 9, pp. 153–157." calcext:value-type="string">
            <text:p>Urbain LeVerrier, “Account of the Discovery of the Planet of Le Verrier at Berlin”, Monthly Notices of the Royal Astronomical Society, Vol. 7, No. 9, pp. 153–157.</text:p>
          </table:table-cell>
          <table:table-cell table:style-name="ce12" table:formula="of:=VLOOKUP([.$K19];[$cat_object.$A$2:.$J$14];10;0)" office:value-type="float" office:value="1846" calcext:value-type="float">
            <text:p>1846</text:p>
          </table:table-cell>
          <table:table-cell table:style-name="ce12" table:formula="of:=VLOOKUP([.$K19];[$cat_object.$A$2:.$J$14];8;0)" office:value-type="string" office:string-value="Gigante de hielo azul y frío con fuertes vientos." calcext:value-type="string">
            <text:p>Gigante de hielo azul y frío con fuertes vientos.</text:p>
          </table:table-cell>
          <table:table-cell table:style-name="ce12" table:formula="of:=VLOOKUP([.$K19];[$cat_object.$A$2:.$J$14];7;0)" office:value-type="string" office:string-value="Cold, blue ice giant with strong winds." calcext:value-type="string">
            <text:p>Cold, blue ice giant with strong winds.</text:p>
          </table:table-cell>
          <table:table-cell table:style-name="ce34" table:formula="of:=VLOOKUP([.$K19];[$cat_object.$A$2:.$J$14];4;0)" office:value-type="string" office:string-value="Neptuno" calcext:value-type="string">
            <text:p>Neptuno</text:p>
          </table:table-cell>
          <table:table-cell table:style-name="ce34" table:formula="of:=VLOOKUP([.$K19];[$cat_object.$A$2:.$J$14];3;0)" office:value-type="string" office:string-value="Neptune" calcext:value-type="string">
            <text:p>Neptune</text:p>
          </table:table-cell>
          <table:table-cell table:style-name="ce60" table:content-validation-name="val6" office:value-type="string" calcext:value-type="string">
            <text:p>Nep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3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20];[$cat_object.$A$2:.$J$14];2;0)" office:value-type="float" office:value="9" calcext:value-type="float">
            <text:p>9</text:p>
          </table:table-cell>
          <table:table-cell table:style-name="ce12" table:formula="of:=VLOOKUP([.$K20];[$cat_object.$A$2:.$J$14];9;0)" office:value-type="string" office:string-value="Tombaugh, Clyde W.; «The Search for the Ninth Planet, Pluto.» Astronomical Society of the Pacific Leaflets, Vol. 5, No. 209 , pp. 73-80." calcext:value-type="string">
            <text:p>Tombaugh, Clyde W.; «The Search for the Ninth Planet, Pluto.» Astronomical Society of the Pacific Leaflets, Vol. 5, No. 209 , pp. 73-80.</text:p>
          </table:table-cell>
          <table:table-cell table:style-name="ce12" table:formula="of:=VLOOKUP([.$K20];[$cat_object.$A$2:.$J$14];10;0)" office:value-type="float" office:value="1930" calcext:value-type="float">
            <text:p>1930</text:p>
          </table:table-cell>
          <table:table-cell table:style-name="ce12" table:formula="of:=VLOOKUP([.$K20];[$cat_object.$A$2:.$J$14];8;0)" office:value-type="string" office:string-value="Un pequeño planeta enano helado en el Cinturón de Kuiper, con una órbita altamente elíptica." calcext:value-type="string">
            <text:p>Un pequeño planeta enano helado en el Cinturón de Kuiper, con una órbita altamente elíptica.</text:p>
          </table:table-cell>
          <table:table-cell table:style-name="ce12" table:formula="of:=VLOOKUP([.$K20];[$cat_object.$A$2:.$J$14];7;0)" office:value-type="string" office:string-value="A small, icy dwarf planet in the Kuiper Belt, with a highly elliptical orbit." calcext:value-type="string">
            <text:p>A small, icy dwarf planet in the Kuiper Belt, with a highly elliptical orbit.</text:p>
          </table:table-cell>
          <table:table-cell table:style-name="ce34" table:formula="of:=VLOOKUP([.$K20];[$cat_object.$A$2:.$J$14];4;0)" office:value-type="string" office:string-value="Pluton" calcext:value-type="string">
            <text:p>Pluton</text:p>
          </table:table-cell>
          <table:table-cell table:style-name="ce34" table:formula="of:=VLOOKUP([.$K20];[$cat_object.$A$2:.$J$14];3;0)" office:value-type="string" office:string-value="Pluto" calcext:value-type="string">
            <text:p>Pluto</text:p>
          </table:table-cell>
          <table:table-cell table:style-name="ce60" table:content-validation-name="val6" office:value-type="string" calcext:value-type="string">
            <text:p>Pluto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3"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21];[$cat_object.$A$2:.$J$14];2;0)" office:value-type="float" office:value="10" calcext:value-type="float">
            <text:p>10</text:p>
          </table:table-cell>
          <table:table-cell table:style-name="ce12" table:formula="of:=VLOOKUP([.$K21];[$cat_object.$A$2:.$J$14];9;0)" office:value-type="string" office:string-value="Giuseppe Piazzi" calcext:value-type="string">
            <text:p>Giuseppe Piazzi</text:p>
          </table:table-cell>
          <table:table-cell table:style-name="ce12" table:formula="of:=VLOOKUP([.$K21];[$cat_object.$A$2:.$J$14];10;0)" office:value-type="float" office:value="1801" calcext:value-type="float">
            <text:p>1801</text:p>
          </table:table-cell>
          <table:table-cell table:style-name="ce12" table:formula="of:=VLOOKUP([.$K21];[$cat_object.$A$2:.$J$14];8;0)" office:value-type="string" office:string-value="El objeto más grande del cinturón de asteroides, un planeta enano con una superficie rocosa y posible hielo de agua debajo." calcext:value-type="string">
            <text:p>El objeto más grande del cinturón de asteroides, un planeta enano con una superficie rocosa y posible hielo de agua debajo.</text:p>
          </table:table-cell>
          <table:table-cell table:style-name="ce12" table:formula="of:=VLOOKUP([.$K21];[$cat_object.$A$2:.$J$14];7;0)" office:value-type="string" office:string-value="The largest object in the asteroid belt, a dwarf planet with a rocky surface and possible water-ice beneath." calcext:value-type="string">
            <text:p>The largest object in the asteroid belt, a dwarf planet with a rocky surface and possible water-ice beneath.</text:p>
          </table:table-cell>
          <table:table-cell table:style-name="ce34" table:formula="of:=VLOOKUP([.$K21];[$cat_object.$A$2:.$J$14];4;0)" office:value-type="string" office:string-value="Ceres" calcext:value-type="string">
            <text:p>Ceres</text:p>
          </table:table-cell>
          <table:table-cell table:style-name="ce34" table:formula="of:=VLOOKUP([.$K21];[$cat_object.$A$2:.$J$14];3;0)" office:value-type="string" office:string-value="Ceres" calcext:value-type="string">
            <text:p>Ceres</text:p>
          </table:table-cell>
          <table:table-cell table:style-name="ce60" table:content-validation-name="val6" office:value-type="string" calcext:value-type="string">
            <text:p>Ceres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4"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22];[$cat_object.$A$2:.$J$14];2;0)" office:value-type="float" office:value="11" calcext:value-type="float">
            <text:p>11</text:p>
          </table:table-cell>
          <table:table-cell table:style-name="ce12" table:formula="of:=VLOOKUP([.$K22];[$cat_object.$A$2:.$J$14];9;0)" office:value-type="string" office:string-value="IAU" calcext:value-type="string">
            <text:p>IAU</text:p>
          </table:table-cell>
          <table:table-cell table:style-name="ce12" table:formula="of:=VLOOKUP([.$K22];[$cat_object.$A$2:.$J$14];10;0)" office:value-type="float" office:value="2006" calcext:value-type="float">
            <text:p>2006</text:p>
          </table:table-cell>
          <table:table-cell table:style-name="ce12" table:formula="of:=VLOOKUP([.$K22];[$cat_object.$A$2:.$J$14];8;0)" office:value-type="string" office:string-value="Modelo de planeta de acuerdo a la IAU." calcext:value-type="string">
            <text:p>Modelo de planeta de acuerdo a la IAU.</text:p>
          </table:table-cell>
          <table:table-cell table:style-name="ce12" table:formula="of:=VLOOKUP([.$K22];[$cat_object.$A$2:.$J$14];7;0)" office:value-type="string" office:string-value="Model of planet according to the IAU" calcext:value-type="string">
            <text:p>Model of planet according to the IAU</text:p>
          </table:table-cell>
          <table:table-cell table:style-name="ce34" table:formula="of:=VLOOKUP([.$K22];[$cat_object.$A$2:.$J$14];4;0)" office:value-type="string" office:string-value="Planeta" calcext:value-type="string">
            <text:p>Planeta</text:p>
          </table:table-cell>
          <table:table-cell table:style-name="ce34" table:formula="of:=VLOOKUP([.$K22];[$cat_object.$A$2:.$J$14];3;0)" office:value-type="string" office:string-value="Planet" calcext:value-type="string">
            <text:p>Planet</text:p>
          </table:table-cell>
          <table:table-cell table:style-name="ce60" table:content-validation-name="val6" office:value-type="string" calcext:value-type="string">
            <text:p>Planet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23];[$cat_object.$A$2:.$J$14];2;0)" office:value-type="float" office:value="12" calcext:value-type="float">
            <text:p>12</text:p>
          </table:table-cell>
          <table:table-cell table:style-name="ce12" table:formula="of:=VLOOKUP([.$K23];[$cat_object.$A$2:.$J$14];9;0)" office:value-type="string" office:string-value="NASA-Kepler Telescope" calcext:value-type="string">
            <text:p>NASA-Kepler Telescope</text:p>
          </table:table-cell>
          <table:table-cell table:style-name="ce12" table:formula="of:=VLOOKUP([.$K23];[$cat_object.$A$2:.$J$14];10;0)" office:value-type="float" office:value="2014" calcext:value-type="float">
            <text:p>2014</text:p>
          </table:table-cell>
          <table:table-cell table:style-name="ce12" table:formula="of:=VLOOKUP([.$K23];[$cat_object.$A$2:.$J$14];8;0)" office:value-type="string" office:string-value="Un exoplaneta del tamaño de la Tierra en la zona habitable de la estrella Kepler 186." calcext:value-type="string">
            <text:p>Un exoplaneta del tamaño de la Tierra en la zona habitable de la estrella Kepler 186.</text:p>
          </table:table-cell>
          <table:table-cell table:style-name="ce12" table:formula="of:=VLOOKUP([.$K23];[$cat_object.$A$2:.$J$14];7;0)" office:value-type="string" office:string-value="An Earth-sized planet in the habitable zone of its star Kepler 186." calcext:value-type="string">
            <text:p>An Earth-sized planet in the habitable zone of its star Kepler 186.</text:p>
          </table:table-cell>
          <table:table-cell table:style-name="ce34" table:formula="of:=VLOOKUP([.$K23];[$cat_object.$A$2:.$J$14];4;0)" office:value-type="string" office:string-value="Kepler-186f" calcext:value-type="string">
            <text:p>Kepler-186f</text:p>
          </table:table-cell>
          <table:table-cell table:style-name="ce34" table:formula="of:=VLOOKUP([.$K23];[$cat_object.$A$2:.$J$14];3;0)" office:value-type="string" office:string-value="Kepler-186f" calcext:value-type="string">
            <text:p>Kepler-186f</text:p>
          </table:table-cell>
          <table:table-cell table:style-name="ce60" table:content-validation-name="val6" office:value-type="string" calcext:value-type="string">
            <text:p>Kepler</text:p>
          </table:table-cell>
          <table:table-cell table:style-name="ce34" table:content-validation-name="val8" office:value-type="float" office:value="1" calcext:value-type="float">
            <text:p>1</text:p>
          </table:table-cell>
          <table:table-cell table:number-columns-repeated="2" table:style-name="ce34" table:content-validation-name="val8" office:value-type="float" office:value="0" calcext:value-type="float">
            <text:p>0</text:p>
          </table:table-cell>
          <table:table-cell table:number-columns-repeated="2" table:style-name="ce34" table:content-validation-name="val8" office:value-type="float" office:value="1" calcext:value-type="float">
            <text:p>1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24" table:formula="of:=VLOOKUP([.$K24];[$cat_object.$A$2:.$J$14];2;0)" office:value-type="float" office:value="13" calcext:value-type="float">
            <text:p>13</text:p>
          </table:table-cell>
          <table:table-cell table:style-name="ce12" table:formula="of:=VLOOKUP([.$K24];[$cat_object.$A$2:.$J$14];9;0)" office:value-type="float" office:value="0" calcext:value-type="float">
            <text:p/>
          </table:table-cell>
          <table:table-cell table:style-name="ce12" table:formula="of:=VLOOKUP([.$K24];[$cat_object.$A$2:.$J$14];10;0)" office:value-type="float" office:value="0" calcext:value-type="float">
            <text:p/>
          </table:table-cell>
          <table:table-cell table:style-name="ce12" table:formula="of:=VLOOKUP([.$K24];[$cat_object.$A$2:.$J$14];8;0)" office:value-type="string" office:string-value="Una enorme y brillante bola de plasma caliente, la estrella central de nuestro Sistema Solar, que proporciona calor y luz para sustentar la vida en la Tierra a través de la fusión nuclear en su núcleo." calcext:value-type="string">
            <text:p>Una enorme y brillante bola de plasma caliente, la estrella central de nuestro Sistema Solar, que proporciona calor y luz para sustentar la vida en la Tierra a través de la fusión nuclear en su núcleo.</text:p>
          </table:table-cell>
          <table:table-cell table:style-name="ce12" table:formula="of:=VLOOKUP([.$K24];[$cat_object.$A$2:.$J$14];7;0)" office:value-type="string" office:string-value="A massive, glowing ball of hot plasma, the central star of our solar system, providing heat and light to support life on Earth through nuclear fusion at its core." calcext:value-type="string">
            <text:p>A massive, glowing ball of hot plasma, the central star of our solar system, providing heat and light to support life on Earth through nuclear fusion at its core.</text:p>
          </table:table-cell>
          <table:table-cell table:style-name="ce34" table:formula="of:=VLOOKUP([.$K24];[$cat_object.$A$2:.$J$14];4;0)" office:value-type="string" office:string-value="Sol" calcext:value-type="string">
            <text:p>Sol</text:p>
          </table:table-cell>
          <table:table-cell table:style-name="ce34" table:formula="of:=VLOOKUP([.$K24];[$cat_object.$A$2:.$J$14];3;0)" office:value-type="string" office:string-value="Sun" calcext:value-type="string">
            <text:p>Sun</text:p>
          </table:table-cell>
          <table:table-cell table:style-name="ce60" table:content-validation-name="val6" office:value-type="string" calcext:value-type="string">
            <text:p>Sun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number-columns-repeated="5" table:style-name="ce34" table:content-validation-name="val8" office:value-type="float" office:value="1" calcext:value-type="float">
            <text:p>1</text:p>
          </table:table-cell>
          <table:table-cell table:number-columns-repeated="16367"/>
        </table:table-row>
        <table:table-row table:style-name="ro15" table:number-rows-repeated="1048551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2_20_1" style:display-name="Accent 2 1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Button" style:family="table-cell" style:parent-style-name="Default" style:data-style-name="N0">
      <style:table-cell-properties fo:border-bottom="0.06pt solid #808080" fo:background-color="#b2b2b2" style:diagonal-bl-tr="none" style:diagonal-tl-br="none" style:text-align-source="fix" style:repeat-content="false" fo:wrap-option="no-wrap" fo:border-left="0.06pt solid #cccccc" style:direction="ltr" fo:border-right="0.06pt solid #808080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f1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cc0000"/>
      <style:text-properties fo:color="#ffffff" style:font-name="Arial" fo:font-family="Arial" fo:font-size="10pt" fo:font-weight="bold" style:font-size-asian="10pt" style:font-weight-asian="bold" style:font-name-complex="Arial" style:font-family-complex="Arial" style:font-size-complex="10pt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353cm" fo:margin-left="0cm" fo:margin-right="0cm" fo:margin-bottom="0cm"/>
      </style:header-style>
      <style:footer-style>
        <style:header-footer-properties fo:min-height="0.353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1" style:scale-to="100%" style:writing-mode="lr-tb" style:print="charts drawings objects zero-values"/>
      <style:header-style>
        <style:header-footer-properties fo:min-height="0.353cm" fo:margin-left="0cm" fo:margin-right="0cm" fo:margin-bottom="0cm"/>
      </style:header-style>
      <style:footer-style>
        <style:header-footer-properties fo:min-height="0.353cm" fo:margin-left="0cm" fo:margin-right="0cm" fo:margin-top="0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cat_5f_context_5f_class" style:display-name="PageStyle_cat_context_clas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Validation" style:display-name="PageStyle_Cat_Valid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text_5f_SS_5f_IAU" style:display-name="PageStyle_Context_SS_IAU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text_5f_SolarSystem" style:display-name="PageStyle_Context_SolarSystem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other" style:display-name="PageStyle_cat_other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context" style:display-name="PageStyle_cat_contex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lang" style:display-name="PageStyle_cat_lan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object" style:display-name="PageStyle_cat_objec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attr_5f_class" style:display-name="PageStyle_cat_attr_clas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t_5f_attribute" style:display-name="PageStyle_cat_attribu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9:47:00</meta:creation-date>
    <dc:language>es-MX</dc:language>
    <dc:date>2026-06-15T23:03:35.626383647</dc:date>
    <meta:editing-cycles>59</meta:editing-cycles>
    <meta:editing-duration>PT13H6M12S</meta:editing-duration>
    <meta:generator>LibreOffice/7.4.7.2$Linux_X86_64 LibreOffice_project/40$Build-2</meta:generator>
    <meta:document-statistic meta:table-count="10" meta:cell-count="4833" meta:object-count="0"/>
    <meta:user-defined meta:name="AppVersion">15.0000</meta:user-defined>
  </office:meta>
</office:document-meta>
</file>